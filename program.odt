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  <style:style style:name="P3" style:family="paragraph" style:parent-style-name="Standard">
      <style:text-properties style:font-name="ＭＳ Ｐゴシック" fo:font-size="11pt" officeooo:paragraph-rsid="00425e1f" style:font-name-asian="ＭＳ Ｐゴシック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*********************************************************************************</text:p>
      <text:p text:style-name="P2"><text:s/>* <text:s text:c="7"/>PCSData.hh <text:s/>2024.1.23--</text:p>
      <text:p text:style-name="P2"><text:s/>*********************************************************************************/</text:p>
      <text:p text:style-name="P2">#if !defined(__PCS_DATA_HH)</text:p>
      <text:p text:style-name="P2">#define __PCS_DATA_HH</text:p>
      <text:p text:style-name="P2"/>
      <text:p text:style-name="P2">#include &lt;vector&gt;</text:p>
      <text:p text:style-name="P2"/>
      <text:p text:style-name="P2">class PCSData{</text:p>
      <text:p text:style-name="P2">private:</text:p>
      <text:p text:style-name="P2">public:</text:p>
      <text:p text:style-name="P2"><text:s text:c="4"/>std::vector&lt;double&gt; G;</text:p>
      <text:p text:style-name="P2"><text:s text:c="4"/>std::vector&lt;double&gt; T;</text:p>
      <text:p text:style-name="P2"><text:s text:c="4"/>std::vector&lt;double&gt; I;</text:p>
      <text:p text:style-name="P2"><text:s text:c="4"/>std::vector&lt;double&gt; V;</text:p>
      <text:p text:style-name="P2"><text:s text:c="4"/>std::vector&lt;std::string&gt; Time;</text:p>
      <text:p text:style-name="P2"><text:s text:c="4"/></text:p>
      <text:p text:style-name="P2"><text:s text:c="4"/>void readFile();</text:p>
      <text:p text:style-name="P2"><text:s text:c="4"/></text:p>
      <text:p text:style-name="P2"><text:s text:c="4"/>void averageGTIV();</text:p>
      <text:p text:style-name="P2"><text:s text:c="4"/></text:p>
      <text:p text:style-name="P2"><text:s text:c="4"/>std::vector&lt;std::string&gt; splitString(std::string str, char c);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3"/>PCSData.cu</text:p>
      <text:p text:style-name="P2"><text:s/>************************************************************************************/</text:p>
      <text:p text:style-name="P2">#include &lt;iostream&gt;</text:p>
      <text:p text:style-name="P2">#include &lt;fstream&gt;</text:p>
      <text:p text:style-name="P2">#include &lt;string&gt;</text:p>
      <text:p text:style-name="P2">#include "PCSData.hh"</text:p>
      <text:p text:style-name="P2"/>
      <text:p text:style-name="P2">void PCSData::readFile(){</text:p>
      <text:p text:style-name="P2"><text:s text:c="4"/>// std::cout &lt;&lt; "readFile" &lt;&lt; std::endl;</text:p>
      <text:p text:style-name="P2"/>
      <text:p text:style-name="P2"><text:s text:c="4"/>std::fstream ifs {"GTIVTime.dat", std::ios_base::in};</text:p>
      <text:p text:style-name="P2"><text:s text:c="4"/>if(!ifs){</text:p>
      <text:p text:style-name="P2"><text:tab/>std::cout &lt;&lt; "couldn't open 'GTVITime.dat' for reading" &lt;&lt; std::endl;</text:p>
      <text:p text:style-name="P2"><text:tab/>exit(-1);</text:p>
      <text:p text:style-name="P2"><text:s text:c="4"/>}</text:p>
      <text:p text:style-name="P2"/>
      <text:p text:style-name="P2"><text:s text:c="4"/>std::string str;</text:p>
      <text:p text:style-name="P2"><text:s text:c="4"/>while(std::getline(ifs, str)){</text:p>
      <text:p text:style-name="P2"><text:tab/>// std::cout &lt;&lt; str &lt;&lt; std::endl;</text:p>
      <text:p text:style-name="P2"/>
      <text:p text:style-name="P2"><text:tab/>std::vector&lt;std::string&gt; vStr = splitString(str, ' ');</text:p>
      <text:p text:style-name="P2"/>
      <text:p text:style-name="P2"><text:tab/>for(int i=0; i&lt;vStr.size(); i++){</text:p>
      <text:p text:style-name="P2"><text:tab/> <text:s text:c="3"/>// std::cout &lt;&lt; vStr[i] &lt;&lt; " ";</text:p>
      <text:p text:style-name="P2"><text:tab/> <text:s text:c="3"/>double Ii = stod(vStr[5]);</text:p>
      <text:p text:style-name="P2"><text:tab/> <text:s text:c="3"/>double Vi = stod(vStr[7]);</text:p>
      <text:p text:style-name="P2"><text:tab/> <text:s text:c="3"/>if(Ii &lt; 10.0 || Vi &lt; 10.0) continue; <text:s/>// I==0, V==0のことがあるので、読み飛ばす</text:p>
      <text:p text:style-name="P2"/>
      <text:p text:style-name="P2"><text:tab/> <text:s text:c="3"/>if(i==1) G.push_back(stod(vStr[i])*1000.0); <text:s text:c="2"/>// W/m^2単位にする</text:p>
      <text:p text:style-name="P2"><text:tab/> <text:s text:c="3"/>else if(i==3) T.push_back(stod(vStr[i])); </text:p>
      <text:p text:style-name="P2"><text:tab/> <text:s text:c="3"/>else if(i==5) I.push_back(Ii); </text:p>
      <text:p text:style-name="P2"><text:tab/> <text:s text:c="3"/>else if(i==7) V.push_back(Vi); </text:p>
      <text:p text:style-name="P2"><text:tab/> <text:s text:c="3"/>else if(i==9) Time.push_back(vStr[i]); </text:p>
      <text:p text:style-name="P2"><text:tab/>}</text:p>
      <text:p text:style-name="P2"><text:tab/>// std::cout &lt;&lt; std::endl;</text:p>
      <text:p text:style-name="P2"><text:s text:c="4"/>}</text:p>
      <text:p text:style-name="P2"/>
      <text:p text:style-name="P2"><text:s text:c="4"/>// for(int i=0; i&lt;G.size(); i++){</text:p>
      <text:p text:style-name="P2"><text:soft-page-break/><text:s text:c="4"/>// <text:tab/>std::cout &lt;&lt; i &lt;&lt; " " &lt;&lt; G[i] &lt;&lt; " " &lt;&lt; T[i] &lt;&lt; " " &lt;&lt; I[i] &lt;&lt; " " &lt;&lt; V[i] &lt;&lt; " " &lt;&lt; Time[i] &lt;&lt; std::endl;</text:p>
      <text:p text:style-name="P2"><text:s text:c="4"/>// }</text:p>
      <text:p text:style-name="P2">}</text:p>
      <text:p text:style-name="P2"/>
      <text:p text:style-name="P2">/** G,T,I,Vの３０点平均をとる <text:s text:c="2"/>*****************************************************</text:p>
      <text:p text:style-name="P2"><text:s/>* <text:s/>ただし、日はまたがないようにする ***********************************************/</text:p>
      <text:p text:style-name="P2">void PCSData::averageGTIV(){</text:p>
      <text:p text:style-name="P2"><text:s text:c="4"/>std::cout &lt;&lt; "PCSData::averageGTIV$$ Take 30 average with PCSData::averageGTIV()\n";</text:p>
      <text:p text:style-name="P2"><text:s text:c="4"/></text:p>
      <text:p text:style-name="P2"><text:s text:c="4"/>std::vector&lt;double&gt; Gave;</text:p>
      <text:p text:style-name="P2"><text:s text:c="4"/>std::vector&lt;double&gt; Tave;</text:p>
      <text:p text:style-name="P2"><text:s text:c="4"/>std::vector&lt;double&gt; Iave;</text:p>
      <text:p text:style-name="P2"><text:s text:c="4"/>std::vector&lt;double&gt; Vave;</text:p>
      <text:p text:style-name="P2"><text:s text:c="4"/>std::vector&lt;std::string&gt; TimeAve;</text:p>
      <text:p text:style-name="P2"/>
      <text:p text:style-name="P2"><text:s text:c="4"/>int count = 0;</text:p>
      <text:p text:style-name="P2"><text:s text:c="4"/>std::string day, dayNow, TimeNow;</text:p>
      <text:p text:style-name="P2"><text:s text:c="4"/>double Gsum, Tsum, Isum, Vsum;</text:p>
      <text:p text:style-name="P2"><text:s text:c="4"/></text:p>
      <text:p text:style-name="P2"><text:s text:c="4"/>for(int i=0; i&lt;G.size(); i++){</text:p>
      <text:p text:style-name="P2"><text:tab/>if(count==0){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// std::cout &lt;&lt; "dayNow=" &lt;&lt; dayNow &lt;&lt; std::endl;</text:p>
      <text:p text:style-name="P2"><text:tab/> <text:s text:c="3"/>TimeNow = Time[i];</text:p>
      <text:p text:style-name="P2"><text:tab/>}</text:p>
      <text:p text:style-name="P2"/>
      <text:p text:style-name="P2"><text:tab/>day = (splitString(Time[i], '/'))[2];</text:p>
      <text:p text:style-name="P2"><text:tab/>if(day != dayNow){</text:p>
      <text:p text:style-name="P2"><text:tab/> <text:s text:c="3"/>if(count &gt;= 20){</text:p>
      <text:p text:style-name="P2"><text:tab/><text:tab/>Gave.push_back(Gsum/count);</text:p>
      <text:p text:style-name="P2"><text:tab/><text:tab/>Tave.push_back(Tsum/count);</text:p>
      <text:p text:style-name="P2"><text:tab/><text:tab/>Iave.push_back(Isum/count);</text:p>
      <text:p text:style-name="P2"><text:tab/><text:tab/>Vave.push_back(Vsum/count);</text:p>
      <text:p text:style-name="P2"><text:tab/><text:tab/>TimeAve.push_back(TimeNow);</text:p>
      <text:p text:style-name="P2"><text:tab/> <text:s text:c="3"/>}</text:p>
      <text:p text:style-name="P2"/>
      <text:p text:style-name="P2"><text:tab/> <text:s text:c="3"/>count = 0;</text:p>
      <text:p text:style-name="P2"><text:tab/> <text:s text:c="3"/>Gsum = 0.0;</text:p>
      <text:p text:style-name="P2"><text:tab/> <text:s text:c="3"/>Tsum = 0.0;</text:p>
      <text:p text:style-name="P2"><text:tab/> <text:s text:c="3"/>Isum = 0.0;</text:p>
      <text:p text:style-name="P2"><text:tab/> <text:s text:c="3"/>Vsum = 0.0;</text:p>
      <text:p text:style-name="P2"/>
      <text:p text:style-name="P2"><text:tab/> <text:s text:c="3"/>dayNow = (splitString(Time[i], '/'))[2];</text:p>
      <text:p text:style-name="P2"><text:tab/> <text:s text:c="3"/>TimeNow = Time[i];</text:p>
      <text:p text:style-name="P2"><text:tab/>}<text:tab/> <text:s text:c="3"/></text:p>
      <text:p text:style-name="P2"><text:tab/></text:p>
      <text:p text:style-name="P2"><text:tab/>Gsum += G[i];</text:p>
      <text:p text:style-name="P2"><text:tab/>Tsum += T[i];</text:p>
      <text:p text:style-name="P2"><text:tab/>Isum += I[i];</text:p>
      <text:p text:style-name="P2"><text:tab/>Vsum += V[i];</text:p>
      <text:p text:style-name="P2"/>
      <text:p text:style-name="P2"><text:tab/>count++;</text:p>
      <text:p text:style-name="P2"/>
      <text:p text:style-name="P2"><text:tab/>// printf("i=%d count=%d Time=%s TimeNow=%s day=%s G=%g T=%g I=%g V=%g\n", i, count, Time[i], TimeNow, day, G[i], T[i], I[i], V[i]);////////////////////////t </text:p>
      <text:p text:style-name="P2"/>
      <text:p text:style-name="P2"><text:tab/>if(count == 30){</text:p>
      <text:p text:style-name="P2"><text:tab/> <text:s text:c="3"/>Gave.push_back(Gsum/30.0);</text:p>
      <text:p text:style-name="P2"><text:tab/> <text:s text:c="3"/>Tave.push_back(Tsum/30.0);</text:p>
      <text:p text:style-name="P2"><text:soft-page-break/><text:tab/> <text:s text:c="3"/>Iave.push_back(Isum/30.0);</text:p>
      <text:p text:style-name="P2"><text:tab/> <text:s text:c="3"/>Vave.push_back(Vsum/30.0);</text:p>
      <text:p text:style-name="P2"><text:tab/> <text:s text:c="3"/>TimeAve.push_back(TimeNow);</text:p>
      <text:p text:style-name="P2"/>
      <text:p text:style-name="P2"><text:tab/> <text:s text:c="3"/>// printf("G=%g T=%g I=%g V=%g Time=%s\n", Gave[Gave.size()-1], Tave[Tave.size()-1], Iave[Iave.size()-1], Vave[Vave.size()-1], TimeNow);////////////////////t </text:p>
      <text:p text:style-name="P2"/>
      <text:p text:style-name="P2"><text:tab/> <text:s text:c="3"/>count = 0;</text:p>
      <text:p text:style-name="P2"><text:tab/>}</text:p>
      <text:p text:style-name="P2"><text:s text:c="4"/>}</text:p>
      <text:p text:style-name="P2"/>
      <text:p text:style-name="P2"><text:s text:c="4"/>G.clear();</text:p>
      <text:p text:style-name="P2"><text:s text:c="4"/>T.clear();</text:p>
      <text:p text:style-name="P2"><text:s text:c="4"/>I.clear();</text:p>
      <text:p text:style-name="P2"><text:s text:c="4"/>V.clear();</text:p>
      <text:p text:style-name="P2"><text:s text:c="4"/>Time.clear();</text:p>
      <text:p text:style-name="P2"/>
      <text:p text:style-name="P2"><text:s text:c="4"/>G = Gave;</text:p>
      <text:p text:style-name="P2"><text:s text:c="4"/>T = Tave;</text:p>
      <text:p text:style-name="P2"><text:s text:c="4"/>I = Iave;</text:p>
      <text:p text:style-name="P2"><text:s text:c="4"/>V = Vave;</text:p>
      <text:p text:style-name="P2"><text:s text:c="4"/>Time = TimeAve;</text:p>
      <text:p text:style-name="P2">}</text:p>
      <text:p text:style-name="P2"/>
      <text:p text:style-name="P2">/******** <text:s text:c="3"/>文字列strを文字cで分割する 連続したcはひとつとみなす <text:s text:c="3"/>***************/</text:p>
      <text:p text:style-name="P2">std::vector&lt;std::string&gt; PCSData::splitString(std::string str, char c){</text:p>
      <text:p text:style-name="P2"><text:s text:c="4"/>std::vector&lt;std::string&gt; ret;</text:p>
      <text:p text:style-name="P2"/>
      <text:p text:style-name="P2"><text:s text:c="4"/>unsigned int i0 = 0;</text:p>
      <text:p text:style-name="P2"><text:s text:c="4"/>bool final = false;</text:p>
      <text:p text:style-name="P2"><text:s text:c="4"/></text:p>
      <text:p text:style-name="P2"><text:s text:c="4"/>while(true){</text:p>
      <text:p text:style-name="P2"><text:tab/>int i1 = str.find_first_of(c, i0);</text:p>
      <text:p text:style-name="P2"/>
      <text:p text:style-name="P2"><text:tab/>if(i0==i1){ <text:s text:c="2"/>// 最初の文字がスペース</text:p>
      <text:p text:style-name="P2"><text:tab/> <text:s text:c="3"/>i0 = i1+1;</text:p>
      <text:p text:style-name="P2"><text:tab/> <text:s text:c="3"/>continue;</text:p>
      <text:p text:style-name="P2"><text:tab/>}else if(i1 == std::string::npos){</text:p>
      <text:p text:style-name="P2"><text:tab/> <text:s text:c="3"/>i1 = str.size();</text:p>
      <text:p text:style-name="P2"><text:tab/> <text:s text:c="3"/>final = true;</text:p>
      <text:p text:style-name="P2"><text:tab/>}</text:p>
      <text:p text:style-name="P2"><text:tab/></text:p>
      <text:p text:style-name="P2"><text:tab/>std::string subStr {str, i0, i1-i0};</text:p>
      <text:p text:style-name="P2"><text:tab/>ret.push_back(subStr);</text:p>
      <text:p text:style-name="P2"><text:tab/></text:p>
      <text:p text:style-name="P2"><text:tab/>// std::cout &lt;&lt; "i0= " &lt;&lt; i0 &lt;&lt; " i1= " &lt;&lt; i1 &lt;&lt; " " &lt;&lt; subStr &lt;&lt; std::endl;</text:p>
      <text:p text:style-name="P2"/>
      <text:p text:style-name="P2"><text:tab/>i0 = i1+1;</text:p>
      <text:p text:style-name="P2"/>
      <text:p text:style-name="P2"><text:tab/>if(final) break;</text:p>
      <text:p text:style-name="P2"><text:s text:c="4"/>}</text:p>
      <text:p text:style-name="P2"/>
      <text:p text:style-name="P2"><text:s text:c="4"/>return ret;</text:p>
      <text:p text:style-name="P2">}</text:p>
      <text:p text:style-name="P2">/***************************************************************</text:p>
      <text:p text:style-name="P2"><text:s/>* <text:s text:c="4"/>HornerHara.hh</text:p>
      <text:p text:style-name="P2"><text:s/>**************************************************************/</text:p>
      <text:p text:style-name="P2">#ifndef _utl_HornerHara_hh_</text:p>
      <text:p text:style-name="P2">#define _utl_HornerHara_hh_</text:p>
      <text:p text:style-name="P2"/>
      <text:p text:style-name="P2">namespace utl {</text:p>
      <text:p text:style-name="P2"><text:s text:c="4"/>// Polynomial構造体</text:p>
      <text:p text:style-name="P2"><text:s text:c="4"/>template&lt;typename Float, class Tag, unsigned int order&gt; struct Polynomial{</text:p>
      <text:p text:style-name="P2"><text:tab/>static inline Float Coeff();</text:p>
      <text:p text:style-name="P2"><text:tab/>static inline Float Coeff(const Float x);</text:p>
      <text:p text:style-name="P2"><text:soft-page-break/><text:s text:c="4"/>};</text:p>
      <text:p text:style-name="P2"/>
      <text:p text:style-name="P2"><text:s text:c="4"/>// Horner構造体</text:p>
      <text:p text:style-name="P2"><text:s text:c="4"/>template&lt;typename Float, class Tag, unsigned int order&gt; struct Horner{</text:p>
      <text:p text:style-name="P2"><text:tab/>static Float Recurse(const Float term, const Float x){</text:p>
      <text:p text:style-name="P2"><text:tab/> <text:s text:c="3"/>return Horner&lt;Float, Tag, order-1&gt;::Recurse</text:p>
      <text:p text:style-name="P2"><text:tab/><text:tab/>(term*x + Polynomial&lt;Float, Tag, order&gt;::Coeff(), x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Horner&lt;Float, Tag, order-1&gt;::Recurse</text:p>
      <text:p text:style-name="P2"><text:tab/><text:tab/>(Polynomial&lt;Float, Tag, order&gt;::Coeff(), x);</text:p>
      <text:p text:style-name="P2"><text:tab/>}</text:p>
      <text:p text:style-name="P2"><text:tab/></text:p>
      <text:p text:style-name="P2"><text:tab/>static Float Recurse(const Float term, const Float x, const Float y){</text:p>
      <text:p text:style-name="P2"><text:tab/> <text:s text:c="3"/>return Horner&lt;Float, Tag, order-1&gt;::Recurse</text:p>
      <text:p text:style-name="P2"><text:tab/><text:tab/>(term*x + Polynomial&lt;Float, Tag, order&gt;::Coeff(y), x, y);</text:p>
      <text:p text:style-name="P2"><text:tab/>}</text:p>
      <text:p text:style-name="P2"><text:tab/></text:p>
      <text:p text:style-name="P2"><text:tab/>static Float Eval(const Float x, const Float y){</text:p>
      <text:p text:style-name="P2"><text:tab/> <text:s text:c="3"/>return Horner&lt;Float, Tag, order-1&gt;::Recurse</text:p>
      <text:p text:style-name="P2"><text:tab/><text:tab/>(Polynomial&lt;Float, Tag, order&gt;::Coeff(y), x, y);</text:p>
      <text:p text:style-name="P2"><text:tab/>}</text:p>
      <text:p text:style-name="P2"><text:s text:c="4"/>};</text:p>
      <text:p text:style-name="P2"/>
      <text:p text:style-name="P2"><text:s text:c="4"/>// Horner&lt;Float, Tag, 0&gt;構造体</text:p>
      <text:p text:style-name="P2"><text:s text:c="4"/>template&lt;typename Float, class Tag&gt; struct Horner&lt;Float, Tag, 0&gt;{</text:p>
      <text:p text:style-name="P2"><text:tab/>static Float Recurse(const Float term, const Float x){</text:p>
      <text:p text:style-name="P2"><text:tab/> <text:s text:c="3"/>return term*x + Polynomial&lt;Float, Tag, 0&gt;::Coeff();</text:p>
      <text:p text:style-name="P2"><text:tab/>}</text:p>
      <text:p text:style-name="P2"><text:tab/></text:p>
      <text:p text:style-name="P2"><text:tab/>static Float Eval(const Float x){</text:p>
      <text:p text:style-name="P2"><text:tab/> <text:s text:c="3"/>return Polynomial&lt;Float, Tag, 0&gt;::Coeff();</text:p>
      <text:p text:style-name="P2"><text:tab/>}</text:p>
      <text:p text:style-name="P2"/>
      <text:p text:style-name="P2"><text:tab/>static Float Recurse(const Float term, const Float x, const Float y){</text:p>
      <text:p text:style-name="P2"><text:tab/> <text:s text:c="3"/>return term*x + Polynomial&lt;Float, Tag, 0&gt;::Coeff(y);</text:p>
      <text:p text:style-name="P2"><text:tab/>}</text:p>
      <text:p text:style-name="P2"><text:tab/></text:p>
      <text:p text:style-name="P2"><text:tab/>static Float Eval(const Float x, const Float y){</text:p>
      <text:p text:style-name="P2"><text:tab/> <text:s text:c="3"/>return Polynomial&lt;Float, Tag, 0&gt;::Coeff(y);</text:p>
      <text:p text:style-name="P2"><text:tab/>}</text:p>
      <text:p text:style-name="P2"><text:s text:c="4"/>};</text:p>
      <text:p text:style-name="P2"/>
      <text:p text:style-name="P2"><text:s text:c="4"/>// マクロ</text:p>
      <text:p text:style-name="P2">#define HORNER0(F, x, c0) (F)(c0)</text:p>
      <text:p text:style-name="P2">#define HORNER1(F, x, c1, c0) HORNER0(F, x, (F)(c1)*(x) + (F)(c0) )</text:p>
      <text:p text:style-name="P2">#define HORNER2(F, x, c2, c1, c0) HORNER1(F, x, (F)(c2)*(x) + (F)(c1), c0)</text:p>
      <text:p text:style-name="P2">#define HORNER3(F, x, c3, c2, c1, c0) HORNER2(F, x, (F)(c3)*(x) + (F)(c2), c1, c0)</text:p>
      <text:p text:style-name="P2">#define HORNER4(F, x, c4, c3, c2, c1, c0) HORNER3(F, x, (F)(c4)*(x) + (F)(c3), c2, c1, c0)</text:p>
      <text:p text:style-name="P2">#define HORNER5(F, x, c5, c4, c3, c2, c1, c0) \</text:p>
      <text:p text:style-name="P2"><text:s text:c="4"/>HORNER4(F, x, (F)(c5)*(x) + (F)(c4), c3, c2, c1, c0)</text:p>
      <text:p text:style-name="P2">#define HORNER6(F, x, c6, c5, c4, c3, c2, c1, c0) \</text:p>
      <text:p text:style-name="P2"><text:s text:c="4"/>HORNER5(F, x, (F)(c6)*(x) + (F)(c5), c4, c3, c2, c1, c0)</text:p>
      <text:p text:style-name="P2">#define HORNER7(F, x, c7, c6, c5, c4, c3, c2, c1, c0) \</text:p>
      <text:p text:style-name="P2"><text:s text:c="4"/>HORNER6(F, x, (F)(c7)*(x) + (F)(c6), c5, c4, c3, c2, c1, c0)</text:p>
      <text:p text:style-name="P2">#define HORNER8(F, x, c8, c7, c6, c5, c4, c3, c2, c1, c0) \</text:p>
      <text:p text:style-name="P2"><text:s text:c="4"/>HORNER7(F, x, (F)(c8)*(x) + (F)(c7), c6, c5, c4, c3, c2, c1, c0)</text:p>
      <text:p text:style-name="P2">#define HORNER9(F, x, c9, c8, c7, c6, c5, c4, c3, c2, c1, c0) \</text:p>
      <text:p text:style-name="P2"><text:s text:c="4"/>HORNER8(F, x, (F)(c9)*(x) + (F)(c8), c7, c6, c5, c4, c3, c2, c1, c0)</text:p>
      <text:p text:style-name="P2">}</text:p>
      <text:p text:style-name="P2"/>
      <text:p text:style-name="P2">#endif</text:p>
      <text:p text:style-name="P2">/*******************************************************************</text:p>
      <text:p text:style-name="P2"><text:s/>* <text:s text:c="5"/>LambertWhara.hh</text:p>
      <text:p text:style-name="P2"><text:soft-page-break/><text:s/>******************************************************************/</text:p>
      <text:p text:style-name="P2">#ifndef _utl_LambertWhara_h_</text:p>
      <text:p text:style-name="P2">#define _utl_LambertWhara_h_</text:p>
      <text:p text:style-name="P2"/>
      <text:p text:style-name="P2">#include "HornerHara.hh"</text:p>
      <text:p text:style-name="P2"/>
      <text:p text:style-name="P2">namespace utl {</text:p>
      <text:p text:style-name="P2"><text:s text:c="4"/>double LambertW0haraAexp(const double a, const double x);</text:p>
      <text:p text:style-name="P2"><text:s text:c="4"/></text:p>
      <text:p text:style-name="P2"><text:s text:c="4"/>template&lt;typename Float, int n&gt; struct Pade {</text:p>
      <text:p text:style-name="P2"><text:tab/>static inline Float Approximation(const Float x);</text:p>
      <text:p text:style-name="P2"><text:s text:c="4"/>};</text:p>
      <text:p text:style-name="P2"/>
      <text:p text:style-name="P2"><text:s text:c="4"/>template&lt;typename Float&gt; struct Pade&lt;Float, 1&gt;{</text:p>
      <text:p text:style-name="P2"><text:tab/>static inline Float Approximation(const Float x){</text:p>
      <text:p text:style-name="P2"><text:tab/> <text:s text:c="3"/>return x * HORNER4(Float, x, 0.07066247420543414, 2.4326814530577687, 6.39672835731526, 4.663365025836821, 0.99999908757381) /</text:p>
      <text:p text:style-name="P2"><text:tab/><text:tab/>HORNER4(Float, x, 1.2906660139511692, 7.164571775410987, 10.559985088953114, 5.66336307375819, 1);</text:p>
      <text:p text:style-name="P2"><text:tab/>}</text:p>
      <text:p text:style-name="P2"><text:s text:c="4"/>};</text:p>
      <text:p text:style-name="P2"/>
      <text:p text:style-name="P2"><text:s text:c="4"/>template&lt;typename Float&gt; struct Pade&lt;Float, 2&gt;{</text:p>
      <text:p text:style-name="P2"><text:tab/>static inline Float Approximation(const Float x){</text:p>
      <text:p text:style-name="P2"><text:tab/> <text:s text:c="3"/>const Float y = log(Float(0.5)*x) - 2;</text:p>
      <text:p text:style-name="P2"><text:tab/> <text:s text:c="3"/>return 2 + y * HORNER3(Float, y, 0.00006979269679670452, 0.017110368846615806, 0.19338607770900237, 0.6666648896499793) /</text:p>
      <text:p text:style-name="P2"><text:tab/><text:tab/>HORNER2(Float, y, 0.0188060684652668, 0.23451269827133317, 1);</text:p>
      <text:p text:style-name="P2"><text:tab/>}</text:p>
      <text:p text:style-name="P2"><text:s text:c="4"/>};</text:p>
      <text:p text:style-name="P2"/>
      <text:p text:style-name="P2"><text:s text:c="4"/>class BranchPoint { };</text:p>
      <text:p text:style-name="P2"/>
      <text:p text:style-name="P2"><text:s text:c="4"/>template&lt;typename Float&gt; class Branch{</text:p>
      <text:p text:style-name="P2"><text:s text:c="4"/>public:</text:p>
      <text:p text:style-name="P2"><text:tab/>template&lt;int order&gt; static Float AsymptoticExpansionAexp(const Float a, const Float x);</text:p>
      <text:p text:style-name="P2"><text:s text:c="4"/>};</text:p>
      <text:p text:style-name="P2"/>
      <text:p text:style-name="P2"><text:s text:c="4"/>template&lt;typename Float&gt; inline Float HalleyStep(const Float x, const Float w);</text:p>
      <text:p text:style-name="P2"/>
      <text:p text:style-name="P2"><text:s text:c="4"/>template&lt;typename Float&gt; inline Float HalleyStepAexp(const Float a, const Float y, const Float w);</text:p>
      <text:p text:style-name="P2"/>
      <text:p text:style-name="P2"><text:s text:c="4"/>template&lt;typename Float, int order&gt; inline Float AsymptoticExpansionImpl(const Float a, const Float b);</text:p>
      <text:p text:style-name="P2"><text:s text:c="4"/></text:p>
      <text:p text:style-name="P2"><text:s text:c="4"/>template&lt;unsigned int order&gt; class AsymptoticPolynomialB { };</text:p>
      <text:p text:style-name="P2"><text:s text:c="4"/>class AsymptoticPolynomialA { };</text:p>
      <text:p text:style-name="P2">}</text:p>
      <text:p text:style-name="P2"/>
      <text:p text:style-name="P2">#endif</text:p>
      <text:p text:style-name="P2">// -*- C++ -*-</text:p>
      <text:p text:style-name="P2">/************************************************************************</text:p>
      <text:p text:style-name="P2"><text:s/>* <text:s text:c="12"/>LambertWhara.cu</text:p>
      <text:p text:style-name="P2"><text:s/>************************************************************************/</text:p>
      <text:p text:style-name="P2">#include "HornerHara.hh"</text:p>
      <text:p text:style-name="P2">#include "LambertWhara.hh"</text:p>
      <text:p text:style-name="P2">#include &lt;iostream&gt; ///////////count</text:p>
      <text:p text:style-name="P2"/>
      <text:p text:style-name="P2">namespace utl {</text:p>
      <text:p text:style-name="P2"><text:s text:c="4"/>double log1p38 = log(1.38);</text:p>
      <text:p text:style-name="P2"><text:s text:c="4"/>double log236 = log(236.0);</text:p>
      <text:p text:style-name="P2"><text:s text:c="4"/></text:p>
      <text:p text:style-name="P2"><text:s text:c="4"/>// S.Hara Feb. 18, 2024--</text:p>
      <text:p text:style-name="P2"><text:s text:c="4"/>// return W(a*exp(x)), <text:s/>a&gt;0</text:p>
      <text:p text:style-name="P2"><text:s text:c="4"/>double LambertW0haraAexp(const double a, const double x){</text:p>
      <text:p text:style-name="P2"><text:soft-page-break/><text:tab/>if(a==0.0) return 0.0; <text:s text:c="4"/>// S.Hara <text:s/>May 6, 2024</text:p>
      <text:p text:style-name="P2"><text:tab/></text:p>
      <text:p text:style-name="P2"><text:tab/>double w {0.0};</text:p>
      <text:p text:style-name="P2"><text:tab/>double wNext {0.0};</text:p>
      <text:p text:style-name="P2"/>
      <text:p text:style-name="P2"><text:tab/>double xPlusLogA {x + log(a)};</text:p>
      <text:p text:style-name="P2"><text:tab/>double aExpX;</text:p>
      <text:p text:style-name="P2"><text:tab/></text:p>
      <text:p text:style-name="P2"><text:tab/>if(xPlusLogA &lt; log1p38){</text:p>
      <text:p text:style-name="P2"><text:tab/> <text:s text:c="3"/>aExpX = a*exp(x);</text:p>
      <text:p text:style-name="P2"><text:tab/> <text:s text:c="3"/>if(aExpX == 0.0) return 0.0; <text:s text:c="3"/>// S.Hara</text:p>
      <text:p text:style-name="P2"><text:tab/> <text:s text:c="3"/>w = Pade&lt;double, 1&gt;::Approximation(aExpX);</text:p>
      <text:p text:style-name="P2"><text:tab/>}else if(xPlusLogA &lt; log236){</text:p>
      <text:p text:style-name="P2"><text:tab/> <text:s text:c="3"/>aExpX = a*exp(x);</text:p>
      <text:p text:style-name="P2"><text:tab/> <text:s text:c="3"/>w = Pade&lt;double, 2&gt;::Approximation(aExpX);</text:p>
      <text:p text:style-name="P2"><text:tab/>}else{</text:p>
      <text:p text:style-name="P2"><text:tab/> <text:s text:c="3"/>w = Branch&lt;double&gt;::AsymptoticExpansionAexp&lt;5&gt;(a, x);</text:p>
      <text:p text:style-name="P2"><text:tab/>}</text:p>
      <text:p text:style-name="P2"/>
      <text:p text:style-name="P2"><text:tab/>if(!isfinite(w)){//////////////t</text:p>
      <text:p text:style-name="P2"><text:tab/> <text:s text:c="3"/>printf("a=%g, x=%g\n", a, x);</text:p>
      <text:p text:style-name="P2"><text:tab/> <text:s text:c="3"/>std::cout &lt;&lt; "initial w="&lt;&lt;w&lt;&lt;std::endl;</text:p>
      <text:p text:style-name="P2"><text:tab/> <text:s text:c="3"/>exit(0);</text:p>
      <text:p text:style-name="P2"><text:tab/>}</text:p>
      <text:p text:style-name="P2"><text:tab/> <text:s text:c="3"/></text:p>
      <text:p text:style-name="P2"><text:tab/>int count = 0;////////////////////t</text:p>
      <text:p text:style-name="P2"><text:tab/>if(xPlusLogA &lt; log236){</text:p>
      <text:p text:style-name="P2"><text:tab/> <text:s text:c="3"/>while(true){</text:p>
      <text:p text:style-name="P2"><text:tab/><text:tab/>wNext = HalleyStep&lt;double&gt;(aExpX, w);</text:p>
      <text:p text:style-name="P2"><text:tab/><text:tab/>if(abs(wNext-w)&lt;1.0E-12) break;</text:p>
      <text:p text:style-name="P2"/>
      <text:p text:style-name="P2"><text:tab/><text:tab/>count++;////////////////////////////t</text:p>
      <text:p text:style-name="P2"><text:tab/><text:tab/>if(count%1000==0){</text:p>
      <text:p text:style-name="P2"><text:tab/><text:tab/> <text:s text:c="3"/>std::cout &lt;&lt; "LambertW0haraAexp-0, count="&lt;&lt; count &lt;&lt; ", w=" &lt;&lt; w &lt;&lt; ", wNext=" &lt;&lt; wNext &lt;&lt; std::endl;////////////////t</text:p>
      <text:p text:style-name="P2"><text:tab/><text:tab/>}</text:p>
      <text:p text:style-name="P2"><text:tab/><text:tab/></text:p>
      <text:p text:style-name="P2"><text:tab/><text:tab/>w = wNext;</text:p>
      <text:p text:style-name="P2"><text:tab/> <text:s text:c="3"/>}</text:p>
      <text:p text:style-name="P2"><text:tab/>}else{</text:p>
      <text:p text:style-name="P2"><text:tab/> <text:s text:c="3"/>while(true){</text:p>
      <text:p text:style-name="P2"><text:tab/><text:tab/>wNext = HalleyStepAexp&lt;double&gt;(a, x, w);</text:p>
      <text:p text:style-name="P2"><text:tab/><text:tab/>if(isnan(wNext)){////////////////////t</text:p>
      <text:p text:style-name="P2"><text:tab/><text:tab/> <text:s text:c="3"/>printf("a=%g, x=%g, count=%d\n", a, x, count);</text:p>
      <text:p text:style-name="P2"><text:tab/><text:tab/> <text:s text:c="3"/>std::cout &lt;&lt; "w=" &lt;&lt; w &lt;&lt; ", wNext=" &lt;&lt; wNext &lt;&lt; std::endl;</text:p>
      <text:p text:style-name="P2"><text:tab/><text:tab/> <text:s text:c="3"/>exit(0);</text:p>
      <text:p text:style-name="P2"><text:tab/><text:tab/>}</text:p>
      <text:p text:style-name="P2"><text:tab/><text:tab/></text:p>
      <text:p text:style-name="P2"><text:tab/><text:tab/>if(abs(wNext-w)&lt;1.0E-10) break;</text:p>
      <text:p text:style-name="P2"><text:tab/><text:tab/></text:p>
      <text:p text:style-name="P2"><text:tab/><text:tab/>count++;////////////////////////////t</text:p>
      <text:p text:style-name="P2"><text:tab/><text:tab/>if(count%1000==0){</text:p>
      <text:p text:style-name="P2"><text:tab/><text:tab/> <text:s text:c="3"/>std::cout &lt;&lt; "LambertW0haraAexp-1, count="&lt;&lt; count &lt;&lt; ", w=" &lt;&lt; w &lt;&lt; ", wNext=" &lt;&lt; wNext &lt;&lt; std::endl;////////////////t</text:p>
      <text:p text:style-name="P2"><text:tab/><text:tab/>}</text:p>
      <text:p text:style-name="P2"><text:tab/><text:tab/></text:p>
      <text:p text:style-name="P2"><text:tab/><text:tab/>w = wNext;</text:p>
      <text:p text:style-name="P2"><text:tab/> <text:s text:c="3"/>}</text:p>
      <text:p text:style-name="P2"><text:tab/>}</text:p>
      <text:p text:style-name="P2"><text:tab/></text:p>
      <text:p text:style-name="P2"><text:tab/>return wNext;</text:p>
      <text:p text:style-name="P2"><text:s text:c="4"/>}</text:p>
      <text:p text:style-name="P2"/>
      <text:p text:style-name="P2"><text:s text:c="4"/>// SH <text:s/>Feb. 18, 2024</text:p>
      <text:p text:style-name="P2"><text:soft-page-break/><text:s text:c="4"/>template&lt;typename Float&gt; template&lt;int order&gt; Float Branch&lt;Float&gt;::AsymptoticExpansionAexp(const Float a, const Float x)</text:p>
      <text:p text:style-name="P2"><text:s text:c="4"/>{</text:p>
      <text:p text:style-name="P2"><text:tab/>const Float logsx = log(a)+x;</text:p>
      <text:p text:style-name="P2"><text:tab/>const Float logslogsx = log(logsx);</text:p>
      <text:p text:style-name="P2"><text:tab/>return AsymptoticExpansionImpl&lt;Float, order&gt;(logsx, logslogsx);</text:p>
      <text:p text:style-name="P2"><text:s text:c="4"/>}</text:p>
      <text:p text:style-name="P2"><text:s text:c="4"/></text:p>
      <text:p text:style-name="P2"><text:s text:c="4"/>template&lt;typename Float, int order&gt; inline Float AsymptoticExpansionImpl(const Float a, const Float b){</text:p>
      <text:p text:style-name="P2"><text:tab/>return a + Horner&lt;Float, AsymptoticPolynomialA, order&gt;::Eval(1/a, b);</text:p>
      <text:p text:style-name="P2"><text:s text:c="4"/>}</text:p>
      <text:p text:style-name="P2"/>
      <text:p text:style-name="P2"><text:s text:c="4"/>template&lt;typename Float&gt; inline Float HalleyStep(const Float x, const Float w){</text:p>
      <text:p text:style-name="P2"><text:tab/>const Float ew = exp(w);</text:p>
      <text:p text:style-name="P2"><text:tab/>const Float wew = w * ew;</text:p>
      <text:p text:style-name="P2"><text:tab/>const Float wewx = wew - x;</text:p>
      <text:p text:style-name="P2"><text:tab/>const Float w1 = w + 1;</text:p>
      <text:p text:style-name="P2"><text:tab/>return w - wewx / (ew * w1 - (w + 2) * wewx/(2*w1));</text:p>
      <text:p text:style-name="P2"><text:s text:c="4"/>}</text:p>
      <text:p text:style-name="P2"/>
      <text:p text:style-name="P2"><text:s text:c="4"/>// S. Hara Mar. 8, 2024</text:p>
      <text:p text:style-name="P2"><text:s text:c="4"/>template&lt;typename Float&gt; inline Float HalleyStepAexp(const Float a, const Float y, const Float w){</text:p>
      <text:p text:style-name="P2"><text:tab/>const Float ewy = exp(w-y);</text:p>
      <text:p text:style-name="P2"><text:tab/>const Float wewy = w * ewy;</text:p>
      <text:p text:style-name="P2"><text:tab/>const Float wewya = wewy - a;</text:p>
      <text:p text:style-name="P2"><text:tab/>const Float w1 = w + 1;</text:p>
      <text:p text:style-name="P2"><text:tab/>return w - wewya / (ewy * w1 - (w + 2) * wewya/(2*w1));</text:p>
      <text:p text:style-name="P2"><text:s text:c="4"/>}</text:p>
      <text:p text:style-name="P2"><text:s text:c="4"/></text:p>
      <text:p text:style-name="P2"><text:s text:c="4"/>template&lt;typename Float&gt; struct Polynomial&lt;Float, AsymptoticPolynomialB&lt;2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2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2&gt;, 2&gt;{</text:p>
      <text:p text:style-name="P2"><text:tab/>static Float Coeff(){ return Float(1./2); }</text:p>
      <text:p text:style-name="P2"><text:s text:c="4"/>};</text:p>
      <text:p text:style-name="P2"><text:s text:c="4"/>template&lt;typename Float&gt; struct Polynomial&lt;Float, AsymptoticPolynomialB&lt;3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3&gt;, 1&gt;{</text:p>
      <text:p text:style-name="P2"><text:tab/>static Float Coeff(){ return Float(1); }</text:p>
      <text:p text:style-name="P2"><text:s text:c="4"/>};</text:p>
      <text:p text:style-name="P2"><text:s text:c="4"/>template&lt;typename Float&gt; struct Polynomial&lt;Float, AsymptoticPolynomialB&lt;3&gt;, 2&gt;{</text:p>
      <text:p text:style-name="P2"><text:tab/>static Float Coeff(){ return Float(-3./2); }</text:p>
      <text:p text:style-name="P2"><text:s text:c="4"/>};</text:p>
      <text:p text:style-name="P2"><text:s text:c="4"/>template&lt;typename Float&gt; struct Polynomial&lt;Float, AsymptoticPolynomialB&lt;3&gt;, 3&gt;{</text:p>
      <text:p text:style-name="P2"><text:tab/>static Float Coeff(){ return Float(1./3); }</text:p>
      <text:p text:style-name="P2"><text:s text:c="4"/>};</text:p>
      <text:p text:style-name="P2"><text:s text:c="4"/>template&lt;typename Float&gt; struct Polynomial&lt;Float, AsymptoticPolynomialB&lt;4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4&gt;, 1&gt;{</text:p>
      <text:p text:style-name="P2"><text:tab/>static Float Coeff(){ return Float(-1); }</text:p>
      <text:p text:style-name="P2"><text:s text:c="4"/>};</text:p>
      <text:p text:style-name="P2"><text:s text:c="4"/>template&lt;typename Float&gt; struct Polynomial&lt;Float, AsymptoticPolynomialB&lt;4&gt;, 2&gt;{</text:p>
      <text:p text:style-name="P2"><text:tab/>static Float Coeff(){ return Float(3); }</text:p>
      <text:p text:style-name="P2"><text:s text:c="4"/>};</text:p>
      <text:p text:style-name="P2"><text:s text:c="4"/>template&lt;typename Float&gt; struct Polynomial&lt;Float, AsymptoticPolynomialB&lt;4&gt;, 3&gt;{</text:p>
      <text:p text:style-name="P2"><text:tab/>static Float Coeff(){ return Float(-11./6); }</text:p>
      <text:p text:style-name="P2"><text:s text:c="4"/>};</text:p>
      <text:p text:style-name="P2"><text:s text:c="4"/>template&lt;typename Float&gt; struct Polynomial&lt;Float, AsymptoticPolynomialB&lt;4&gt;, 4&gt;{</text:p>
      <text:p text:style-name="P2"><text:tab/>static Float Coeff(){ return Float(1./4); }</text:p>
      <text:p text:style-name="P2"><text:soft-page-break/><text:s text:c="4"/>};</text:p>
      <text:p text:style-name="P2"><text:s text:c="4"/>template&lt;typename Float&gt; struct Polynomial&lt;Float, AsymptoticPolynomialB&lt;5&gt;, 0&gt;{</text:p>
      <text:p text:style-name="P2"><text:tab/>static Float Coeff(){ return Float(0); }</text:p>
      <text:p text:style-name="P2"><text:s text:c="4"/>};</text:p>
      <text:p text:style-name="P2"><text:s text:c="4"/>template&lt;typename Float&gt; struct Polynomial&lt;Float, AsymptoticPolynomialB&lt;5&gt;, 1&gt;{</text:p>
      <text:p text:style-name="P2"><text:tab/>static Float Coeff(){ return Float(1); }</text:p>
      <text:p text:style-name="P2"><text:s text:c="4"/>};</text:p>
      <text:p text:style-name="P2"><text:s text:c="4"/>template&lt;typename Float&gt; struct Polynomial&lt;Float, AsymptoticPolynomialB&lt;5&gt;, 2&gt;{</text:p>
      <text:p text:style-name="P2"><text:tab/>static Float Coeff(){ return Float(-5); }</text:p>
      <text:p text:style-name="P2"><text:s text:c="4"/>};</text:p>
      <text:p text:style-name="P2"><text:s text:c="4"/>template&lt;typename Float&gt; struct Polynomial&lt;Float, AsymptoticPolynomialB&lt;5&gt;, 3&gt;{</text:p>
      <text:p text:style-name="P2"><text:tab/>static Float Coeff(){ return Float(35./6); }</text:p>
      <text:p text:style-name="P2"><text:s text:c="4"/>};</text:p>
      <text:p text:style-name="P2"><text:s text:c="4"/>template&lt;typename Float&gt; struct Polynomial&lt;Float, AsymptoticPolynomialB&lt;5&gt;, 4&gt;{</text:p>
      <text:p text:style-name="P2"><text:tab/>static Float Coeff(){ return Float(-25./12); }</text:p>
      <text:p text:style-name="P2"><text:s text:c="4"/>};</text:p>
      <text:p text:style-name="P2"><text:s text:c="4"/>template&lt;typename Float&gt; struct Polynomial&lt;Float, AsymptoticPolynomialB&lt;5&gt;, 5&gt;{</text:p>
      <text:p text:style-name="P2"><text:tab/>static Float Coeff(){ return Float(-1./5); }</text:p>
      <text:p text:style-name="P2"><text:s text:c="4"/>};</text:p>
      <text:p text:style-name="P2"/>
      <text:p text:style-name="P2"><text:s text:c="4"/>template&lt;typename Float&gt; struct Polynomial&lt;Float, AsymptoticPolynomialA, 0&gt; {</text:p>
      <text:p text:style-name="P2"><text:tab/>static Float Coeff(const Float y) { return Float(-y); }</text:p>
      <text:p text:style-name="P2"><text:s text:c="4"/>};</text:p>
      <text:p text:style-name="P2"><text:s text:c="4"/>template&lt;typename Float&gt; struct Polynomial&lt;Float, AsymptoticPolynomialA, 1&gt; {</text:p>
      <text:p text:style-name="P2"><text:tab/>static Float Coeff(const Float y) { return Float(y); }</text:p>
      <text:p text:style-name="P2"><text:s text:c="4"/>};</text:p>
      <text:p text:style-name="P2"><text:s text:c="4"/>template&lt;typename Float&gt; struct Polynomial&lt;Float, AsymptoticPolynomialA, 2&gt; {</text:p>
      <text:p text:style-name="P2"><text:tab/>static Float Coeff(const Float y) { return Float(Horner&lt;Float, <text:s/>AsymptoticPolynomialB&lt;2&gt;, 2&gt;::Eval(y)); }</text:p>
      <text:p text:style-name="P2"><text:s text:c="4"/>};</text:p>
      <text:p text:style-name="P2"><text:s text:c="4"/>template&lt;typename Float&gt; struct Polynomial&lt;Float, AsymptoticPolynomialA, 3&gt; {</text:p>
      <text:p text:style-name="P2"><text:tab/>static Float Coeff(const Float y) { return Float(Horner&lt;Float, <text:s/>AsymptoticPolynomialB&lt;3&gt;, 3&gt;::Eval(y)); }</text:p>
      <text:p text:style-name="P2"><text:s text:c="4"/>};</text:p>
      <text:p text:style-name="P2"><text:s text:c="4"/>template&lt;typename Float&gt; struct Polynomial&lt;Float, AsymptoticPolynomialA, 4&gt; {</text:p>
      <text:p text:style-name="P2"><text:tab/>static Float Coeff(const Float y) { return Float(Horner&lt;Float, <text:s/>AsymptoticPolynomialB&lt;4&gt;, 4&gt;::Eval(y)); }</text:p>
      <text:p text:style-name="P2"><text:s text:c="4"/>};</text:p>
      <text:p text:style-name="P2"><text:s text:c="4"/>template&lt;typename Float&gt; struct Polynomial&lt;Float, AsymptoticPolynomialA, 5&gt; {</text:p>
      <text:p text:style-name="P2"><text:tab/>static Float Coeff(const Float y) { return Float(Horner&lt;Float, <text:s/>AsymptoticPolynomialB&lt;5&gt;, 5&gt;::Eval(y)); }</text:p>
      <text:p text:style-name="P2"><text:s text:c="4"/>};</text:p>
      <text:p text:style-name="P2"/>
      <text:p text:style-name="P2">}</text:p>
      <text:p text:style-name="P2">/**************************************************************************</text:p>
      <text:p text:style-name="P2"><text:s/>* <text:s text:c="7"/>globalConstants.hh</text:p>
      <text:p text:style-name="P2"><text:s/>************************************************************************/</text:p>
      <text:p text:style-name="P2">#if !defined(__GLOBALCONSTANTS_HH)</text:p>
      <text:p text:style-name="P2">#define __GLOBALCONSTANTS_HH</text:p>
      <text:p text:style-name="P2"/>
      <text:p text:style-name="P2">class GlobalConstants{</text:p>
      <text:p text:style-name="P2">public:</text:p>
      <text:p text:style-name="P2"><text:s text:c="4"/>// ND240HA</text:p>
      <text:p text:style-name="P2"><text:s text:c="4"/>const float IscSTC {8.61}; <text:s text:c="2"/>// A</text:p>
      <text:p text:style-name="P2"><text:s text:c="4"/>const float VocSTC {37.05}; <text:s text:c="2"/>// V</text:p>
      <text:p text:style-name="P2"><text:s text:c="4"/>const float ImpSTC {8.16}; <text:s text:c="2"/>// A</text:p>
      <text:p text:style-name="P2"><text:s text:c="4"/>const float VmpSTC {29.42}; <text:s text:c="2"/>// V</text:p>
      <text:p text:style-name="P2"><text:s text:c="4"/>const float alphaSc {0.00038}; <text:s text:c="2"/>// /degC</text:p>
      <text:p text:style-name="P2"><text:s text:c="4"/>const float betaOc {-0.00329}; <text:s text:c="2"/>// /degC</text:p>
      <text:p text:style-name="P2"><text:s text:c="4"/>const float gammaMp {-0.00440}; <text:s text:c="2"/>// /degC</text:p>
      <text:p text:style-name="P2"><text:s text:c="4"/>const int Ns {60};</text:p>
      <text:p text:style-name="P2"><text:s text:c="4"/>const int Ns_sub {20}; <text:s text:c="2"/>// the number of cells in a substring</text:p>
      <text:p text:style-name="P2"><text:s text:c="4"/></text:p>
      <text:p text:style-name="P2"><text:s text:c="4"/>const int S {84}; <text:s text:c="2"/>// the number of strings in a stringGroup</text:p>
      <text:p text:style-name="P2"><text:s text:c="4"/>const int L {14*3}; <text:s text:c="2"/>// the number of substrings in a string</text:p>
      <text:p text:style-name="P2"><text:soft-page-break/></text:p>
      <text:p text:style-name="P2"><text:s text:c="4"/>static const int K {4}; <text:s text:c="2"/>// ストリング群のパラメータ推定をする測定データ時間数</text:p>
      <text:p text:style-name="P2"/>
      <text:p text:style-name="P2"><text:s text:c="4"/>bool haveGPU {false}; <text:s/>// GPUを使わないときは、これをfalseにする</text:p>
      <text:p text:style-name="P2"/>
      <text:p text:style-name="P2"><text:s text:c="4"/>float getVocSTCss(){ return VocSTC*Ns_sub/Ns; }</text:p>
      <text:p text:style-name="P2"><text:s text:c="4"/>float getVmpSTCss(){ return VmpSTC*Ns_sub/Ns; }</text:p>
      <text:p text:style-name="P2">};</text:p>
      <text:p text:style-name="P2"/>
      <text:p text:style-name="P2">#endif</text:p>
      <text:p text:style-name="P2">/*********************************************************************</text:p>
      <text:p text:style-name="P2"><text:s/>* <text:s text:c="5"/>adaptiveModel.hh</text:p>
      <text:p text:style-name="P2"><text:s/>********************************************************************/</text:p>
      <text:p text:style-name="P2">#if !defined(__ADAPTIVE_MODEL_HH)</text:p>
      <text:p text:style-name="P2">#define __ADAPTIVE_MODEL_HH</text:p>
      <text:p text:style-name="P2"/>
      <text:p text:style-name="P2">#include &lt;cuda_runtime.h&gt;</text:p>
      <text:p text:style-name="P2">#include "globalConstants.hh"</text:p>
      <text:p text:style-name="P2"/>
      <text:p text:style-name="P2">class AdaptiveModel{</text:p>
      <text:p text:style-name="P2">private:</text:p>
      <text:p text:style-name="P2"><text:s text:c="4"/>GlobalConstants m_gc;</text:p>
      <text:p text:style-name="P2"><text:s text:c="4"/></text:p>
      <text:p text:style-name="P2"><text:s text:c="4"/>// const unsigned int numBlocksRs {4};</text:p>
      <text:p text:style-name="P2"><text:s text:c="4"/>// const unsigned int numBlocksEta {4};</text:p>
      <text:p text:style-name="P2"><text:s text:c="4"/>// const unsigned int numBlocksRs {8};</text:p>
      <text:p text:style-name="P2"><text:s text:c="4"/>// const unsigned int numBlocksEta {8};</text:p>
      <text:p text:style-name="P2"><text:s text:c="4"/>const unsigned int numBlocksRs {32};</text:p>
      <text:p text:style-name="P2"><text:s text:c="4"/>const unsigned int numBlocksEta {32};</text:p>
      <text:p text:style-name="P2"><text:s text:c="4"/>const dim3 numBlocks {numBlocksRs, numBlocksEta};</text:p>
      <text:p text:style-name="P2"><text:s text:c="4"/>const dim3 threadsPerBlock {32, 32}; <text:s text:c="2"/>// 32*32=10^10=1024</text:p>
      <text:p text:style-name="P2"><text:s text:c="4"/>// const dim3 threadsPerBlock {16, 16}; <text:s text:c="2"/>// 32*32=10^10=1024</text:p>
      <text:p text:style-name="P2"><text:s text:c="4"/>// const dim3 threadsPerBlock {4, 4}; <text:s text:c="2"/>// 32*32=10^10=1024</text:p>
      <text:p text:style-name="P2"/>
      <text:p text:style-name="P2"><text:s text:c="4"/>// const int nRs {256}; <text:s/>// 各GPUスレッドが調べるRsの個数</text:p>
      <text:p text:style-name="P2"><text:s text:c="4"/>// const int nEta {256}; <text:s/>// 各GPUスレッドが調べるEtaの個数</text:p>
      <text:p text:style-name="P2"><text:s text:c="4"/>// const int nRs {128}; <text:s/>// 各GPUスレッドが調べるRsの個数</text:p>
      <text:p text:style-name="P2"><text:s text:c="4"/>// const int nEta {128}; <text:s/>// 各GPUスレッドが調べるEtaの個数</text:p>
      <text:p text:style-name="P2"><text:s text:c="4"/>// const int nRs {64}; <text:s/>// 各GPUスレッドが調べるRsの個数</text:p>
      <text:p text:style-name="P2"><text:s text:c="4"/>// const int nEta {64}; <text:s/>// 各GPUスレッドが調べるEtaの個数</text:p>
      <text:p text:style-name="P2"><text:s text:c="4"/>// const int nRs {32}; <text:s/>// 各GPUスレッドが調べるRsの個数</text:p>
      <text:p text:style-name="P2"><text:s text:c="4"/>// const int nEta {32}; <text:s/>// 各GPUスレッドが調べるEtaの個数</text:p>
      <text:p text:style-name="P2"><text:s text:c="4"/>const int nRs {16}; <text:s/>// 各GPUスレッドが調べるRsの個数</text:p>
      <text:p text:style-name="P2"><text:s text:c="4"/>const int nEta {16}; <text:s/>// 各GPUスレッドが調べるEtaの個数</text:p>
      <text:p text:style-name="P2"/>
      <text:p text:style-name="P2"><text:s text:c="4"/>// Rs, etaの最初の探索範囲</text:p>
      <text:p text:style-name="P2"><text:s text:c="4"/>const float Rs0init = 0.001, Rs1init = 10.0, eta0init = 1.0, eta1init = 2.5;</text:p>
      <text:p text:style-name="P2"><text:s text:c="4"/></text:p>
      <text:p text:style-name="P2"><text:s text:c="4"/>const int numThreadsRs = numBlocksRs*threadsPerBlock.x;</text:p>
      <text:p text:style-name="P2"><text:s text:c="4"/>const int numThreadsEta = numBlocksEta*threadsPerBlock.y;</text:p>
      <text:p text:style-name="P2"><text:s text:c="4"/>const int numThreads = numThreadsRs*numThreadsEta;</text:p>
      <text:p text:style-name="P2"><text:s text:c="4"/>const int NRs = numThreadsRs*nRs;</text:p>
      <text:p text:style-name="P2"><text:s text:c="4"/>const int NEta = numThreadsEta*nEta;</text:p>
      <text:p text:style-name="P2"/>
      <text:p text:style-name="P2"><text:s text:c="4"/>const float deltaOc = 0.0539, deltaMp = 0.0265; <text:s/>// ND240-HA</text:p>
      <text:p text:style-name="P2"><text:s text:c="4"/>const float etad = -5.7E-4; <text:s/>// /K</text:p>
      <text:p text:style-name="P2"><text:s text:c="2"/></text:p>
      <text:p text:style-name="P2"><text:s text:c="4"/>// このクラスのメインの状態変数、コンストラクタで設定される</text:p>
      <text:p text:style-name="P2"><text:s text:c="4"/>float IscSTC, VocSTC, ImpSTC, VmpSTC, alphaSc, betaOc, gammaMp, G, T;</text:p>
      <text:p text:style-name="P2"><text:s text:c="4"/>int Ns;</text:p>
      <text:p text:style-name="P2"/>
      <text:p text:style-name="P2"><text:s text:c="4"/>// 関数setVarsで設定される</text:p>
      <text:p text:style-name="P2"><text:s text:c="4"/>float Rs0=Rs0init, Rs1=Rs1init, eta0=eta0init, eta1=eta1init;</text:p>
      <text:p text:style-name="P2"/>
      <text:p text:style-name="P2"><text:s text:c="4"/>float GpGSTC;</text:p>
      <text:p text:style-name="P2"><text:soft-page-break/><text:s text:c="4"/>float TmTSTC;</text:p>
      <text:p text:style-name="P2"><text:s text:c="4"/>float lnGpGSTC;</text:p>
      <text:p text:style-name="P2"><text:s text:c="4"/>float PmaxSTC;</text:p>
      <text:p text:style-name="P2"><text:s text:c="2"/></text:p>
      <text:p text:style-name="P2"><text:s text:c="4"/>float Tkel;</text:p>
      <text:p text:style-name="P2"><text:s text:c="4"/>float NsVt;</text:p>
      <text:p text:style-name="P2"><text:s text:c="4"/>float W01;</text:p>
      <text:p text:style-name="P2"><text:s text:c="4"/>float W02;</text:p>
      <text:p text:style-name="P2"/>
      <text:p text:style-name="P2"><text:s text:c="4"/>float Voc, Isc, Vmp, Imp; <text:s/>// G,Tに対する値</text:p>
      <text:p text:style-name="P2"><text:s text:c="4"/>// 関数setVarsで設定される（ここまで）</text:p>
      <text:p text:style-name="P2"/>
      <text:p text:style-name="P2"><text:s text:c="4"/>// 関数calcA0B0で設定される</text:p>
      <text:p text:style-name="P2"><text:s text:c="4"/>float A0, B0, eta00, absA0, absB0; <text:s/>// eta00はA0, B0の計算に使われたetaの値、1.0, 1,1, 1,2, 1,3のいずれか</text:p>
      <text:p text:style-name="P2"/>
      <text:p text:style-name="P2"><text:s text:c="4"/>// Five parameters of single diode model</text:p>
      <text:p text:style-name="P2"><text:s text:c="4"/>float Rs, eta, Rh, I0, Iph;</text:p>
      <text:p text:style-name="P2"/>
      <text:p text:style-name="P2"><text:s text:c="4"/>// コンストラクタ、calcPCS()から呼び出される</text:p>
      <text:p text:style-name="P2"><text:s text:c="4"/>void setVars();</text:p>
      <text:p text:style-name="P2"><text:s text:c="4"/>void calcA0B0();</text:p>
      <text:p text:style-name="P2"><text:s text:c="4"/>void setVarsGetE();</text:p>
      <text:p text:style-name="P2"><text:s text:c="2"/></text:p>
      <text:p text:style-name="P2"><text:s text:c="4"/>float calcRh(float Rs, float eta) const;</text:p>
      <text:p text:style-name="P2"><text:s text:c="4"/>float calcI0(float Rs, float eta, float Rh) const;</text:p>
      <text:p text:style-name="P2"><text:s text:c="4"/>float calcIph(float Rs, float eta, float Rh) const;</text:p>
      <text:p text:style-name="P2"/>
      <text:p text:style-name="P2"><text:s text:c="4"/>// PCSデータによるパラメータ推定用、calcPCSでセットされる</text:p>
      <text:p text:style-name="P2"><text:s text:c="4"/>float aG[GlobalConstants::K], aT[GlobalConstants::K];</text:p>
      <text:p text:style-name="P2"><text:s text:c="4"/>float aNsVt[GlobalConstants::K];</text:p>
      <text:p text:style-name="P2"><text:s text:c="4"/>float aIsc[GlobalConstants::K], aVoc[GlobalConstants::K],</text:p>
      <text:p text:style-name="P2"><text:tab/>aImp[GlobalConstants::K], aVmp[GlobalConstants::K]; </text:p>
      <text:p text:style-name="P2"><text:s text:c="4"/>float aRs[GlobalConstants::K], aEta[GlobalConstants::K], aRh[GlobalConstants::K],</text:p>
      <text:p text:style-name="P2"><text:tab/>aI0[GlobalConstants::K], aIph[GlobalConstants::K];</text:p>
      <text:p text:style-name="P2"><text:s text:c="4"/>float aLnGpGSTC[GlobalConstants::K];</text:p>
      <text:p text:style-name="P2"><text:s text:c="4"/>float aW01[GlobalConstants::K], aW02[GlobalConstants::K];</text:p>
      <text:p text:style-name="P2"><text:s text:c="4"/></text:p>
      <text:p text:style-name="P2"><text:s text:c="4"/>float SearchNoGPU(float kRs, float dEta);</text:p>
      <text:p text:style-name="P2"/>
      <text:p text:style-name="P2">public:</text:p>
      <text:p text:style-name="P2"><text:s text:c="4"/>// Constructors G (W/m^2), T (degC)</text:p>
      <text:p text:style-name="P2"><text:s text:c="4"/>AdaptiveModel(float IscSTC, float VocSTC, float ImpSTC, float VmpSTC, float alphaSc,</text:p>
      <text:p text:style-name="P2"><text:tab/><text:tab/> <text:s/>float betaOc, float gammaMp, float G, float T, int Ns, GlobalConstants gc);</text:p>
      <text:p text:style-name="P2"><text:s text:c="4"/>AdaptiveModel(GlobalConstants gc, float G, float T);</text:p>
      <text:p text:style-name="P2"/>
      <text:p text:style-name="P2"><text:s text:c="4"/>float calc();</text:p>
      <text:p text:style-name="P2"><text:s text:c="4"/>// float calcRh(float Rs, float eta);//////////////////////t</text:p>
      <text:p text:style-name="P2"/>
      <text:p text:style-name="P2"><text:s text:c="4"/>float calcNoGPU();</text:p>
      <text:p text:style-name="P2"/>
      <text:p text:style-name="P2"><text:s text:c="4"/>float getRs() const{ return Rs; }</text:p>
      <text:p text:style-name="P2"><text:s text:c="4"/>float getEta() const{ return eta; }</text:p>
      <text:p text:style-name="P2"><text:s text:c="4"/>float getRh() const{ return Rh; }</text:p>
      <text:p text:style-name="P2"><text:s text:c="4"/>float getI0() const{ return I0; }</text:p>
      <text:p text:style-name="P2"><text:s text:c="4"/>float getIph() const{ return Iph; }</text:p>
      <text:p text:style-name="P2"/>
      <text:p text:style-name="P2"><text:s text:c="4"/>double getV(double I) const;</text:p>
      <text:p text:style-name="P2"><text:s text:c="4"/>double getI(double V) const;</text:p>
      <text:p text:style-name="P2"/>
      <text:p text:style-name="P2"><text:s text:c="4"/>float getIsc() const{ return Isc; }</text:p>
      <text:p text:style-name="P2"/>
      <text:p text:style-name="P2"><text:s text:c="4"/>// PCSデータによるパラメータ推定用</text:p>
      <text:p text:style-name="P2"><text:s text:c="4"/>float calcPCS(double G[], double T[]);</text:p>
      <text:p text:style-name="P2"><text:s text:c="4"/>float calcPCSGetE();</text:p>
      <text:p text:style-name="P2"><text:soft-page-break/><text:s text:c="4"/></text:p>
      <text:p text:style-name="P2"><text:s text:c="4"/>float getIsc(int k) const{ return aIsc[k]; }</text:p>
      <text:p text:style-name="P2"><text:s text:c="4"/></text:p>
      <text:p text:style-name="P2"><text:s text:c="4"/>void getVIjunbi(int k);</text:p>
      <text:p text:style-name="P2"/>
      <text:p text:style-name="P2"><text:s text:c="4"/>void set5params(double Rss, double Etaa, double Rhh, double I00, double Iphh);</text:p>
      <text:p text:style-name="P2"><text:s text:c="4"/>void set5params(double Rss, double Etaa, double Rhh, double I00, double Iphh, double NsVtt, int k);</text:p>
      <text:p text:style-name="P2"/>
      <text:p text:style-name="P2"><text:s text:c="4"/>void setSTCparams(double X[4]);</text:p>
      <text:p text:style-name="P2">};</text:p>
      <text:p text:style-name="P2"/>
      <text:p text:style-name="P2">// Kernel</text:p>
      <text:p text:style-name="P2">__global__ void Search(float *d_Rs0nth, float *d_eta0nth,</text:p>
      <text:p text:style-name="P2"><text:tab/><text:tab/> <text:s text:c="6"/>float *d_RsMin, <text:s/>float *d_RhMin, float *d_etaMin,float *d_Emin,</text:p>
      <text:p text:style-name="P2"><text:tab/><text:tab/> <text:s text:c="6"/>float Isc, float Voc, float Imp, float Vmp,</text:p>
      <text:p text:style-name="P2"><text:tab/><text:tab/> <text:s text:c="6"/>float alphaSc, float betaOc, float gammaMp,</text:p>
      <text:p text:style-name="P2"><text:tab/><text:tab/> <text:s text:c="6"/>float NsVt, float I01d, float I02d,</text:p>
      <text:p text:style-name="P2"><text:tab/><text:tab/> <text:s text:c="6"/>float etad, float TInv,</text:p>
      <text:p text:style-name="P2"><text:tab/><text:tab/> <text:s text:c="6"/>float kRs, float dEta, int nRs, int nEta,</text:p>
      <text:p text:style-name="P2"><text:tab/><text:tab/> <text:s text:c="6"/>float absA0, float absB0)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5"/>adaptiveModel.cu</text:p>
      <text:p text:style-name="P2"><text:s/>*****************************************************************************/</text:p>
      <text:p text:style-name="P2">#include "adaptiveModel.hh"</text:p>
      <text:p text:style-name="P2">#include "LambertWhara.hh"</text:p>
      <text:p text:style-name="P2">#include "globalConstants.hh"</text:p>
      <text:p text:style-name="P2">#include &lt;iostream&gt;</text:p>
      <text:p text:style-name="P2">#include &lt;cmath&gt;</text:p>
      <text:p text:style-name="P2">#include &lt;cstdio&gt;</text:p>
      <text:p text:style-name="P2">#include &lt;limits&gt;</text:p>
      <text:p text:style-name="P2">#include &lt;cuda_runtime.h&gt;</text:p>
      <text:p text:style-name="P2">#include &lt;iomanip&gt; <text:s/>// calcPCSparams</text:p>
      <text:p text:style-name="P2">#include &lt;stdexcept&gt;</text:p>
      <text:p text:style-name="P2">#include &lt;string&gt;</text:p>
      <text:p text:style-name="P2"/>
      <text:p text:style-name="P2">/** Constructor G (W/m^2), T (degC) <text:s text:c="3"/>****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3"/>*********************************************/</text:p>
      <text:p text:style-name="P2">AdaptiveModel::AdaptiveModel(float IscSTCC, float VocSTCC, float ImpSTCC, float VmpSTCC,</text:p>
      <text:p text:style-name="P2"><text:tab/><text:tab/><text:tab/> <text:s text:c="4"/>float alphaScc, float betaOcc, float gammaMpp,</text:p>
      <text:p text:style-name="P2"><text:tab/><text:tab/><text:tab/> <text:s text:c="4"/>float GG, float TT, int Nss, GlobalConstants gc)</text:p>
      <text:p text:style-name="P2"><text:s text:c="4"/>:IscSTC{IscSTCC}, VocSTC{VocSTCC}, ImpSTC{ImpSTCC}, VmpSTC{VmpSTCC},</text:p>
      <text:p text:style-name="P2"><text:s text:c="5"/>alphaSc{alphaScc}, betaOc{betaOcc}, gammaMp{gammaMpp}, G{GG}, T{TT}, Ns{Nss},</text:p>
      <text:p text:style-name="P2"><text:s text:c="5"/>m_gc{gc}{</text:p>
      <text:p text:style-name="P2"/>
      <text:p text:style-name="P2"><text:s text:c="4"/>setVars();</text:p>
      <text:p text:style-name="P2"><text:s text:c="4"/>calcA0B0();</text:p>
      <text:p text:style-name="P2">}</text:p>
      <text:p text:style-name="P2"/>
      <text:p text:style-name="P2">/** GlobalConstantsを与えるコンストラクタ <text:s/>******************************************</text:p>
      <text:p text:style-name="P2"><text:s/>* <text:s/>出力：IscSTC, VocSTC, ImpSTC, VmpSTC, alphaSc, betaOc, gammaMp, G, T, Ns</text:p>
      <text:p text:style-name="P2"><text:s/>* <text:s/>関数呼び出し：setVars, calcA0B0 <text:s text:c="4"/>********************************************/</text:p>
      <text:p text:style-name="P2">AdaptiveModel::AdaptiveModel(GlobalConstants gc, float GG, float TT)</text:p>
      <text:p text:style-name="P2"><text:s text:c="4"/>:IscSTC{gc.IscSTC}, VocSTC{gc.VocSTC/gc.Ns*gc.Ns_sub},</text:p>
      <text:p text:style-name="P2"><text:s text:c="5"/>ImpSTC{gc.ImpSTC}, VmpSTC{gc.VmpSTC/gc.Ns*gc.Ns_sub},</text:p>
      <text:p text:style-name="P2"><text:s text:c="5"/>alphaSc{gc.alphaSc}, betaOc{gc.betaOc}, gammaMp{gc.gammaMp},</text:p>
      <text:p text:style-name="P2"><text:s text:c="5"/>G{GG}, T{TT}, Ns{gc.Ns_sub}, m_gc{gc}{</text:p>
      <text:p text:style-name="P2"/>
      <text:p text:style-name="P2"><text:s text:c="4"/>setVars();</text:p>
      <text:p text:style-name="P2"><text:s text:c="4"/>calcA0B0();</text:p>
      <text:p text:style-name="P2"><text:s text:c="4"/>// testVars(33.4);////////////////////////t</text:p>
      <text:p text:style-name="P2">}</text:p>
      <text:p text:style-name="P2"><text:soft-page-break/></text:p>
      <text:p text:style-name="P2">/** クラスの変数たちを設定する。コンストラクタから呼び出される。 <text:s/>*******************</text:p>
      <text:p text:style-name="P2"><text:s/>* <text:s/>入力：Rs0init, Rs1init, eta0init, eta1init, G, T, VocSTC, IscSTC, VmpSTC, ImpSTC, Ns,</text:p>
      <text:p text:style-name="P2"><text:s/>* <text:s text:c="7"/>etad, alphaSC, betaOc, gammaMp</text:p>
      <text:p text:style-name="P2"><text:s/>* <text:s/>出力：左辺 <text:s/>*********************************************************************/</text:p>
      <text:p text:style-name="P2">void AdaptiveModel::setVars(){</text:p>
      <text:p text:style-name="P2"><text:s text:c="4"/>// printf("AdaptiveModel::setVars()$$ NRs=%d, NEta=%d\n", NRs, NEta);//////////////t</text:p>
      <text:p text:style-name="P2"><text:s text:c="4"/></text:p>
      <text:p text:style-name="P2"><text:s text:c="4"/>Rs0 = Rs0init;</text:p>
      <text:p text:style-name="P2"><text:s text:c="4"/>Rs1 = Rs1init;</text:p>
      <text:p text:style-name="P2"><text:s text:c="4"/>eta0 = eta0init;</text:p>
      <text:p text:style-name="P2"><text:s text:c="4"/>eta1 = eta1init;</text:p>
      <text:p text:style-name="P2"/>
      <text:p text:style-name="P2"><text:s text:c="4"/>GpGSTC = G/1000.0;</text:p>
      <text:p text:style-name="P2"><text:s text:c="4"/>lnGpGSTC = log(GpGSTC);</text:p>
      <text:p text:style-name="P2"><text:s text:c="4"/>TmTSTC = T - 25.0;</text:p>
      <text:p text:style-name="P2"><text:s text:c="4"/>PmaxSTC = ImpSTC*VmpSTC;</text:p>
      <text:p text:style-name="P2"><text:s text:c="4"/>Tkel = T+273.15;</text:p>
      <text:p text:style-name="P2"><text:s text:c="4"/>float kT = 1.380649E-23*Tkel;</text:p>
      <text:p text:style-name="P2"><text:s text:c="4"/>NsVt = Ns*kT/1.602176634E-19;</text:p>
      <text:p text:style-name="P2"/>
      <text:p text:style-name="P2"><text:s text:c="4"/>float Eg = 1.8516E-19 -1.12488E-22*Tkel*Tkel/(Tkel+1108.0);</text:p>
      <text:p text:style-name="P2"><text:s text:c="4"/>float Egd = -1.12488E-22*(Tkel*Tkel+2.0*Tkel*1108.0)/( (Tkel+1108.0)*(Tkel+1108.0) );</text:p>
      <text:p text:style-name="P2"><text:s text:c="4"/>W01 = 3.0/Tkel -Egd/kT +Eg/(kT*Tkel);</text:p>
      <text:p text:style-name="P2"><text:s text:c="4"/>W02 = (Eg/kT -3.0*log(Tkel))*etad;</text:p>
      <text:p text:style-name="P2"/>
      <text:p text:style-name="P2"><text:s text:c="4"/>Isc = IscSTC*GpGSTC*(1.0+alphaSc*TmTSTC);</text:p>
      <text:p text:style-name="P2"><text:s text:c="4"/>Voc = VocSTC/(1.0-deltaOc*lnGpGSTC)*(1.0+betaOc*TmTSTC);</text:p>
      <text:p text:style-name="P2"><text:s text:c="4"/>Vmp = VmpSTC*( 1.0/(1.0-deltaOc*lnGpGSTC) +betaOc*TmTSTC );</text:p>
      <text:p text:style-name="P2"><text:s text:c="4"/>float Pmax = PmaxSTC*GpGSTC/(1.0-deltaMp*lnGpGSTC)*(1.0+gammaMp*TmTSTC);</text:p>
      <text:p text:style-name="P2"><text:s text:c="4"/>Imp = Pmax/Vmp;</text:p>
      <text:p text:style-name="P2">} <text:s text:c="3"/></text:p>
      <text:p text:style-name="P2"/>
      <text:p text:style-name="P2">/** A0, ,absA0, B0, absB0, eta00を計算する。コンストラクタから実行される <text:s/>2024.1.8--</text:p>
      <text:p text:style-name="P2"><text:s/>* <text:s/>入力：Voc, Isc, Vmp, Imp, NsVt, alphaSc, betaOc, gammaMp, Tkel, etad, W01, W02</text:p>
      <text:p text:style-name="P2"><text:s/>* <text:s/>出力：A0, ,absA0, B0, absB0, eta00 <text:s/>*********************************************/</text:p>
      <text:p text:style-name="P2">void AdaptiveModel::calcA0B0(){</text:p>
      <text:p text:style-name="P2"><text:s text:c="4"/>float eta = 1.0;</text:p>
      <text:p text:style-name="P2"><text:s text:c="4"/></text:p>
      <text:p text:style-name="P2"><text:s text:c="4"/>for(int count=0; count&lt;3; count++){</text:p>
      <text:p text:style-name="P2"><text:tab/>float x = Voc/(eta*NsVt);</text:p>
      <text:p text:style-name="P2"><text:tab/>float z = Vmp/(eta*NsVt);</text:p>
      <text:p text:style-name="P2"/>
      <text:p text:style-name="P2"><text:tab/>float emx = exp(-x);</text:p>
      <text:p text:style-name="P2"><text:tab/>float ezmx = exp(z-x);</text:p>
      <text:p text:style-name="P2"><text:tab/></text:p>
      <text:p text:style-name="P2"><text:tab/>float Rh = (Vmp+(Voc-Vmp)*emx-Voc*ezmx) /(Isc-Imp+Imp*emx-Isc*ezmx);</text:p>
      <text:p text:style-name="P2"><text:tab/>if(isnan(Rh)){ <text:s text:c="2"/>// Rh&lt;0は許している</text:p>
      <text:p text:style-name="P2"><text:tab/> <text:s text:c="3"/>eta += 0.1;</text:p>
      <text:p text:style-name="P2"><text:tab/> <text:s text:c="3"/>continue;</text:p>
      <text:p text:style-name="P2"><text:tab/>}</text:p>
      <text:p text:style-name="P2"><text:tab/></text:p>
      <text:p text:style-name="P2"><text:tab/>float I01 = Isc-Voc/Rh;</text:p>
      <text:p text:style-name="P2"><text:tab/></text:p>
      <text:p text:style-name="P2"><text:tab/>float one_pXm1 = emx/(1.0-emx);</text:p>
      <text:p text:style-name="P2"><text:tab/>float ZpXm1 = ezmx/(1.0-emx);</text:p>
      <text:p text:style-name="P2"/>
      <text:p text:style-name="P2"><text:tab/>float I0 = I01*one_pXm1;</text:p>
      <text:p text:style-name="P2"/>
      <text:p text:style-name="P2"><text:tab/>this-&gt;A0 = -z*I01*ZpXm1+Imp-Vmp/Rh;</text:p>
      <text:p text:style-name="P2"><text:tab/>this-&gt;absA0 = abs(A0);</text:p>
      <text:p text:style-name="P2"><text:tab/></text:p>
      <text:p text:style-name="P2"/>
      <text:p text:style-name="P2"><text:tab/>if(absA0&lt;sqrt(std::numeric_limits&lt;float&gt;::min()) || absA0&gt;sqrt(std::numeric_limits&lt;float&gt;::max())){</text:p>
      <text:p text:style-name="P2"><text:tab/> <text:s text:c="3"/>eta += 0.1;</text:p>
      <text:p text:style-name="P2"><text:soft-page-break/><text:tab/> <text:s text:c="3"/>continue;</text:p>
      <text:p text:style-name="P2"><text:tab/>}</text:p>
      <text:p text:style-name="P2"/>
      <text:p text:style-name="P2"><text:tab/>float W0 = W01/eta +W02/(eta*eta);</text:p>
      <text:p text:style-name="P2"><text:tab/>float I0d = W0*I0;</text:p>
      <text:p text:style-name="P2"/>
      <text:p text:style-name="P2"><text:tab/>// Rhdの計算</text:p>
      <text:p text:style-name="P2"><text:tab/>float W1 = Rh*( Voc/(eta*NsVt)*( etad/eta -betaOc +1.0/Tkel ) -W0 ); <text:s/>// Tkel modified 2024.1.20 !!!!!</text:p>
      <text:p text:style-name="P2"><text:tab/>float W2 = (Rh*alphaSc)*Isc +Rh*I0d -betaOc*Voc; <text:s/>// +Rh*I0d modified 2024.1.20 !!!!</text:p>
      <text:p text:style-name="P2"/>
      <text:p text:style-name="P2"><text:tab/>float Rhd = -Rh/Voc*( I01/(1.0-emx)*W1 +W2 );</text:p>
      <text:p text:style-name="P2"/>
      <text:p text:style-name="P2"><text:tab/>this-&gt;B0 = I01*ZpXm1*( Vmp/(eta*NsVt)*(etad/eta-gammaMp+1.0/Tkel) -W0)</text:p>
      <text:p text:style-name="P2"><text:tab/> <text:s text:c="3"/>+Vmp/(Rh*Rh)*Rhd +alphaSc*Isc+I0d-gammaMp*Vmp/Rh; <text:s text:c="2"/>// Tkel modified 2024.1.21 !!!!!</text:p>
      <text:p text:style-name="P2"><text:tab/>this-&gt;absB0 = abs(B0);</text:p>
      <text:p text:style-name="P2"/>
      <text:p text:style-name="P2"><text:tab/>if(absB0&lt;sqrt(std::numeric_limits&lt;float&gt;::min()) || absB0&gt;sqrt(std::numeric_limits&lt;float&gt;::max())){</text:p>
      <text:p text:style-name="P2"><text:tab/> <text:s text:c="3"/>eta += 0.1;</text:p>
      <text:p text:style-name="P2"><text:tab/> <text:s text:c="3"/>continue;</text:p>
      <text:p text:style-name="P2"><text:tab/>}</text:p>
      <text:p text:style-name="P2"/>
      <text:p text:style-name="P2"><text:tab/>this-&gt;eta00 = eta;</text:p>
      <text:p text:style-name="P2"><text:tab/></text:p>
      <text:p text:style-name="P2"><text:tab/>return; <text:s/>// ここまで来たら問題ないので、return</text:p>
      <text:p text:style-name="P2"><text:s text:c="4"/>}</text:p>
      <text:p text:style-name="P2"/>
      <text:p text:style-name="P2"><text:s text:c="4"/>std::cout &lt;&lt; "Error in adaptiveModel.calcA0B0" &lt;&lt; std::endl;</text:p>
      <text:p text:style-name="P2"><text:s text:c="4"/>exit(0);</text:p>
      <text:p text:style-name="P2">}</text:p>
      <text:p text:style-name="P2"/>
      <text:p text:style-name="P2">/** 現在のVoc, Isc, Vmp, Impに対するRs, eta, Rh, I0, Iphをメッシュサーチして設定する </text:p>
      <text:p text:style-name="P2"><text:s/>* <text:s/>入力：numThreads, numThreadsRs, numThreadsEta, Rs0, Rs1, NRs, eta0, eta1, NEta</text:p>
      <text:p text:style-name="P2"><text:s/>* <text:s/>出力：Rs0, Rs1, eta0, eta1, Rs, eta, Rh, I0, Iph</text:p>
      <text:p text:style-name="P2"><text:s/>* <text:s/>関数呼び出し：Search, calcI0, calcIph</text:p>
      <text:p text:style-name="P2"><text:s/>* <text:s/>戻り値：Emin (==INFINITYのときは、Rs, etaなどが設定されていないので注意） <text:s text:c="2"/>*****/</text:p>
      <text:p text:style-name="P2">float AdaptiveModel::calc(){</text:p>
      <text:p text:style-name="P2"><text:s text:c="4"/>if(!m_gc.haveGPU) return calcNoGPU(); <text:s/>// GPUを使わないとき</text:p>
      <text:p text:style-name="P2"><text:s text:c="4"/></text:p>
      <text:p text:style-name="P2"><text:s text:c="4"/>cudaError_t err = cudaSuccess;</text:p>
      <text:p text:style-name="P2"><text:s text:c="4"/>size_t sizeAll {numThreads*sizeof(float)}; <text:s/>// スレッドの総数に対応するfloatメモリサイズ</text:p>
      <text:p text:style-name="P2"><text:s text:c="4"/>size_t sizeRs {numThreadsRs*sizeof(float)};</text:p>
      <text:p text:style-name="P2"><text:s text:c="4"/>size_t sizeEta {numThreadsEta*sizeof(float)};</text:p>
      <text:p text:style-name="P2"/>
      <text:p text:style-name="P2"><text:s text:c="4"/>// 各スレッドのRs探索範囲の下限である配列Rs0nthの準備</text:p>
      <text:p text:style-name="P2"><text:s text:c="4"/>float *Rs0nth = (float *)malloc(sizeRs);</text:p>
      <text:p text:style-name="P2"><text:s text:c="4"/>if(Rs0nth==NULL){</text:p>
      <text:p text:style-name="P2"><text:tab/>fprintf(stderr, "Failed to allocate host vector Rs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のEta探索範囲の下限である配列eta0nthの準備</text:p>
      <text:p text:style-name="P2"><text:s text:c="4"/>float *eta0nth = (float *)malloc(sizeEta);</text:p>
      <text:p text:style-name="P2"><text:s text:c="4"/>if(eta0nth==NULL){</text:p>
      <text:p text:style-name="P2"><text:tab/>fprintf(stderr, "Failed to allocate host vector eta0nth\n"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するRsの範囲の下限</text:p>
      <text:p text:style-name="P2"><text:s text:c="4"/>float *d_Rs0nth = NULL;</text:p>
      <text:p text:style-name="P2"><text:s text:c="4"/>err = cudaMalloc((void **)&amp;d_Rs0nth, sizeRs);</text:p>
      <text:p text:style-name="P2"><text:s text:c="4"/>if (err != cudaSuccess){</text:p>
      <text:p text:style-name="P2"><text:tab/>fprintf(stderr, "Failed to allocate device vector Rs0nth (error code %s)!\n", cudaGetErrorString(err));</text:p>
      <text:p text:style-name="P2"><text:tab/>exit(EXIT_FAILURE);</text:p>
      <text:p text:style-name="P2"><text:soft-page-break/><text:s text:c="4"/>}</text:p>
      <text:p text:style-name="P2"/>
      <text:p text:style-name="P2"><text:s text:c="4"/>// 各スレッドが探索するEtaの範囲の下限</text:p>
      <text:p text:style-name="P2"><text:s text:c="4"/>float *d_eta0nth = NULL;</text:p>
      <text:p text:style-name="P2"><text:s text:c="4"/>err = cudaMalloc((void **)&amp;d_eta0nth, sizeEta);</text:p>
      <text:p text:style-name="P2"><text:s text:c="4"/>if (err != cudaSuccess){</text:p>
      <text:p text:style-name="P2"><text:tab/>fprintf(stderr, "Failed to allocate device vector Eta0nth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各スレッドが探索した最小のEに対するRsの値</text:p>
      <text:p text:style-name="P2"><text:s text:c="4"/>float *d_RsMin = NULL;</text:p>
      <text:p text:style-name="P2"><text:s text:c="4"/>err = cudaMalloc((void **)&amp;d_RsMin, sizeAll);</text:p>
      <text:p text:style-name="P2"><text:s text:c="4"/>if (err != cudaSuccess){</text:p>
      <text:p text:style-name="P2"><text:tab/>fprintf(stderr, "Failed to allocat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Rhの値、 Rh&lt;0のことがあるので</text:p>
      <text:p text:style-name="P2"><text:s text:c="4"/>float *d_RhMin = NULL;</text:p>
      <text:p text:style-name="P2"><text:s text:c="4"/>err = cudaMalloc((void **)&amp;d_RhMin, sizeAll);</text:p>
      <text:p text:style-name="P2"><text:s text:c="4"/>if (err != cudaSuccess){</text:p>
      <text:p text:style-name="P2"><text:tab/>fprintf(stderr, "Failed to allocat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に対するetaの値</text:p>
      <text:p text:style-name="P2"><text:s text:c="4"/>float *d_etaMin = NULL;</text:p>
      <text:p text:style-name="P2"><text:s text:c="4"/>err = cudaMalloc((void **)&amp;d_etaMin, sizeAll);</text:p>
      <text:p text:style-name="P2"><text:s text:c="4"/>if (err != cudaSuccess){</text:p>
      <text:p text:style-name="P2"><text:tab/>fprintf(stderr, "Failed to allocat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// 各スレッドが探索した最小のEの値</text:p>
      <text:p text:style-name="P2"><text:s text:c="4"/>float *d_Emin = NULL;</text:p>
      <text:p text:style-name="P2"><text:s text:c="4"/>err = cudaMalloc((void **)&amp;d_Emin, sizeAll);</text:p>
      <text:p text:style-name="P2"><text:s text:c="4"/>if (err != cudaSuccess){</text:p>
      <text:p text:style-name="P2"><text:tab/>fprintf(stderr, "Failed to allocat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float *RsMinTh = (float *)malloc(sizeAll); <text:s/>// コピー先の配列</text:p>
      <text:p text:style-name="P2"><text:s text:c="4"/>if(RsMinTh==NULL){</text:p>
      <text:p text:style-name="P2"><text:tab/>fprintf(stderr, "Failed to allocate host vector RsMinTh\n");</text:p>
      <text:p text:style-name="P2"><text:tab/>exit(EXIT_FAILURE);</text:p>
      <text:p text:style-name="P2"><text:s text:c="4"/>}</text:p>
      <text:p text:style-name="P2"><text:tab/></text:p>
      <text:p text:style-name="P2"><text:s text:c="4"/>float *RhMinTh = (float *)malloc(sizeAll); <text:s/>// コピー先の配列////////////////////t</text:p>
      <text:p text:style-name="P2"><text:s text:c="4"/>if(RhMinTh==NULL){</text:p>
      <text:p text:style-name="P2"><text:tab/>fprintf(stderr, "Failed to allocate host vector Rh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*etaMinTh = (float *)malloc(sizeAll); <text:s/>// コピー先の配列</text:p>
      <text:p text:style-name="P2"><text:s text:c="4"/>if(etaMinTh==NULL){</text:p>
      <text:p text:style-name="P2"><text:tab/>fprintf(stderr, "Failed to allocate host vector etaMinTh\n");</text:p>
      <text:p text:style-name="P2"><text:tab/>exit(EXIT_FAILURE);</text:p>
      <text:p text:style-name="P2"><text:s text:c="4"/>}</text:p>
      <text:p text:style-name="P2"><text:tab/></text:p>
      <text:p text:style-name="P2"><text:soft-page-break/><text:s text:c="4"/>float *EminTh = (float *)malloc(sizeAll); <text:s/>// コピー先の配列</text:p>
      <text:p text:style-name="P2"><text:s text:c="4"/>if(EminTh==NULL){</text:p>
      <text:p text:style-name="P2"><text:tab/>fprintf(stderr, "Failed to allocate host vector EminTh\n");</text:p>
      <text:p text:style-name="P2"><text:tab/>exit(EXIT_FAILURE);</text:p>
      <text:p text:style-name="P2"><text:s text:c="4"/>}</text:p>
      <text:p text:style-name="P2"><text:s text:c="2"/>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Rs0nth[0] = Rs0;</text:p>
      <text:p text:style-name="P2"><text:tab/>float knRs = exp( log(Rs1/Rs0)*nRs/(NRs-1) );</text:p>
      <text:p text:style-name="P2"/>
      <text:p text:style-name="P2"><text:tab/>for(int n=1; n&lt;numThreadsRs; n++){</text:p>
      <text:p text:style-name="P2"><text:tab/> <text:s text:c="3"/>Rs0nth[n] = Rs0nth[n-1]*knRs;</text:p>
      <text:p text:style-name="P2"><text:tab/>}</text:p>
      <text:p text:style-name="P2"><text:tab/></text:p>
      <text:p text:style-name="P2"><text:tab/>eta0nth[0] = eta0;</text:p>
      <text:p text:style-name="P2"><text:tab/>float dnEta = dEta*nEta;</text:p>
      <text:p text:style-name="P2"/>
      <text:p text:style-name="P2"><text:tab/>for(int n=1; n&lt;numThreadsEta; n++){</text:p>
      <text:p text:style-name="P2"><text:tab/> <text:s text:c="3"/>eta0nth[n] = eta0nth[n-1]+dnEta;</text:p>
      <text:p text:style-name="P2"><text:tab/>}</text:p>
      <text:p text:style-name="P2"/>
      <text:p text:style-name="P2"><text:tab/>// Rs探索範囲の下限である配列Rs0nthのGPUへのコピー</text:p>
      <text:p text:style-name="P2"><text:tab/>err = cudaMemcpy(d_Rs0nth, Rs0nth, sizeRs, cudaMemcpyHostToDevice);</text:p>
      <text:p text:style-name="P2"><text:tab/>if (err != cudaSuccess){</text:p>
      <text:p text:style-name="P2"><text:tab/> <text:s text:c="3"/>fprintf(stderr, "Failed to copy vector Rs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Eta探索範囲の下限である配列Eta0nthのGPUへのコピー</text:p>
      <text:p text:style-name="P2"><text:tab/>err = cudaMemcpy(d_eta0nth, eta0nth, sizeEta, cudaMemcpyHostToDevice);</text:p>
      <text:p text:style-name="P2"><text:tab/>if (err != cudaSuccess){</text:p>
      <text:p text:style-name="P2"><text:tab/> <text:s text:c="3"/>fprintf(stderr, "Failed to copy vector eta0nth from host to device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GPUカーネルの実行</text:p>
      <text:p text:style-name="P2"><text:tab/>Search&lt;&lt;&lt;numBlocks, threadsPerBlock&gt;&gt;&gt;(d_Rs0nth, d_eta0nth,</text:p>
      <text:p text:style-name="P2"><text:tab/><text:tab/><text:tab/><text:tab/><text:tab/> <text:s text:c="6"/>d_RsMin, d_RhMin, d_etaMin, d_Emin,</text:p>
      <text:p text:style-name="P2"><text:tab/><text:tab/><text:tab/><text:tab/><text:tab/> <text:s text:c="6"/>Isc, Voc, Imp, Vmp,</text:p>
      <text:p text:style-name="P2"><text:tab/><text:tab/><text:tab/><text:tab/><text:tab/> <text:s text:c="6"/>alphaSc, betaOc, gammaMp,</text:p>
      <text:p text:style-name="P2"><text:tab/><text:tab/><text:tab/><text:tab/><text:tab/> <text:s text:c="6"/>NsVt, W01, W02, etad, 1.0/Tkel,</text:p>
      <text:p text:style-name="P2"><text:tab/><text:tab/><text:tab/><text:tab/><text:tab/> <text:s text:c="6"/>kRs, dEta, nRs, nEta, absA0, absB0);</text:p>
      <text:p text:style-name="P2"><text:tab/>err = cudaGetLastError();</text:p>
      <text:p text:style-name="P2"/>
      <text:p text:style-name="P2"><text:tab/>if (err != cudaSuccess){</text:p>
      <text:p text:style-name="P2"><text:tab/> <text:s text:c="3"/>fprintf(stderr, "Failed to launch CUDA kernel (error code %s)!\n", cudaGetErrorString(err));</text:p>
      <text:p text:style-name="P2"><text:tab/> <text:s text:c="3"/>exit(EXIT_FAILURE);</text:p>
      <text:p text:style-name="P2"><text:tab/>}else{</text:p>
      <text:p text:style-name="P2"><text:tab/> <text:s text:c="3"/>// fprintf(stderr, "# Succeeded to launch CUDA kernel (success code: %s)!\n", cudaGetErrorString(err));/////////////////t</text:p>
      <text:p text:style-name="P2"><text:tab/>} <text:s text:c="3"/></text:p>
      <text:p text:style-name="P2"/>
      <text:p text:style-name="P2"><text:tab/>// 探索されたRsの値のホストへのコピー</text:p>
      <text:p text:style-name="P2"><text:tab/>err = cudaMemcpy(RsMinTh, d_RsMin, sizeAll, cudaMemcpyDeviceToHost);</text:p>
      <text:p text:style-name="P2"><text:tab/>if (err != cudaSuccess){</text:p>
      <text:p text:style-name="P2"><text:tab/> <text:s text:c="3"/>fprintf(stderr, "Failed to copy vector RsMin from device to host (error code %s)!\n", cudaGetErrorString(err));</text:p>
      <text:p text:style-name="P2"><text:soft-page-break/><text:tab/> <text:s text:c="3"/>exit(EXIT_FAILURE);</text:p>
      <text:p text:style-name="P2"><text:tab/>}</text:p>
      <text:p text:style-name="P2"><text:s text:c="2"/></text:p>
      <text:p text:style-name="P2"><text:tab/>// 探索されたRhの値のホストへのコピー <text:s/>///////////////////t</text:p>
      <text:p text:style-name="P2"><text:tab/>err = cudaMemcpy(RhMinTh, d_RhMin, sizeAll, cudaMemcpyDeviceToHost);</text:p>
      <text:p text:style-name="P2"><text:tab/>if (err != cudaSuccess){</text:p>
      <text:p text:style-name="P2"><text:tab/> <text:s text:c="3"/>fprintf(stderr, "Failed to copy vector Rh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taの値のホストへのコピー</text:p>
      <text:p text:style-name="P2"><text:tab/>err = cudaMemcpy(etaMinTh, d_etaMin, sizeAll, cudaMemcpyDeviceToHost);</text:p>
      <text:p text:style-name="P2"><text:tab/>if (err != cudaSuccess){</text:p>
      <text:p text:style-name="P2"><text:tab/> <text:s text:c="3"/>fprintf(stderr, "Failed to copy vector etaMin from device to host (error code %s)!\n", cudaGetErrorString(err));</text:p>
      <text:p text:style-name="P2"><text:tab/> <text:s text:c="3"/>exit(EXIT_FAILURE);</text:p>
      <text:p text:style-name="P2"><text:tab/>}</text:p>
      <text:p text:style-name="P2"><text:s text:c="2"/></text:p>
      <text:p text:style-name="P2"><text:tab/>// 探索されたEminの値のホストへのコピー</text:p>
      <text:p text:style-name="P2"><text:tab/>err = cudaMemcpy(EminTh, d_Emin, sizeAll, cudaMemcpyDeviceToHost);</text:p>
      <text:p text:style-name="P2"><text:tab/>if (err != cudaSuccess){</text:p>
      <text:p text:style-name="P2"><text:tab/> <text:s text:c="3"/>fprintf(stderr, "Failed to copy vector Emin from device to host (error code %s)!\n", cudaGetErrorString(err));</text:p>
      <text:p text:style-name="P2"><text:tab/> <text:s text:c="3"/>exit(EXIT_FAILURE);</text:p>
      <text:p text:style-name="P2"><text:tab/>}</text:p>
      <text:p text:style-name="P2"/>
      <text:p text:style-name="P2"><text:tab/>// 最小値（最適値）の決定</text:p>
      <text:p text:style-name="P2"><text:tab/>Emin = INFINITY;</text:p>
      <text:p text:style-name="P2"><text:tab/>for(int nth=0; nth&lt;numThreads; nth++){</text:p>
      <text:p text:style-name="P2"><text:tab/> <text:s text:c="3"/>if(EminTh[nth] &lt; Emin){</text:p>
      <text:p text:style-name="P2"><text:tab/><text:tab/>this-&gt;Rs = RsMinTh[nth];</text:p>
      <text:p text:style-name="P2"><text:tab/><text:tab/>this-&gt;eta = etaMinTh[nth];</text:p>
      <text:p text:style-name="P2"><text:tab/><text:tab/>this-&gt;Rh = RhMinTh[nth];//////////////////////t</text:p>
      <text:p text:style-name="P2"><text:tab/><text:tab/>Emin = EminTh[nth];</text:p>
      <text:p text:style-name="P2"><text:tab/> <text:s text:c="3"/>}</text:p>
      <text:p text:style-name="P2"><text:tab/>}</text:p>
      <text:p text:style-name="P2"/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// std::cout &lt;&lt; "AdaptiveModel::calc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// printf("New smaller <text:s/>Rs0=%g, Rs1=%g\n", Rs0, Rs1);////////////////t</text:p>
      <text:p text:style-name="P2"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// printf("New larger Rs0=%g, Rs1=%g\n", Rs0, Rs1);////////////////t</text:p>
      <text:p text:style-name="P2"><text:tab/> <text:s text:c="3"/>// }else if(eta &lt;= eta0+1.5*d){</text:p>
      <text:p text:style-name="P2"><text:tab/> <text:s text:c="3"/>// <text:s text:c="2"/>float eee =eta0;</text:p>
      <text:p text:style-name="P2"><text:tab/> <text:s text:c="3"/>// <text:s text:c="2"/>eta0 *= 0.1;</text:p>
      <text:p text:style-name="P2"><text:tab/> <text:s text:c="3"/>// <text:s text:c="2"/>eta1 = eee +d;</text:p>
      <text:p text:style-name="P2"><text:tab/> <text:s text:c="3"/>// <text:s text:c="2"/>printf("New smaller <text:s/>eta0=%g, eta1=%g\n", eta0, eta1);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soft-page-break/><text:tab/> <text:s text:c="3"/>eta1 = 2.0*eta1 -eee -dEta;</text:p>
      <text:p text:style-name="P2"><text:tab/> <text:s text:c="3"/>// 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///////////////////t GPUで計算したRhを使うことにする。非常に微妙で、わずかの数値誤差で大きく変わることがある ex. G=770.4000244, T=57.41066742</text:p>
      <text:p text:style-name="P2"><text:s text:c="4"/>I0 = calcI0(this-&gt;Rs, this-&gt;eta, Rh);</text:p>
      <text:p text:style-name="P2"><text:s text:c="4"/>Iph = calcIph(this-&gt;Rs, this-&gt;eta, Rh);</text:p>
      <text:p text:style-name="P2"/>
      <text:p text:style-name="P2"><text:s text:c="4"/>// mallocで確保したメモリの解放</text:p>
      <text:p text:style-name="P2"><text:s text:c="4"/>free(Rs0nth);</text:p>
      <text:p text:style-name="P2"><text:s text:c="4"/>free(eta0nth);</text:p>
      <text:p text:style-name="P2"><text:s text:c="4"/>free(RsMinTh);</text:p>
      <text:p text:style-name="P2"><text:s text:c="4"/>free(RhMinTh);/////////////////t</text:p>
      <text:p text:style-name="P2"><text:s text:c="4"/>free(etaMinTh);</text:p>
      <text:p text:style-name="P2"><text:s text:c="4"/>free(EminTh);</text:p>
      <text:p text:style-name="P2"/>
      <text:p text:style-name="P2"><text:s text:c="4"/>err = cudaFree(d_Rs0nth);</text:p>
      <text:p text:style-name="P2"><text:s text:c="4"/>if (err != cudaSuccess){</text:p>
      <text:p text:style-name="P2"><text:tab/>fprintf(stderr, "Failed to free device vector Rs0nth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0nth);</text:p>
      <text:p text:style-name="P2"><text:s text:c="4"/>if (err != cudaSuccess){</text:p>
      <text:p text:style-name="P2"><text:tab/>fprintf(stderr, "Failed to free device vector eta0nth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RsMin);</text:p>
      <text:p text:style-name="P2"><text:s text:c="4"/>if (err != cudaSuccess){</text:p>
      <text:p text:style-name="P2"><text:tab/>fprintf(stderr, "Failed to free device vector Rs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RhMin);/////////////////////t</text:p>
      <text:p text:style-name="P2"><text:s text:c="4"/>if (err != cudaSuccess){</text:p>
      <text:p text:style-name="P2"><text:tab/>fprintf(stderr, "Failed to free device vector Rh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taMin);</text:p>
      <text:p text:style-name="P2"><text:s text:c="4"/>if (err != cudaSuccess){</text:p>
      <text:p text:style-name="P2"><text:tab/>fprintf(stderr, "Failed to free device vector etaMin (error code %s)!\n", cudaGetErrorString(err));</text:p>
      <text:p text:style-name="P2"><text:tab/>exit(EXIT_FAILURE);</text:p>
      <text:p text:style-name="P2"><text:s text:c="4"/>}</text:p>
      <text:p text:style-name="P2"><text:s text:c="2"/></text:p>
      <text:p text:style-name="P2"><text:s text:c="4"/>err = cudaFree(d_Emin);</text:p>
      <text:p text:style-name="P2"><text:s text:c="4"/>if (err != cudaSuccess){</text:p>
      <text:p text:style-name="P2"><text:tab/>fprintf(stderr, "Failed to free device vector Emin (error code %s)!\n", cudaGetErrorString(err));</text:p>
      <text:p text:style-name="P2"><text:tab/>exit(EXIT_FAILURE);</text:p>
      <text:p text:style-name="P2"><text:s text:c="4"/>}</text:p>
      <text:p text:style-name="P2"/>
      <text:p text:style-name="P2"><text:s text:c="4"/>// printf("Emin=%g, Rs=%g, eta=%g, Rh=%g, I0=%g, Iph=%g\n", Emin, Rs, eta, Rh, I0, Iph);/////////////////////t</text:p>
      <text:p text:style-name="P2"/>
      <text:p text:style-name="P2"><text:s text:c="4"/>return Emin;</text:p>
      <text:p text:style-name="P2">}</text:p>
      <text:p text:style-name="P2"/>
      <text:p text:style-name="P2">/************************** <text:s text:c="2"/>Kernel definition <text:s text:c="2"/>***********************************/</text:p>
      <text:p text:style-name="P2">__global__ void Search(float *d_Rs0nth, float *d_eta0nth,</text:p>
      <text:p text:style-name="P2"><text:soft-page-break/><text:tab/><text:tab/> <text:s text:c="6"/>float *d_RsMin, float *d_RhMin, float *d_etaMin, float *d_Emin,</text:p>
      <text:p text:style-name="P2"><text:s text:c="23"/>float Isc, float Voc, float Imp, float Vmp,</text:p>
      <text:p text:style-name="P2"><text:s text:c="23"/>float alphaSc, float betaOc, float gammaMp,</text:p>
      <text:p text:style-name="P2"><text:s text:c="23"/>float NsVt, float W01, float W02,</text:p>
      <text:p text:style-name="P2"><text:tab/><text:tab/> <text:s text:c="6"/>float etad, float TInv,</text:p>
      <text:p text:style-name="P2"><text:s text:c="23"/>float kRs, float dEta, int nRs, int nEta,</text:p>
      <text:p text:style-name="P2"><text:tab/><text:tab/> <text:s text:c="6"/>float absA0, float absB0){</text:p>
      <text:p text:style-name="P2"><text:s text:c="4"/>int idx_x = blockDim.x*blockIdx.x + threadIdx.x;</text:p>
      <text:p text:style-name="P2"><text:s text:c="4"/>int idx_y = blockDim.y*blockIdx.y + threadIdx.y;</text:p>
      <text:p text:style-name="P2"><text:s text:c="4"/>int idx = idx_x*(gridDim.y*blockDim.y) + idx_y;</text:p>
      <text:p text:style-name="P2"/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RsMinVal = 0.0;</text:p>
      <text:p text:style-name="P2"><text:s text:c="4"/>float RhMinVal = 10.0; <text:s text:c="3"/>/////////////////////t</text:p>
      <text:p text:style-name="P2"><text:s text:c="4"/>float etaMinVal = 1.0; <text:s/>// 2024.2.25</text:p>
      <text:p text:style-name="P2"><text:s text:c="4"/>float EminVal = INFINITY;</text:p>
      <text:p text:style-name="P2"/>
      <text:p text:style-name="P2"><text:s text:c="4"/>float Rs = d_Rs0nth[idx_x]; <text:s/>// Global Memroy内の配列からRs探索範囲の下限を読み取る</text:p>
      <text:p text:style-name="P2"><text:s text:c="4"/>float eta = d_eta0nth[idx_y]; <text:s/>// Global Memroy内の配列からRs探索範囲の下限を読み取る</text:p>
      <text:p text:style-name="P2"><text:s text:c="4"/>for(int i=0; i&lt;nRs; i++){ // Rsのループ</text:p>
      <text:p text:style-name="P2"><text:tab/>float RsIsc = Rs*Isc;</text:p>
      <text:p text:style-name="P2"><text:tab/>float RsImp = 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or(int j=0; j&lt;nEta; j++){ // etaのループ</text:p>
      <text:p text:style-name="P2"><text:tab/> <text:s text:c="3"/></text:p>
      <text:p text:style-name="P2"><text:tab/> <text:s text:c="3"/>float etaNsVt = eta*NsVt;</text:p>
      <text:p text:style-name="P2"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tab/><text:tab/>Rh = ( ( Vmp +VocMiVmp*eyx -Voc*ezx )</text:p>
      <text:p text:style-name="P2"><text:tab/><text:tab/> <text:s text:c="6"/>/ ( IscMiImp +Imp*eyx -Isc*ezx ) ) - 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Rs;</text:p>
      <text:p text:style-name="P2"><text:tab/><text:tab/>ZpXY = ezy/(exy-1.0);</text:p>
      <text:p text:style-name="P2"><text:tab/> <text:s text:c="3"/>}else{</text:p>
      <text:p text:style-name="P2"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Rs;</text:p>
      <text:p text:style-name="P2"><text:tab/> <text:s text:c="3"/>}</text:p>
      <text:p text:style-name="P2"/>
      <text:p text:style-name="P2"><text:tab/> <text:s text:c="3"/>if( Rh&lt;=0.0 || isnan(Rh) ) continue;</text:p>
      <text:p text:style-name="P2"/>
      <text:p text:style-name="P2"><text:tab/> <text:s text:c="3"/>// I0の計算</text:p>
      <text:p text:style-name="P2"><text:tab/> <text:s text:c="3"/>// float I01 = (1.0 +Rs/Rh )*Isc -Voc/Rh;</text:p>
      <text:p text:style-name="P2"><text:tab/> <text:s text:c="3"/>float I01 = ( (Rh+Rs)*Isc -Voc )/Rh;</text:p>
      <text:p text:style-name="P2"><text:s text:c="6"/></text:p>
      <text:p text:style-name="P2"><text:tab/> <text:s text:c="3"/>float oneXY, XoneXY, XpXY;</text:p>
      <text:p text:style-name="P2"><text:soft-page-break/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 text:c="6"/></text:p>
      <text:p text:style-name="P2"><text:tab/> <text:s text:c="3"/>float I0 = I01*oneXY;</text:p>
      <text:p text:style-name="P2"><text:tab/> <text:s text:c="3"/>if( 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 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 Rh*Imp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 !isfinite(absA) ) continue;</text:p>
      <text:p text:style-name="P2"><text:s text:c="6"/></text:p>
      <text:p text:style-name="P2"><text:tab/> <text:s text:c="3"/>// I0dの計算</text:p>
      <text:p text:style-name="P2"><text:tab/> <text:s text:c="3"/>float W0 = (W01 +W02/eta)/eta;</text:p>
      <text:p text:style-name="P2"><text:tab/> <text:s text:c="3"/>float I0d = W0*I0;</text:p>
      <text:p text:style-name="P2"><text:tab/> <text:s text:c="3"/>float etadPerEta = etad/eta;</text:p>
      <text:p text:style-name="P2"/>
      <text:p text:style-name="P2"><text:tab/> <text:s text:c="3"/>// Rsdの計算</text:p>
      <text:p text:style-name="P2"><text:tab/> <text:s text:c="3"/>float Rsd = (etadPerEta -alphaSc +TInv)*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tab/> <text:s text:c="3"/>float W2 = (Rsd +(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float Iphd = ( Rsd -Rs*RhdPerRh +(Rh+Rs)*alphaSc 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/>
      <text:p text:style-name="P2"><text:soft-page-break/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 !isfinite(absB) ) continue;</text:p>
      <text:p text:style-name="P2"><text:tab/> <text:s text:c="3"/></text:p>
      <text:p text:style-name="P2"><text:tab/> <text:s text:c="3"/>// Eの計算</text:p>
      <text:p text:style-name="P2"><text:tab/> <text:s text:c="3"/>float E = absA/absA0 +absB/absB0;</text:p>
      <text:p text:style-name="P2"><text:tab/> <text:s text:c="3"/>if(E &lt; EminVal){</text:p>
      <text:p text:style-name="P2"><text:tab/><text:tab/>RsMinVal = Rs;</text:p>
      <text:p text:style-name="P2"><text:tab/><text:tab/>etaMinVal = eta;</text:p>
      <text:p text:style-name="P2"><text:tab/><text:tab/>EminVal = E;</text:p>
      <text:p text:style-name="P2"><text:tab/><text:tab/>RhMinVal = Rh;</text:p>
      <text:p text:style-name="P2"><text:tab/> <text:s text:c="3"/>}</text:p>
      <text:p text:style-name="P2"><text:tab/> <text:s text:c="3"/>eta += dEta;</text:p>
      <text:p text:style-name="P2"><text:tab/>}</text:p>
      <text:p text:style-name="P2"><text:tab/>Rs *= kRs;</text:p>
      <text:p text:style-name="P2"><text:s text:c="4"/>}</text:p>
      <text:p text:style-name="P2"/>
      <text:p text:style-name="P2"><text:s text:c="4"/>// 探索結果をGlobal Memory内の配列に出力する</text:p>
      <text:p text:style-name="P2"><text:s text:c="4"/>d_RsMin[idx] = RsMinVal;</text:p>
      <text:p text:style-name="P2"><text:s text:c="4"/>d_etaMin[idx] = etaMinVal;</text:p>
      <text:p text:style-name="P2"><text:s text:c="4"/>d_Emin[idx] = EminVal;</text:p>
      <text:p text:style-name="P2"><text:s text:c="4"/>d_RhMin[idx] = RhMinVal;</text:p>
      <text:p text:style-name="P2">}</text:p>
      <text:p text:style-name="P2"/>
      <text:p text:style-name="P2">/** Rhを計算して返す, Rh==+infもあり得ることに注意（上のSearch()でNaNと&lt;0だけ除外している)</text:p>
      <text:p text:style-name="P2"><text:s/>* <text:s/>入力：Voc, Isc, Vmp, Imp, NsVt <text:s text:c="4"/>**********************************************/</text:p>
      <text:p text:style-name="P2">float AdaptiveModel::calcRh(float Rs, float eta) const{</text:p>
      <text:p text:style-name="P2"><text:s text:c="4"/>float Rh;</text:p>
      <text:p text:style-name="P2"><text:s text:c="4"/>float etaNsVt = eta*NsVt;</text:p>
      <text:p text:style-name="P2"><text:s text:c="4"/>float x =Voc/etaNsVt, y=Rs*Isc/etaNsVt, z=(Vmp+Rs*Imp)/etaNsVt;</text:p>
      <text:p text:style-name="P2"><text:s text:c="4"/></text:p>
      <text:p text:style-name="P2"><text:s text:c="4"/>if(x&gt;=y &amp;&amp; x&gt;=z){</text:p>
      <text:p text:style-name="P2"><text:tab/>float eyx = exp(y-x);</text:p>
      <text:p text:style-name="P2"><text:tab/>float ezx = exp(z-x);</text:p>
      <text:p text:style-name="P2"><text:tab/>Rh = ( ( Vmp +(Voc-Vmp)*eyx -Voc*ezx )</text:p>
      <text:p text:style-name="P2"><text:tab/> <text:s text:c="6"/>/ ( Isc-Imp +Imp*eyx -Isc*ezx ) ) - Rs;</text:p>
      <text:p text:style-name="P2"><text:s text:c="4"/>}else if(y &gt;= z){</text:p>
      <text:p text:style-name="P2"><text:tab/>float exy = exp(x-y);</text:p>
      <text:p text:style-name="P2"><text:tab/>float ezy = exp(z-y);</text:p>
      <text:p text:style-name="P2"><text:tab/>Rh = ( ( Vmp*exy +Voc-Vmp -Voc*ezy )</text:p>
      <text:p text:style-name="P2"><text:tab/> <text:s text:c="6"/>/ ( (Isc-Imp)*exy +Imp -Isc*ezy ) ) - Rs;</text:p>
      <text:p text:style-name="P2"><text:s text:c="4"/>}else{</text:p>
      <text:p text:style-name="P2"><text:tab/>float exz = exp(x-z);</text:p>
      <text:p text:style-name="P2"><text:tab/>float eyz = exp(y-z);</text:p>
      <text:p text:style-name="P2"><text:tab/>Rh = ( ( Vmp*exz +(Voc-Vmp)*eyz -Voc )</text:p>
      <text:p text:style-name="P2"><text:tab/> <text:s text:c="6"/>/ ( (Isc-Imp)*exz +Imp*eyz -Isc ) ) - Rs;</text:p>
      <text:p text:style-name="P2"><text:s text:c="4"/>}</text:p>
      <text:p text:style-name="P2"/>
      <text:p text:style-name="P2"><text:s text:c="4"/>return Rh;</text:p>
      <text:p text:style-name="P2">}</text:p>
      <text:p text:style-name="P2"/>
      <text:p text:style-name="P2">/** I0を計算して返す <text:s text:c="2"/>**************************************************************</text:p>
      <text:p text:style-name="P2"><text:s/>* <text:s/>入力： Voc, Isc, NsVt <text:s/>**********************************************************/</text:p>
      <text:p text:style-name="P2">float AdaptiveModel::calcI0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I01 = ((Rh +Rs)*Isc -Voc)/Rh;</text:p>
      <text:p text:style-name="P2"><text:soft-page-break/><text:s text:c="6"/></text:p>
      <text:p text:style-name="P2"><text:s text:c="4"/>float oneXY;</text:p>
      <text:p text:style-name="P2"><text:s text:c="4"/>if(x&gt;=y){</text:p>
      <text:p text:style-name="P2"><text:tab/>oneXY = exp(-x)/(1.0-exp(y-x));</text:p>
      <text:p text:style-name="P2"><text:s text:c="4"/>}else{</text:p>
      <text:p text:style-name="P2"><text:tab/>oneXY = exp(-y)/(exp(x-y)-1.0);</text:p>
      <text:p text:style-name="P2"><text:s text:c="4"/>}</text:p>
      <text:p text:style-name="P2"><text:s text:c="6"/></text:p>
      <text:p text:style-name="P2"><text:s text:c="4"/>float I0 = I01*oneXY;</text:p>
      <text:p text:style-name="P2"><text:s text:c="4"/>return I0;</text:p>
      <text:p text:style-name="P2">}</text:p>
      <text:p text:style-name="P2"/>
      <text:p text:style-name="P2">/** Iphを計算して返す <text:s/>**************************************************************</text:p>
      <text:p text:style-name="P2"><text:s/>* <text:s/>入力：Voc, Isc, NsVt <text:s text:c="2"/>**********************************************************/</text:p>
      <text:p text:style-name="P2">float AdaptiveModel::calcIph(float Rs, float eta, float Rh) const{</text:p>
      <text:p text:style-name="P2"><text:s text:c="4"/>float etaNsVt = eta*NsVt;</text:p>
      <text:p text:style-name="P2"><text:s text:c="4"/>float x =Voc/etaNsVt, y=Rs*Isc/etaNsVt;</text:p>
      <text:p text:style-name="P2"><text:s text:c="2"/></text:p>
      <text:p text:style-name="P2"><text:s text:c="4"/>float XoneXY;</text:p>
      <text:p text:style-name="P2"><text:s text:c="4"/>if(x&gt;=y){</text:p>
      <text:p text:style-name="P2"><text:tab/>XoneXY = (1.0-exp(-x))/(1.0-exp(y-x));</text:p>
      <text:p text:style-name="P2"><text:s text:c="4"/>}else{</text:p>
      <text:p text:style-name="P2"><text:tab/>float exy = exp(x-y);</text:p>
      <text:p text:style-name="P2"><text:tab/>XoneXY = (exy-exp(-y))/(exy-1.0);</text:p>
      <text:p text:style-name="P2"><text:s text:c="4"/>}</text:p>
      <text:p text:style-name="P2"><text:s text:c="6"/></text:p>
      <text:p text:style-name="P2"><text:s text:c="4"/>float Iph = ( ((Rh +Rs )*Isc -Voc)*XoneXY +Voc )/Rh;</text:p>
      <text:p text:style-name="P2"><text:s text:c="4"/>return Iph;</text:p>
      <text:p text:style-name="P2">}</text:p>
      <text:p text:style-name="P2"/>
      <text:p text:style-name="P2">/** I (A)に対する電圧V (V)を計算して返す <text:s text:c="2"/>******************************************</text:p>
      <text:p text:style-name="P2"><text:s/>* <text:s/>入力：Rs, eta, Rh, I0, Iph, NsVt</text:p>
      <text:p text:style-name="P2"><text:s/>* <text:s/>関数呼び出し： LambertWhara::LambertW0haraAexp <text:s text:c="4"/>******************************/</text:p>
      <text:p text:style-name="P2">double AdaptiveModel::getV(double I) const{</text:p>
      <text:p text:style-name="P2"><text:s text:c="4"/>double bunbo = eta*NsVt; <text:s/>// 桁落ち対策 <text:s/>ノート65-10頁</text:p>
      <text:p text:style-name="P2"><text:s text:c="4"/></text:p>
      <text:p text:style-name="P2"><text:s text:c="4"/>if(std::isinf(Rh)){ <text:s/>// Rhが+infのとき 2024.3.28追加</text:p>
      <text:p text:style-name="P2"><text:tab/>if(I&gt;=(Iph+0.99*I0)) return -INFINITY;</text:p>
      <text:p text:style-name="P2"><text:tab/>return bunbo*std::log1p((Iph - I)/I0) -Rs*I;</text:p>
      <text:p text:style-name="P2"><text:s text:c="4"/>}</text:p>
      <text:p text:style-name="P2"><text:tab/></text:p>
      <text:p text:style-name="P2"><text:s text:c="4"/>double a = Rh*I0/bunbo;</text:p>
      <text:p text:style-name="P2"><text:s text:c="4"/>double x = a*( (Iph - I)/I0 +1.0 );</text:p>
      <text:p text:style-name="P2"/>
      <text:p text:style-name="P2"><text:s text:c="4"/>if(a&lt;0.0){/////////////////////t</text:p>
      <text:p text:style-name="P2"><text:tab/>// printf("AM::getV a=%g, Rh=%g, I0=%g, bunbo=%g\n", a, Rh, I0, bunbo);</text:p>
      <text:p text:style-name="P2"><text:tab/>// exit(0);</text:p>
      <text:p text:style-name="P2"><text:tab/>throw std::runtime_error("AM::getV a="+std::to_string(a)+ " Rh="+std::to_string(Rh)+" I0="+std::to_string(I0)+" bunbo="+std::to_string(bunbo));</text:p>
      <text:p text:style-name="P2"><text:s text:c="4"/>}</text:p>
      <text:p text:style-name="P2"/>
      <text:p text:style-name="P2"><text:s text:c="4"/>return <text:s/>bunbo*(x - utl::LambertW0haraAexp(a, x) ) - Rs*I;</text:p>
      <text:p text:style-name="P2">}</text:p>
      <text:p text:style-name="P2"/>
      <text:p text:style-name="P2">/** V (V)に対する電流I (A)を計算して返す <text:s text:c="2"/>******************************************</text:p>
      <text:p text:style-name="P2"><text:s/>* <text:s/>入力：Rs, eta, Rh, I0, Iph, NsVt <text:s text:c="2"/>**********************************************/</text:p>
      <text:p text:style-name="P2">double AdaptiveModel::getI(double V) const{</text:p>
      <text:p text:style-name="P2"><text:s text:c="4"/>if(std::isinf(Rh)){ <text:s/>// Rhが+infのとき 2024.3.28追加</text:p>
      <text:p text:style-name="P2"><text:tab/>double bunbo = eta*NsVt;</text:p>
      <text:p text:style-name="P2"><text:tab/>double aa = Rs*I0/bunbo;</text:p>
      <text:p text:style-name="P2"><text:tab/>double xx = ((Iph+I0)*Rs+V)/bunbo;</text:p>
      <text:p text:style-name="P2"><text:tab/></text:p>
      <text:p text:style-name="P2"><text:tab/>if(aa&lt;0.0){/////////////////////t</text:p>
      <text:p text:style-name="P2"><text:tab/> <text:s text:c="3"/>printf("AM::getI a=%g, Rs=%g, I0=%g, bunbo=%g\n", aa, Rs, I0, bunbo);</text:p>
      <text:p text:style-name="P2"><text:tab/> <text:s text:c="3"/>exit(0);</text:p>
      <text:p text:style-name="P2"><text:soft-page-break/><text:tab/>}</text:p>
      <text:p text:style-name="P2"><text:tab/></text:p>
      <text:p text:style-name="P2"><text:tab/>return -bunbo/Rs*utl::LambertW0haraAexp(aa, xx) +Iph+I0;</text:p>
      <text:p text:style-name="P2"><text:s text:c="4"/>}</text:p>
      <text:p text:style-name="P2"/>
      <text:p text:style-name="P2"><text:s text:c="4"/>double etaNsVt = eta*NsVt;</text:p>
      <text:p text:style-name="P2"><text:s text:c="4"/>double RsPlusRh = Rs+Rh;</text:p>
      <text:p text:style-name="P2"><text:s text:c="4"/>double a = Rs*Rh*I0/(etaNsVt*(RsPlusRh));</text:p>
      <text:p text:style-name="P2"><text:s text:c="4"/>double x = Rh*((Iph+I0)*Rs+V)/(etaNsVt*(RsPlusRh));</text:p>
      <text:p text:style-name="P2"><text:s text:c="4"/></text:p>
      <text:p text:style-name="P2"><text:s text:c="4"/>if(a&lt;0.0){/////////////////////t</text:p>
      <text:p text:style-name="P2"><text:tab/>printf("AM::getI a=%g, Rs=%g, Rh=%g, I0=%g, etaNsVt=%g\n", a, Rs, Rh, I0, etaNsVt);</text:p>
      <text:p text:style-name="P2"><text:tab/>exit(0);</text:p>
      <text:p text:style-name="P2"><text:s text:c="4"/>}</text:p>
      <text:p text:style-name="P2"/>
      <text:p text:style-name="P2"><text:s text:c="4"/>return -etaNsVt/Rs*utl::LambertW0haraAexp(a, x) + ((Iph+I0)*Rh-V)/(RsPlusRh);</text:p>
      <text:p text:style-name="P2">}</text:p>
      <text:p text:style-name="P2"/>
      <text:p text:style-name="P2">/** PCSデータによるパラメータ推定用 <text:s/>************************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(double GG[], double TT[]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GG[k];</text:p>
      <text:p text:style-name="P2"><text:tab/>T = TT[k];</text:p>
      <text:p text:style-name="P2"><text:tab/></text:p>
      <text:p text:style-name="P2"><text:tab/>setVars();</text:p>
      <text:p text:style-name="P2"/>
      <text:p text:style-name="P2"><text:tab/>aG[k] = G;</text:p>
      <text:p text:style-name="P2"><text:tab/>aT[k] = T;</text:p>
      <text:p text:style-name="P2"><text:tab/>aNsVt[k] = NsVt;</text:p>
      <text:p text:style-name="P2"><text:tab/>aIsc[k] = Isc;</text:p>
      <text:p text:style-name="P2"><text:tab/>aVoc[k] = Voc;</text:p>
      <text:p text:style-name="P2"><text:tab/>aImp[k] = Imp;</text:p>
      <text:p text:style-name="P2"><text:tab/>aVmp[k] = Vmp;</text:p>
      <text:p text:style-name="P2"><text:tab/>aLnGpGSTC[k] = lnGpGSTC;</text:p>
      <text:p text:style-name="P2"><text:tab/>aW01[k] = W01;</text:p>
      <text:p text:style-name="P2"><text:tab/>aW02[k] = W02;</text:p>
      <text:p text:style-name="P2"><text:tab/></text:p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 text:c="4"/>return Eret;</text:p>
      <text:p text:style-name="P2">}</text:p>
      <text:p text:style-name="P2"/>
      <text:p text:style-name="P2">/** PCSデータによるパラメータ推定用, <text:s/>StringGroup::getE用 <text:s text:c="4"/>************************</text:p>
      <text:p text:style-name="P2"><text:s/>* <text:s/>関数呼び出し：setVars, calcA0B0</text:p>
      <text:p text:style-name="P2"><text:s/>* <text:s/>関数setVarsを通して、現在の</text:p>
      <text:p text:style-name="P2"><text:soft-page-break/><text:s/>* <text:s/>入力：Rs0init, Rs1init, eta0init, eta1init, VocSTC, IscSTC, VmpSTC, ImpSTC, Ns,</text:p>
      <text:p text:style-name="P2"><text:s/>* <text:s text:c="7"/>etad, alphaSC, betaOc, gammaMp</text:p>
      <text:p text:style-name="P2"><text:s/>* <text:s/>に対する、各G=GG[0...K-1], T=TT[0,...K-1]に対する5パラメータを計算する</text:p>
      <text:p text:style-name="P2"><text:s/>* <text:s/>出力：G, T, aNsVt, aIsc, aVoc, aImp, aVmp, aRs, aEta, aRh, aI0, aIph <text:s/>***********/</text:p>
      <text:p text:style-name="P2">float AdaptiveModel::calcPCSGetE(){</text:p>
      <text:p text:style-name="P2"><text:s text:c="4"/>float Eret = 0.0;</text:p>
      <text:p text:style-name="P2"><text:s text:c="4"/></text:p>
      <text:p text:style-name="P2"><text:s text:c="4"/>for(int k=0; k&lt;GlobalConstants::K; k++){</text:p>
      <text:p text:style-name="P2"><text:tab/>G = aG[k];</text:p>
      <text:p text:style-name="P2"><text:tab/>T = aT[k];</text:p>
      <text:p text:style-name="P2"><text:tab/></text:p>
      <text:p text:style-name="P2"><text:tab/>// setVarsGetE();</text:p>
      <text:p text:style-name="P2"><text:tab/>Rs0 = Rs0init;</text:p>
      <text:p text:style-name="P2"><text:tab/>Rs1 = Rs1init;</text:p>
      <text:p text:style-name="P2"><text:tab/>eta0 = eta0init;</text:p>
      <text:p text:style-name="P2"><text:tab/>eta1 = eta1init;</text:p>
      <text:p text:style-name="P2"><text:tab/></text:p>
      <text:p text:style-name="P2"><text:tab/>GpGSTC = G/1000.0;</text:p>
      <text:p text:style-name="P2"><text:tab/>lnGpGSTC = aLnGpGSTC[k];</text:p>
      <text:p text:style-name="P2"><text:tab/>TmTSTC = T - 25.0;</text:p>
      <text:p text:style-name="P2"><text:tab/>PmaxSTC = ImpSTC*VmpSTC;</text:p>
      <text:p text:style-name="P2"><text:tab/>// Tkel = T+273.15;</text:p>
      <text:p text:style-name="P2"><text:tab/>// float kT = 1.380649E-23*Tkel;</text:p>
      <text:p text:style-name="P2"><text:tab/>NsVt = aNsVt[k];</text:p>
      <text:p text:style-name="P2"/>
      <text:p text:style-name="P2"><text:tab/>// float Eg = 1.8516E-19 -1.12488E-22*Tkel*Tkel/(Tkel+1108.0);</text:p>
      <text:p text:style-name="P2"><text:tab/>// float Egd = -1.12488E-22*(Tkel*Tkel+2.0*Tkel*1108.0)/( (Tkel+1108.0)*(Tkel+1108.0) );</text:p>
      <text:p text:style-name="P2"><text:tab/>// W01 = 3.0/Tkel -Egd/kT +Eg/(kT*Tkel);</text:p>
      <text:p text:style-name="P2"><text:tab/>// W02 = (Eg/kT -3.0*log(Tkel))*etad;</text:p>
      <text:p text:style-name="P2"><text:tab/>W01 = aW01[k];</text:p>
      <text:p text:style-name="P2"><text:tab/>W02 = aW02[k];</text:p>
      <text:p text:style-name="P2"/>
      <text:p text:style-name="P2"><text:tab/>Isc = IscSTC*GpGSTC*(1.0+alphaSc*TmTSTC);</text:p>
      <text:p text:style-name="P2"><text:tab/>Voc = VocSTC/(1.0-deltaOc*lnGpGSTC)*(1.0+betaOc*TmTSTC);</text:p>
      <text:p text:style-name="P2"><text:tab/>Vmp = VmpSTC*( 1.0/(1.0-deltaOc*lnGpGSTC) +betaOc*TmTSTC );</text:p>
      <text:p text:style-name="P2"><text:tab/>float Pmax = PmaxSTC*GpGSTC/(1.0-deltaMp*lnGpGSTC)*(1.0+gammaMp*TmTSTC);</text:p>
      <text:p text:style-name="P2"><text:tab/>Imp = Pmax/Vmp;</text:p>
      <text:p text:style-name="P2"/>
      <text:p text:style-name="P2"><text:tab/>calcA0B0();</text:p>
      <text:p text:style-name="P2"/>
      <text:p text:style-name="P2"><text:tab/>// 現在のG,Tに対する５パラメータがセットされる</text:p>
      <text:p text:style-name="P2"><text:tab/>float Emin = calc();</text:p>
      <text:p text:style-name="P2"><text:tab/>if(Emin == INFINITY) return Emin;</text:p>
      <text:p text:style-name="P2"><text:tab/>else if(Eret &lt; Emin) Eret = Emin;</text:p>
      <text:p text:style-name="P2"/>
      <text:p text:style-name="P2"><text:tab/>aRs[k] = Rs;</text:p>
      <text:p text:style-name="P2"><text:tab/>aEta[k] = eta;</text:p>
      <text:p text:style-name="P2"><text:tab/>aRh[k] = Rh;</text:p>
      <text:p text:style-name="P2"><text:tab/>aI0[k] = I0;</text:p>
      <text:p text:style-name="P2"><text:tab/>aIph[k] = Iph;</text:p>
      <text:p text:style-name="P2"><text:s text:c="4"/>}</text:p>
      <text:p text:style-name="P2"/>
      <text:p text:style-name="P2"><text:s text:c="4"/>return Eret;</text:p>
      <text:p text:style-name="P2">}</text:p>
      <text:p text:style-name="P2"/>
      <text:p text:style-name="P2">/** 時点kに対する、getV, getIの準備をする <text:s text:c="3"/>*****************************************</text:p>
      <text:p text:style-name="P2"><text:s/>* <text:s/>入力： aRs[k], aEta[k], aRh[k], aI0[k], aIph[k], aNsVt[k]</text:p>
      <text:p text:style-name="P2"><text:s/>* <text:s/>出力： Rs, eta, Rh, I0, Iph, NsVt <text:s text:c="6"/>*****************************************/</text:p>
      <text:p text:style-name="P2">void AdaptiveModel::getVIjunbi(int k){</text:p>
      <text:p text:style-name="P2"><text:s text:c="4"/>Rs = aRs[k];</text:p>
      <text:p text:style-name="P2"><text:s text:c="4"/>eta = aEta[k];</text:p>
      <text:p text:style-name="P2"><text:s text:c="4"/>Rh = aRh[k];</text:p>
      <text:p text:style-name="P2"><text:s text:c="4"/>I0 = aI0[k];</text:p>
      <text:p text:style-name="P2"><text:s text:c="4"/>Iph = aIph[k];</text:p>
      <text:p text:style-name="P2"><text:s text:c="4"/>NsVt = aNsVt[k];</text:p>
      <text:p text:style-name="P2"><text:soft-page-break/>}</text:p>
      <text:p text:style-name="P2"/>
      <text:p text:style-name="P2">/** 現在のVoc, Isc, Vmp, Impに対するRs, eta, Rh, I0, Iphをメッシュサーチして設定する </text:p>
      <text:p text:style-name="P2"><text:s/>* <text:s/>入力：Rs0, Rs1, NRs, eta0, eta1, NEta</text:p>
      <text:p text:style-name="P2"><text:s/>* <text:s/>出力：Rs0, Rs1, eta0, eta1, I0, Iph</text:p>
      <text:p text:style-name="P2"><text:s/>* <text:s/>関数呼び出し：SearchNoGPU, calcI0, calcIph <text:s/>*************************************/</text:p>
      <text:p text:style-name="P2">float AdaptiveModel::calcNoGPU(){</text:p>
      <text:p text:style-name="P2"><text:s text:c="4"/>printf("calcNoGPU\n");///////////////t</text:p>
      <text:p text:style-name="P2"><text:s text:c="4"/>float Emin;</text:p>
      <text:p text:style-name="P2"><text:s text:c="2"/></text:p>
      <text:p text:style-name="P2"><text:s text:c="4"/>for(int count=0; count&lt;3; count++){ <text:s/>// 探索範囲変更のループ</text:p>
      <text:p text:style-name="P2"><text:s text:c="4"/></text:p>
      <text:p text:style-name="P2"><text:tab/>float kRs = exp( log(Rs1/Rs0) /(NRs-1) );</text:p>
      <text:p text:style-name="P2"><text:tab/>float dEta = (eta1-eta0)/(NEta-1);</text:p>
      <text:p text:style-name="P2"/>
      <text:p text:style-name="P2"><text:tab/>// GPUを使わないサーチの実行</text:p>
      <text:p text:style-name="P2"><text:tab/>Emin = SearchNoGPU(kRs, dEta);</text:p>
      <text:p text:style-name="P2"><text:tab/></text:p>
      <text:p text:style-name="P2"><text:tab/>// 2024.3.20</text:p>
      <text:p text:style-name="P2"><text:tab/>// ひとつもRh&gt;=0のような条件を満たすRs, etaがなかったら、探索を終わる</text:p>
      <text:p text:style-name="P2"><text:tab/>if(Emin == INFINITY){</text:p>
      <text:p text:style-name="P2"><text:tab/> <text:s text:c="3"/>std::cout &lt;&lt; "AdaptiveModel::calcNoGPU()$$ no suitable Rs and eta, Emin==INFINITY\n";///////////////////t</text:p>
      <text:p text:style-name="P2"><text:tab/> <text:s text:c="3"/>break;</text:p>
      <text:p text:style-name="P2"><text:tab/>}</text:p>
      <text:p text:style-name="P2"><text:tab/></text:p>
      <text:p text:style-name="P2"><text:tab/>printf("count=%d, Emin=%g, Rs=%g, eta=%g\n", count, Emin, Rs, eta);/////////////////////t</text:p>
      <text:p text:style-name="P2"/>
      <text:p text:style-name="P2"><text:tab/>// 最適値が範囲の端から2番目以内だったら、探索範囲を取り直して再探索。</text:p>
      <text:p text:style-name="P2"><text:tab/>if(this-&gt;Rs &lt;= Rs0*pow(kRs, 1.5)){</text:p>
      <text:p text:style-name="P2"><text:tab/> <text:s text:c="3"/>float a = 1.05*Rs0/Rs1;</text:p>
      <text:p text:style-name="P2"><text:tab/> <text:s text:c="3"/>Rs0 *= a;</text:p>
      <text:p text:style-name="P2"><text:tab/> <text:s text:c="3"/>Rs1 *= a;</text:p>
      <text:p text:style-name="P2"><text:tab/> <text:s text:c="3"/>printf("New smaller <text:s/>Rs0=%g, Rs1=%g\n", Rs0, Rs1);////////////////t</text:p>
      <text:p text:style-name="P2"><text:tab/>}else if(Rs1/pow(kRs, 1.5) &lt;= this-&gt;Rs){</text:p>
      <text:p text:style-name="P2"><text:tab/> <text:s text:c="3"/>float b = 0.95*Rs1/Rs0;</text:p>
      <text:p text:style-name="P2"><text:tab/> <text:s text:c="3"/>Rs0 *= b;</text:p>
      <text:p text:style-name="P2"><text:tab/> <text:s text:c="3"/>Rs1 *= b;</text:p>
      <text:p text:style-name="P2"><text:tab/> <text:s text:c="3"/>printf("New larger Rs0=%g, Rs1=%g\n", Rs0, Rs1);////////////////t</text:p>
      <text:p text:style-name="P2"><text:tab/>}else if(eta1-1.5*dEta &lt;= this-&gt;eta){</text:p>
      <text:p text:style-name="P2"><text:tab/> <text:s text:c="3"/>float eee = eta0;</text:p>
      <text:p text:style-name="P2"><text:tab/> <text:s text:c="3"/>eta0 = eta1-dEta;</text:p>
      <text:p text:style-name="P2"><text:tab/> <text:s text:c="3"/>eta1 = 2.0*eta1 -eee -dEta;</text:p>
      <text:p text:style-name="P2"><text:tab/> <text:s text:c="3"/>printf("New larger <text:s/>eta0=%g, eta1=%g\n", eta0, eta1);///////////////t</text:p>
      <text:p text:style-name="P2"><text:tab/>}else{ <text:s/>// 端っこでなかったら、終わる</text:p>
      <text:p text:style-name="P2"><text:tab/> <text:s text:c="3"/>break;</text:p>
      <text:p text:style-name="P2"><text:tab/>}</text:p>
      <text:p text:style-name="P2"><text:s text:c="4"/>}</text:p>
      <text:p text:style-name="P2"><text:s text:c="2"/></text:p>
      <text:p text:style-name="P2"><text:s text:c="4"/>// パラメータRh, I0, Iphの値設定</text:p>
      <text:p text:style-name="P2"><text:s text:c="4"/>// Rh = calcRh(this-&gt;Rs, this-&gt;eta);</text:p>
      <text:p text:style-name="P2"><text:s text:c="4"/>this-&gt;I0 = calcI0(this-&gt;Rs, this-&gt;eta, this-&gt;Rh);</text:p>
      <text:p text:style-name="P2"><text:s text:c="4"/>this-&gt;Iph = calcIph(this-&gt;Rs, this-&gt;eta, this-&gt;Rh);</text:p>
      <text:p text:style-name="P2"/>
      <text:p text:style-name="P2"><text:s text:c="4"/>printf("Emin=%g, Rs=%g, eta=%g, Rh=%g, I0=%g, Iph=%g\n", Emin, Rs, eta, Rh, I0, Iph);/////////////////////t</text:p>
      <text:p text:style-name="P2"><text:s text:c="4"/></text:p>
      <text:p text:style-name="P2"><text:s text:c="4"/>return Emin;</text:p>
      <text:p text:style-name="P2">}</text:p>
      <text:p text:style-name="P2"/>
      <text:p text:style-name="P2">/** [Rs0, Rs1]x[eta0, eta1]の範囲内でEを最小にするRs, etaを探索、設定してEminを返す **</text:p>
      <text:p text:style-name="P2"><text:s/>* <text:s/>入力： Tkel, Voc, Vmp, Isc, Imp, Rs0, eta0, NRs, NEta, NsVt</text:p>
      <text:p text:style-name="P2"><text:s/>* <text:s/>出力： Rs, eta, Rh <text:s text:c="4"/>**********************************************************/</text:p>
      <text:p text:style-name="P2">float AdaptiveModel::SearchNoGPU(float kRs, float dEta){</text:p>
      <text:p text:style-name="P2"><text:s text:c="4"/>float TInv = 1.0/Tkel;</text:p>
      <text:p text:style-name="P2"><text:soft-page-break/><text:s text:c="4"/></text:p>
      <text:p text:style-name="P2"><text:s text:c="4"/>float VocMiVmp = Voc-Vmp;</text:p>
      <text:p text:style-name="P2"><text:s text:c="4"/>float IscMiImp = Isc-Imp;</text:p>
      <text:p text:style-name="P2"><text:s text:c="2"/></text:p>
      <text:p text:style-name="P2"><text:s text:c="4"/>float Emin = INFINITY;</text:p>
      <text:p text:style-name="P2"/>
      <text:p text:style-name="P2"><text:s text:c="4"/>float xRs = Rs0; <text:s/>// Global Memroy内の配列からRs探索範囲の下限を読み取る</text:p>
      <text:p text:style-name="P2"><text:s text:c="4"/>for(int i=0; i&lt;NRs; i++){ // Rsのループ</text:p>
      <text:p text:style-name="P2"><text:tab/></text:p>
      <text:p text:style-name="P2"><text:tab/>float RsIsc = xRs*Isc;</text:p>
      <text:p text:style-name="P2"><text:tab/>float RsImp = xRs*Imp;</text:p>
      <text:p text:style-name="P2"><text:tab/>float VmpPluRsImp = Vmp +RsImp;</text:p>
      <text:p text:style-name="P2"><text:tab/>float RsImpMiVmp = RsImp-Vmp;</text:p>
      <text:p text:style-name="P2"><text:s text:c="4"/></text:p>
      <text:p text:style-name="P2"><text:tab/>float xeta = eta0; <text:s/>// Global Memroy内の配列からRs探索範囲の下限を読み取る</text:p>
      <text:p text:style-name="P2"><text:tab/>for(int j=0; j&lt;NEta; j++){ // etaのループ</text:p>
      <text:p text:style-name="P2"><text:tab/> <text:s text:c="3"/></text:p>
      <text:p text:style-name="P2"><text:tab/> <text:s text:c="3"/>float etaNsVt = xeta*NsVt;</text:p>
      <text:p text:style-name="P2"><text:tab/> <text:s text:c="3"/>float x =Voc/etaNsVt, y=RsIsc/etaNsVt, z=VmpPluRsImp/etaNsVt;</text:p>
      <text:p text:style-name="P2"/>
      <text:p text:style-name="P2"><text:tab/> <text:s text:c="3"/>if(x==y) continue;</text:p>
      <text:p text:style-name="P2"><text:tab/> <text:s text:c="3"/></text:p>
      <text:p text:style-name="P2"><text:tab/> <text:s text:c="3"/>// Rhの計算</text:p>
      <text:p text:style-name="P2"><text:tab/> <text:s text:c="3"/>float Rh;</text:p>
      <text:p text:style-name="P2"><text:tab/> <text:s text:c="3"/>float ZpXY = NAN; <text:s/>// Z/(X-Y)もついでにここで計算しておく</text:p>
      <text:p text:style-name="P2"><text:tab/> <text:s text:c="3"/>float eyx, ezx, exy, ezy, exz, eyz;</text:p>
      <text:p text:style-name="P2"><text:tab/> <text:s text:c="3"/></text:p>
      <text:p text:style-name="P2"><text:tab/> <text:s text:c="3"/>if(x&gt;=y &amp;&amp; x&gt;=z){</text:p>
      <text:p text:style-name="P2"><text:tab/><text:tab/>eyx = exp(y-x);</text:p>
      <text:p text:style-name="P2"><text:tab/><text:tab/>ezx = exp(z-x);</text:p>
      <text:p text:style-name="P2"><text:tab/><text:tab/>Rh = ( ( Vmp +VocMiVmp*eyx -Voc*ezx )</text:p>
      <text:p text:style-name="P2"><text:tab/><text:tab/> <text:s text:c="6"/>/ ( IscMiImp +Imp*eyx -Isc*ezx ) ) - xRs;</text:p>
      <text:p text:style-name="P2"><text:tab/><text:tab/>ZpXY = ezx/(1.0-eyx);</text:p>
      <text:p text:style-name="P2"><text:tab/> <text:s text:c="3"/>}else if(y &gt;= z){</text:p>
      <text:p text:style-name="P2"><text:tab/><text:tab/>exy = exp(x-y);</text:p>
      <text:p text:style-name="P2"><text:tab/><text:tab/>ezy = exp(z-y);</text:p>
      <text:p text:style-name="P2"><text:tab/><text:tab/>Rh = ( ( Vmp*exy +VocMiVmp -Voc*ezy )</text:p>
      <text:p text:style-name="P2"><text:tab/><text:tab/> <text:s text:c="6"/>/ ( IscMiImp*exy +Imp -Isc*ezy ) ) - xRs;</text:p>
      <text:p text:style-name="P2"><text:tab/><text:tab/>ZpXY = ezy/(exy-1.0);</text:p>
      <text:p text:style-name="P2"><text:tab/> <text:s text:c="3"/>}else{</text:p>
      <text:p text:style-name="P2"><text:tab/><text:tab/>exz = exp(x-z);</text:p>
      <text:p text:style-name="P2"><text:tab/><text:tab/>eyz = exp(y-z);</text:p>
      <text:p text:style-name="P2"><text:tab/><text:tab/>Rh = ( ( Vmp*exz +VocMiVmp*eyz -Voc )</text:p>
      <text:p text:style-name="P2"><text:tab/><text:tab/> <text:s text:c="6"/>/ ( IscMiImp*exz +Imp*eyz -Isc ) ) - xRs;</text:p>
      <text:p text:style-name="P2"><text:tab/> <text:s text:c="3"/>}</text:p>
      <text:p text:style-name="P2"/>
      <text:p text:style-name="P2"><text:tab/> <text:s text:c="3"/>if(isnan(Rh) || Rh&lt;=0.0) continue;</text:p>
      <text:p text:style-name="P2"/>
      <text:p text:style-name="P2"><text:tab/> <text:s text:c="3"/>// I0の計算</text:p>
      <text:p text:style-name="P2"><text:tab/> <text:s text:c="3"/>float I01 = (1.0 +xRs/Rh )*Isc -Voc/Rh;</text:p>
      <text:p text:style-name="P2"><text:s text:c="6"/></text:p>
      <text:p text:style-name="P2"><text:tab/> <text:s text:c="3"/>float oneXY, XoneXY, XpXY;</text:p>
      <text:p text:style-name="P2"><text:tab/> <text:s text:c="3"/>if(x&gt;=y){</text:p>
      <text:p text:style-name="P2"><text:tab/><text:tab/>float eyx1 = exp(y-x);</text:p>
      <text:p text:style-name="P2"><text:tab/><text:tab/>float emx = exp(-x);</text:p>
      <text:p text:style-name="P2"><text:tab/><text:tab/>oneXY = emx/(1.0-eyx1);</text:p>
      <text:p text:style-name="P2"><text:tab/><text:tab/>XoneXY = (1.0-emx)/(1.0-eyx1);</text:p>
      <text:p text:style-name="P2"><text:tab/><text:tab/>XpXY = 1.0/(1.0-eyx1);</text:p>
      <text:p text:style-name="P2"><text:tab/> <text:s text:c="3"/>}else{</text:p>
      <text:p text:style-name="P2"><text:tab/><text:tab/>float exy1 = exp(x-y);</text:p>
      <text:p text:style-name="P2"><text:tab/><text:tab/>float emy = exp(-y);</text:p>
      <text:p text:style-name="P2"><text:tab/><text:tab/>oneXY = emy/(exy1-1.0);</text:p>
      <text:p text:style-name="P2"><text:tab/><text:tab/>XoneXY = (exy1-emy)/(exy1-1.0);</text:p>
      <text:p text:style-name="P2"><text:tab/><text:tab/>XpXY = exy1/(exy1-1.0);</text:p>
      <text:p text:style-name="P2"><text:tab/> <text:s text:c="3"/>}</text:p>
      <text:p text:style-name="P2"><text:soft-page-break/><text:s text:c="6"/></text:p>
      <text:p text:style-name="P2"><text:tab/> <text:s text:c="3"/>float I0 = I01*oneXY;</text:p>
      <text:p text:style-name="P2"><text:tab/> <text:s text:c="3"/>if(!isfinite(I0) || I0&lt;0.0) continue;</text:p>
      <text:p text:style-name="P2"/>
      <text:p text:style-name="P2"><text:tab/> <text:s text:c="3"/>// Iphの計算</text:p>
      <text:p text:style-name="P2"><text:tab/> <text:s text:c="3"/>float Iph = I01*XoneXY +Voc/Rh;</text:p>
      <text:p text:style-name="P2"><text:s text:c="6"/></text:p>
      <text:p text:style-name="P2"><text:tab/> <text:s text:c="3"/>if(!isfinite(Iph) || Iph&lt;0.0) continue;</text:p>
      <text:p text:style-name="P2"/>
      <text:p text:style-name="P2"><text:tab/> <text:s text:c="3"/>// absAの計算</text:p>
      <text:p text:style-name="P2"><text:tab/> <text:s text:c="3"/>float P0 = RsImpMiVmp/etaNsVt*I01;</text:p>
      <text:p text:style-name="P2"><text:tab/> <text:s text:c="3"/>float P1 = (RsImpMiVmp +Rh*Imp )/Rh;</text:p>
      <text:p text:style-name="P2"/>
      <text:p text:style-name="P2"><text:tab/> <text:s text:c="3"/>float absA, lnZpXY, XYpZ;</text:p>
      <text:p text:style-name="P2"><text:tab/> <text:s text:c="3"/>if( !isnan(ZpXY) ){ <text:s/>// zが最大、ではなかったら</text:p>
      <text:p text:style-name="P2"><text:tab/><text:tab/>absA = abs(P0*ZpXY+P1); <text:s/>// ZpXYは上のRhの計算のところで計算している、ｚが最大でない場合</text:p>
      <text:p text:style-name="P2"><text:tab/> <text:s text:c="3"/>}else{ <text:s/>// ｚが最大の場合</text:p>
      <text:p text:style-name="P2"><text:tab/><text:tab/>if(x &gt; y) lnZpXY = -log(exz-eyz);</text:p>
      <text:p text:style-name="P2"><text:tab/><text:tab/>else lnZpXY = -log(eyz-exz);</text:p>
      <text:p text:style-name="P2"/>
      <text:p text:style-name="P2"><text:tab/><text:tab/>XYpZ = exz-eyz;</text:p>
      <text:p text:style-name="P2"/>
      <text:p text:style-name="P2"><text:tab/><text:tab/>float Atilder = lnZpXY +log( abs(P0 +P1*XYpZ) +abs(XYpZ) );</text:p>
      <text:p text:style-name="P2"><text:tab/><text:tab/>absA = exp(Atilder)-1.0;</text:p>
      <text:p text:style-name="P2"><text:tab/> <text:s text:c="3"/>}</text:p>
      <text:p text:style-name="P2"><text:tab/> <text:s text:c="3"/></text:p>
      <text:p text:style-name="P2"><text:tab/> <text:s text:c="3"/>if(!isfinite(absA)) continue;</text:p>
      <text:p text:style-name="P2"><text:s text:c="6"/></text:p>
      <text:p text:style-name="P2"><text:tab/> <text:s text:c="3"/>// I0dの計算</text:p>
      <text:p text:style-name="P2"><text:tab/> <text:s text:c="3"/>float W0 = (W01 +W02/xeta)/xeta;</text:p>
      <text:p text:style-name="P2"><text:tab/> <text:s text:c="3"/>float I0d = W0*I0;</text:p>
      <text:p text:style-name="P2"><text:tab/> <text:s text:c="3"/>float etadPerEta = etad/xeta;</text:p>
      <text:p text:style-name="P2"/>
      <text:p text:style-name="P2"><text:tab/> <text:s text:c="3"/>// Rsdの計算</text:p>
      <text:p text:style-name="P2"><text:tab/> <text:s text:c="3"/>float Rsd = (etadPerEta -alphaSc +TInv)*xRs +etaNsVt/Isc*(exp(-y)-1.0)*W0;</text:p>
      <text:p text:style-name="P2"/>
      <text:p text:style-name="P2"><text:tab/> <text:s text:c="3"/>// Rhdの計算</text:p>
      <text:p text:style-name="P2"><text:tab/> <text:s text:c="3"/>float W1 = Rh*( Voc/etaNsVt*( etadPerEta -betaOc +TInv ) -W0 );</text:p>
      <text:p text:style-name="P2"><text:tab/> <text:s text:c="3"/>float W2 = (Rsd +(xRs+Rh)*alphaSc)*Isc +Rh*I0d -betaOc*Voc; <text:s/>// +Rh*I0d modified 2024.1.21</text:p>
      <text:p text:style-name="P2"/>
      <text:p text:style-name="P2"><text:tab/> <text:s text:c="3"/>float RhdPerRh = ( I01*XpXY*W1 +W2 )/(RsIsc-Voc);</text:p>
      <text:p text:style-name="P2"/>
      <text:p text:style-name="P2"><text:tab/> <text:s text:c="3"/>// Iphdの計算</text:p>
      <text:p text:style-name="P2"><text:tab/> <text:s text:c="3"/>// float Iphd = Isc/Rh*Rsd -RsIsc/(Rh*Rh)*Rhd +(1.0+xRs/Rh)*alphaSc*Isc;</text:p>
      <text:p text:style-name="P2"><text:tab/> <text:s text:c="3"/>float Iphd = (Rsd -xRs*RhdPerRh +(xRs+Rh)*alphaSc)*Isc/Rh;</text:p>
      <text:p text:style-name="P2"/>
      <text:p text:style-name="P2"><text:tab/> <text:s text:c="3"/>// absBの計算</text:p>
      <text:p text:style-name="P2"><text:tab/> <text:s text:c="3"/>float xxx = -Imp*Rsd -gammaMp*Vmp;</text:p>
      <text:p text:style-name="P2"><text:tab/> <text:s text:c="3"/>float W3 = I01*( ( xxx +VmpPluRsImp*(etadPerEta +TInv) )/etaNsVt -W0 );</text:p>
      <text:p text:style-name="P2"><text:tab/> <text:s text:c="3"/>float W4 = ( xxx +VmpPluRsImp*RhdPerRh )/Rh +Iphd +I0d;</text:p>
      <text:p text:style-name="P2"/>
      <text:p text:style-name="P2"><text:tab/> <text:s text:c="3"/>float absB;</text:p>
      <text:p text:style-name="P2"><text:tab/> <text:s text:c="3"/>if( !isnan(ZpXY) ){ <text:s/>// zが最大、ではなかったら</text:p>
      <text:p text:style-name="P2"><text:tab/><text:tab/>absB = abs(ZpXY*W3 +W4); <text:s text:c="2"/>// ZpXYはｚが最大でないときは、Rhの計算のところで求めている</text:p>
      <text:p text:style-name="P2"><text:tab/> <text:s text:c="3"/>}else{ <text:s/>// ｚが最大のとき、このときlnZpXY, XYpZはAtilderのところで計算している</text:p>
      <text:p text:style-name="P2"><text:tab/><text:tab/>float Btilder = lnZpXY +log( abs(W3+W4*XYpZ)+abs(XYpZ) );</text:p>
      <text:p text:style-name="P2"><text:tab/><text:tab/>absB = exp(Btilder)-1.0;</text:p>
      <text:p text:style-name="P2"><text:tab/> <text:s text:c="3"/>}</text:p>
      <text:p text:style-name="P2"/>
      <text:p text:style-name="P2"><text:tab/> <text:s text:c="3"/>if(!isfinite(absB)) continue;</text:p>
      <text:p text:style-name="P2"><text:tab/> <text:s text:c="3"/></text:p>
      <text:p text:style-name="P2"><text:tab/> <text:s text:c="3"/>// Eの計算</text:p>
      <text:p text:style-name="P2"><text:soft-page-break/><text:tab/> <text:s text:c="3"/>float E = absA/absA0 +absB/absB0;</text:p>
      <text:p text:style-name="P2"><text:tab/> <text:s text:c="3"/>if(E &lt; Emin){</text:p>
      <text:p text:style-name="P2"><text:tab/><text:tab/>this-&gt;Rs = xRs;</text:p>
      <text:p text:style-name="P2"><text:tab/><text:tab/>this-&gt;eta = xeta;</text:p>
      <text:p text:style-name="P2"><text:tab/><text:tab/>this-&gt;Rh = Rh;</text:p>
      <text:p text:style-name="P2"><text:tab/><text:tab/>Emin = E;</text:p>
      <text:p text:style-name="P2"><text:tab/> <text:s text:c="3"/>}</text:p>
      <text:p text:style-name="P2"><text:tab/> <text:s text:c="3"/>xeta += dEta;</text:p>
      <text:p text:style-name="P2"><text:tab/>}</text:p>
      <text:p text:style-name="P2"><text:tab/>xRs *= kRs;</text:p>
      <text:p text:style-name="P2"><text:s text:c="4"/>}</text:p>
      <text:p text:style-name="P2"><text:s text:c="4"/></text:p>
      <text:p text:style-name="P2"><text:s text:c="4"/>return Emin;</text:p>
      <text:p text:style-name="P2">}</text:p>
      <text:p text:style-name="P2"/>
      <text:p text:style-name="P2">/****************** <text:s text:c="3"/>*************************************************************/</text:p>
      <text:p text:style-name="P2">void AdaptiveModel::set5params(double Rss, double etaa, double Rhh, double I00, double Iphh){</text:p>
      <text:p text:style-name="P2"><text:s text:c="4"/>Rs = Rss;</text:p>
      <text:p text:style-name="P2"><text:s text:c="4"/>eta = etaa;</text:p>
      <text:p text:style-name="P2"><text:s text:c="4"/>Rh = Rhh;</text:p>
      <text:p text:style-name="P2"><text:s text:c="4"/>I0 = I00;</text:p>
      <text:p text:style-name="P2"><text:s text:c="4"/>Iph = Iphh;</text:p>
      <text:p text:style-name="P2">}</text:p>
      <text:p text:style-name="P2"/>
      <text:p text:style-name="P2">/******************** <text:s text:c="4"/>**********************************************************/</text:p>
      <text:p text:style-name="P2">void AdaptiveModel::set5params(double Rss, double etaa, double Rhh, double I00, double Iphh, double NsVtt, int k){</text:p>
      <text:p text:style-name="P2"><text:s text:c="4"/>aRs[k] = Rss;</text:p>
      <text:p text:style-name="P2"><text:s text:c="4"/>aEta[k] = etaa;</text:p>
      <text:p text:style-name="P2"><text:s text:c="4"/>aRh[k] = Rhh;</text:p>
      <text:p text:style-name="P2"><text:s text:c="4"/>aI0[k] = I00;</text:p>
      <text:p text:style-name="P2"><text:s text:c="4"/>aIph[k] = Iphh;</text:p>
      <text:p text:style-name="P2"><text:s text:c="4"/>aNsVt[k] = NsVtt;</text:p>
      <text:p text:style-name="P2">}</text:p>
      <text:p text:style-name="P2"/>
      <text:p text:style-name="P2">/** STCパラメータをセットする <text:s text:c="2"/>****************************************************</text:p>
      <text:p text:style-name="P2"><text:s/>* <text:s/>出力： IscSTC, VocSTC, ImpSTC, VmpSTC <text:s text:c="5"/>*************************************/</text:p>
      <text:p text:style-name="P2">void AdaptiveModel::setSTCparams(double X[4]){</text:p>
      <text:p text:style-name="P2"><text:s text:c="4"/>IscSTC = static_cast&lt;float&gt;(X[0]);</text:p>
      <text:p text:style-name="P2"><text:s text:c="4"/>VocSTC = static_cast&lt;float&gt;(X[1]);</text:p>
      <text:p text:style-name="P2"><text:s text:c="4"/>ImpSTC = static_cast&lt;float&gt;(X[2]*IscSTC);</text:p>
      <text:p text:style-name="P2"><text:s text:c="4"/>VmpSTC = static_cast&lt;float&gt;(X[3]*VocSTC);</text:p>
      <text:p text:style-name="P2"/>
      <text:p text:style-name="P2"><text:s text:c="4"/>// printf("AdaptiveModel::setSTCparams, IscSTC=%g, VocSTC=%g, ImpSTC=%g, VmpSTC=%g\n", IscSTC, VocSTC, ImpSTC, VmpSTC);////////t</text:p>
      <text:p text:style-name="P2">}</text:p>
      <text:p text:style-name="P2">/*************************************************************************************</text:p>
      <text:p text:style-name="P2"><text:s/>* <text:s text:c="10"/>bisection.hh</text:p>
      <text:p text:style-name="P2"><text:s/>************************************************************************************/</text:p>
      <text:p text:style-name="P2">#if !defined(__BISECTION_HH)</text:p>
      <text:p text:style-name="P2">#define __BISECTION_HH</text:p>
      <text:p text:style-name="P2">#include &lt;iostream&gt;</text:p>
      <text:p text:style-name="P2">#include &lt;iomanip&gt;</text:p>
      <text:p text:style-name="P2">#include &lt;limits&gt;</text:p>
      <text:p text:style-name="P2"/>
      <text:p text:style-name="P2">template&lt;typename T&gt;</text:p>
      <text:p text:style-name="P2">class Bisection{</text:p>
      <text:p text:style-name="P2"><text:s text:c="4"/>T* p;</text:p>
      <text:p text:style-name="P2">public:</text:p>
      <text:p text:style-name="P2"><text:s text:c="4"/>Bisection(T* pp): p{pp} { };</text:p>
      <text:p text:style-name="P2"><text:s text:c="4"/></text:p>
      <text:p text:style-name="P2"><text:s text:c="4"/>/** ２分法による零点探索 <text:s/>x1 &lt; x2, <text:s/>f(x1)*f(x2)&lt;0 であること</text:p>
      <text:p text:style-name="P2"><text:s text:c="5"/>* <text:s/>fがゼロになるxを返す */</text:p>
      <text:p text:style-name="P2"><text:s text:c="4"/>double search(double x1, double x2);</text:p>
      <text:p text:style-name="P2">};</text:p>
      <text:p text:style-name="P2"><text:soft-page-break/></text:p>
      <text:p text:style-name="P2">/** ２分法による零点探索 <text:s/>x1 &lt; x2, <text:s/>f(x1)*f(x2)&lt;0 であること <text:s/>***********************</text:p>
      <text:p text:style-name="P2"><text:s/>* <text:s/>fがゼロになるxを返す <text:s text:c="2"/>**********************************************************/</text:p>
      <text:p text:style-name="P2">template&lt;typename T&gt; double Bisection&lt;T&gt;::search(double x1, double x2){</text:p>
      <text:p text:style-name="P2"><text:s text:c="4"/>// std::cout &lt;&lt; std::setprecision(20)&lt;&lt; "x1= " &lt;&lt; x1 &lt;&lt; " x2= "</text:p>
      <text:p text:style-name="P2"><text:s text:c="4"/>// <text:tab/> <text:s/>&lt;&lt; x2 &lt;&lt; " f(x1)= " &lt;&lt; p-&gt;func(x1)</text:p>
      <text:p text:style-name="P2"><text:s text:c="4"/>// <text:tab/> <text:s/>&lt;&lt; " f(x2)= " &lt;&lt; p-&gt;func(x2) &lt;&lt; std::endl;//////////</text:p>
      <text:p text:style-name="P2"><text:s text:c="4"/>double xLimit = abs(x1)&lt;abs(x2) ? 1.0E-12*abs(x2) : 1.0E-12*abs(x1);</text:p>
      <text:p text:style-name="P2"><text:tab/></text:p>
      <text:p text:style-name="P2"><text:s text:c="4"/>if(p-&gt;func(x1)&lt;0.0 &amp;&amp; p-&gt;func(x2)&gt;0.0){</text:p>
      <text:p text:style-name="P2"><text:tab/>// int count = 0;</text:p>
      <text:p text:style-name="P2"><text:tab/>while(true){</text:p>
      <text:p text:style-name="P2"><text:tab/> <text:s text:c="3"/>double xmid = (x1+x2)*0.5;</text:p>
      <text:p text:style-name="P2"><text:tab/> <text:s text:c="3"/>double fmid = p-&gt;func(xmid);</text:p>
      <text:p text:style-name="P2"><text:tab/> <text:s text:c="3"/>if(fmid &l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<text:s/>|| abs(x2-x1)&lt;1.0E-12 ) return xmid;</text:p>
      <text:p text:style-name="P2"><text:tab/> <text:s text:c="3"/>if( abs(fmid)&lt;1.0E-8 <text:s/>|| x2-x1 &lt; xLimit ) return xmid;</text:p>
      <text:p text:style-name="P2"><text:tab/><text:tab/>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std::endl;</text:p>
      <text:p text:style-name="P2"><text:tab/> <text:s text:c="3"/>// }</text:p>
      <text:p text:style-name="P2"><text:tab/> <text:s text:c="3"/>// count++;</text:p>
      <text:p text:style-name="P2"><text:tab/><text:tab/></text:p>
      <text:p text:style-name="P2"><text:tab/>}</text:p>
      <text:p text:style-name="P2"><text:s text:c="4"/>}else if(p-&gt;func(x1)&gt;0.0 &amp;&amp; p-&gt;func(x2)&lt;0.0){</text:p>
      <text:p text:style-name="P2"><text:tab/>// int count = 0;</text:p>
      <text:p text:style-name="P2"><text:tab/>while(true){</text:p>
      <text:p text:style-name="P2"><text:tab/> <text:s text:c="3"/>// double dx = x2-x1;</text:p>
      <text:p text:style-name="P2"><text:tab/> <text:s text:c="3"/>double xmid = (x1+x2)*0.5;</text:p>
      <text:p text:style-name="P2"><text:tab/> <text:s text:c="3"/>// double xmid = x1+dx/2;</text:p>
      <text:p text:style-name="P2"><text:tab/> <text:s text:c="3"/>double fmid = p-&gt;func(xmid);</text:p>
      <text:p text:style-name="P2"><text:tab/><text:tab/></text:p>
      <text:p text:style-name="P2"><text:tab/> <text:s text:c="3"/>// std::cout &lt;&lt; std::setprecision(20) &lt;&lt; "x1= " &lt;&lt; x1 &lt;&lt; " x2= " &lt;&lt; x2 &lt;&lt; " xmid= " &lt;&lt; xmid &lt;&lt; " f(xmid)= " &lt;&lt; fmid &lt;&lt; " count= " &lt;&lt; count &lt;&lt; std::endl;////////</text:p>
      <text:p text:style-name="P2"><text:tab/> <text:s text:c="3"/>// if(count &gt;=1000 &amp;&amp; count%1000==0){</text:p>
      <text:p text:style-name="P2"><text:tab/> <text:s text:c="3"/>// <text:tab/>std::cout &lt;&lt; std::setprecision(20)</text:p>
      <text:p text:style-name="P2"><text:tab/> <text:s text:c="3"/>// <text:tab/><text:tab/> <text:s/>&lt;&lt; "Bisection.search: count=" &lt;&lt; count &lt;&lt; " x1=" &lt;&lt; x1</text:p>
      <text:p text:style-name="P2"><text:tab/> <text:s text:c="3"/>// <text:tab/><text:tab/> <text:s/>&lt;&lt; " xmid=" &lt;&lt; xmid &lt;&lt; " x2=" &lt;&lt; x2</text:p>
      <text:p text:style-name="P2"><text:tab/> <text:s text:c="3"/>// <text:tab/><text:tab/> <text:s/>&lt;&lt; " fmid=" &lt;&lt; fmid &lt;&lt; " xLimit=" &lt;&lt; xLimit &lt;&lt; std::endl;</text:p>
      <text:p text:style-name="P2"><text:tab/> <text:s text:c="3"/>// <text:tab/>exit(0);//////////////t</text:p>
      <text:p text:style-name="P2"><text:tab/> <text:s text:c="3"/>// }</text:p>
      <text:p text:style-name="P2"><text:tab/><text:tab/></text:p>
      <text:p text:style-name="P2"><text:tab/> <text:s text:c="3"/>if(fmid &gt;= 0.0) x1 = xmid;</text:p>
      <text:p text:style-name="P2"><text:tab/> <text:s text:c="3"/>else x2 = xmid;</text:p>
      <text:p text:style-name="P2"><text:tab/> <text:s text:c="3"/>// if( abs(x2-x1)&lt;1.0E-12 || fmid == 0.0) return xmid;</text:p>
      <text:p text:style-name="P2"><text:tab/> <text:s text:c="3"/>// if( abs(fmid)&lt;1.0E-8 || x2-x1 &lt;1.0E-12 ) return xmid;</text:p>
      <text:p text:style-name="P2"><text:tab/> <text:s text:c="3"/>if( abs(fmid)&lt;1.0E-8 || x2-x1 &lt; xLimit ) return xmid;</text:p>
      <text:p text:style-name="P2"><text:tab/> <text:s text:c="3"/>// if( abs(fmid)&lt;1.0E-8 || dx&lt;1.0E-12 ) return xmid;</text:p>
      <text:p text:style-name="P2"><text:tab/><text:tab/></text:p>
      <text:p text:style-name="P2"><text:tab/> <text:s text:c="3"/>// count++;</text:p>
      <text:p text:style-name="P2"><text:tab/>}</text:p>
      <text:p text:style-name="P2"><text:s text:c="4"/>}else if(p-&gt;func(x1)==0.0){</text:p>
      <text:p text:style-name="P2"><text:tab/>return x1;</text:p>
      <text:p text:style-name="P2"><text:s text:c="4"/>}else if(p-&gt;func(x2)==0.0){</text:p>
      <text:p text:style-name="P2"><text:tab/>return x2;</text:p>
      <text:p text:style-name="P2"><text:s text:c="4"/>}else{</text:p>
      <text:p text:style-name="P2"><text:tab/>return std::numeric_limits&lt;double&gt;::quiet_NaN();</text:p>
      <text:p text:style-name="P2"><text:s text:c="4"/>}</text:p>
      <text:p text:style-name="P2">}</text:p>
      <text:p text:style-name="P2"/>
      <text:p text:style-name="P2"><text:soft-page-break/>#endif</text:p>
      <text:p text:style-name="P2">/*******************************************************************</text:p>
      <text:p text:style-name="P2"><text:s/>* <text:s text:c="11"/>Substring.hh</text:p>
      <text:p text:style-name="P2"><text:s/>******************************************************************/</text:p>
      <text:p text:style-name="P2">#if !defined(__SUBSTRING_HH)</text:p>
      <text:p text:style-name="P2">#define __SUBSTRING_HH</text:p>
      <text:p text:style-name="P2"/>
      <text:p text:style-name="P2">#include &lt;iostream&gt;</text:p>
      <text:p text:style-name="P2">#include "globalConstants.hh"</text:p>
      <text:p text:style-name="P2">#include "adaptiveModel.hh"</text:p>
      <text:p text:style-name="P2"/>
      <text:p text:style-name="P2">class Substring{</text:p>
      <text:p text:style-name="P2">private:</text:p>
      <text:p text:style-name="P2"><text:s text:c="4"/>GlobalConstants m_gc;</text:p>
      <text:p text:style-name="P2"><text:s text:c="4"/>AdaptiveModel m_am; <text:s/>// publicにする <text:s/>2024.6.8 やめる</text:p>
      <text:p text:style-name="P2"><text:s text:c="4"/></text:p>
      <text:p text:style-name="P2"><text:s text:c="4"/>// コンストラクタでセットされる</text:p>
      <text:p text:style-name="P2"><text:s text:c="4"/>float m_G; <text:s text:c="2"/>// W/m^2</text:p>
      <text:p text:style-name="P2"><text:s text:c="4"/>float m_T; <text:s text:c="2"/>// degC</text:p>
      <text:p text:style-name="P2"><text:s text:c="4"/>float m_Tkel;</text:p>
      <text:p text:style-name="P2"><text:s text:c="4"/>float m_kT;</text:p>
      <text:p text:style-name="P2"><text:s text:c="4"/>float m_etabVt;</text:p>
      <text:p text:style-name="P2"><text:s text:c="4"/>double m_Ib0;</text:p>
      <text:p text:style-name="P2"><text:s text:c="4"/>double m_lnIb0;</text:p>
      <text:p text:style-name="P2"/>
      <text:p text:style-name="P2"><text:s text:c="4"/>bool m_bypassDiodeOn {false};</text:p>
      <text:p text:style-name="P2"><text:s text:c="4"/></text:p>
      <text:p text:style-name="P2"><text:s text:c="4"/>double m_Ifunc; <text:s text:c="2"/>// func の bisection search 用</text:p>
      <text:p text:style-name="P2"/>
      <text:p text:style-name="P2"><text:s text:c="4"/>double m_aG[GlobalConstants::K], m_aT[GlobalConstants::K];</text:p>
      <text:p text:style-name="P2"><text:s text:c="4"/>double m_aEtabVt[GlobalConstants::K], m_aIb0[GlobalConstants::K],</text:p>
      <text:p text:style-name="P2"><text:tab/>m_aLnIb0[GlobalConstants::K];</text:p>
      <text:p text:style-name="P2"><text:s text:c="4"/></text:p>
      <text:p text:style-name="P2"><text:s text:c="4"/>bool m_aBypassDiodeOn[GlobalConstants::K];</text:p>
      <text:p text:style-name="P2">public:</text:p>
      <text:p text:style-name="P2"><text:s text:c="4"/>// Constructor</text:p>
      <text:p text:style-name="P2"><text:s text:c="4"/>Substring(GlobalConstants gcc, float GG, float TT);</text:p>
      <text:p text:style-name="P2"><text:s text:c="4"/></text:p>
      <text:p text:style-name="P2"><text:s text:c="4"/>Substring(GlobalConstants gcc, float GG, float TT,</text:p>
      <text:p text:style-name="P2"><text:tab/> <text:s text:c="5"/>float IscSTC, float VocSTC, float ImpSTC, float VmpSTC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double func(double x) const; <text:s/>// getVで使われる２分法用</text:p>
      <text:p text:style-name="P2"/>
      <text:p text:style-name="P2"><text:s text:c="4"/>bool getBypassDiodeOn() const{ return m_bypassDiodeOn; }</text:p>
      <text:p text:style-name="P2"><text:s text:c="4"/></text:p>
      <text:p text:style-name="P2"><text:s text:c="4"/>double getIb0() const{ return m_Ib0; }</text:p>
      <text:p text:style-name="P2"><text:s text:c="4"/>float getEtabVt() const{ return m_etabVt; }</text:p>
      <text:p text:style-name="P2"><text:s text:c="4"/>float getIsc() const{ return m_am.getIsc(); }</text:p>
      <text:p text:style-name="P2"/>
      <text:p text:style-name="P2"><text:s text:c="4"/>float setVars(double G[], double T[]);</text:p>
      <text:p text:style-name="P2"><text:s text:c="4"/>float setVarsGetE();</text:p>
      <text:p text:style-name="P2"><text:s text:c="4"/></text:p>
      <text:p text:style-name="P2"><text:s text:c="4"/>void getVIjunbi(int k);</text:p>
      <text:p text:style-name="P2"><text:s text:c="4"/>void getVIafter(int k);</text:p>
      <text:p text:style-name="P2"><text:s text:c="4"/></text:p>
      <text:p text:style-name="P2"><text:s text:c="4"/>double getIb0(int k) const{ return m_aIb0[k]; };</text:p>
      <text:p text:style-name="P2"><text:s text:c="4"/>double getEtabVt(int k) const{ return m_aEtabVt[k]; }</text:p>
      <text:p text:style-name="P2"><text:s text:c="4"/>float getIsc(int k) const{ return m_am.getIsc(k); }</text:p>
      <text:p text:style-name="P2"><text:s text:c="4"/></text:p>
      <text:p text:style-name="P2"><text:s text:c="4"/>bool getBypassDiodeOn(int k) const{ return m_aBypassDiodeOn[k]; }</text:p>
      <text:p text:style-name="P2"/>
      <text:p text:style-name="P2"><text:s text:c="4"/>void setAM_STCparams(double X[4]);</text:p>
      <text:p text:style-name="P2"><text:soft-page-break/>};</text:p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16"/>Substring.cu</text:p>
      <text:p text:style-name="P2"><text:s/>***********************************************************************************/</text:p>
      <text:p text:style-name="P2">#include "globalConstants.hh"</text:p>
      <text:p text:style-name="P2">#include "substring.hh"</text:p>
      <text:p text:style-name="P2">// #include "adaptiveModel.hh"</text:p>
      <text:p text:style-name="P2">#include "bisection.hh"</text:p>
      <text:p text:style-name="P2">#include &lt;cfloat&gt; <text:s/>// DBL_MAX</text:p>
      <text:p text:style-name="P2">#include &lt;stdexcept&gt;</text:p>
      <text:p text:style-name="P2">#include &lt;iostream&gt;</text:p>
      <text:p text:style-name="P2">#include &lt;string&gt;</text:p>
      <text:p text:style-name="P2"/>
      <text:p text:style-name="P2">/** Constructor <text:s text:c="4"/>****************************************************************</text:p>
      <text:p text:style-name="P2"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): m_gc{gcc}, m_am{gcc,GG,TT},</text:p>
      <text:p text:style-name="P2"><text:tab/><text:tab/><text:tab/><text:tab/><text:tab/><text:tab/><text:tab/> 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Substring::Substring$$ For datasheet values, Rs=%g, eta=%g, Rh=%g, I0=%g, Iph=%g, Emin=%g\n",</text:p>
      <text:p text:style-name="P2"><text:s text:c="4"/>// <text:tab/> <text:s text:c="2"/>m_am.getRs(),m_am.getEta(), m_am.getRh(), m_am.getI0(), m_am.getIph(), Emin);//////////t</text:p>
      <text:p text:style-name="P2">}</text:p>
      <text:p text:style-name="P2"/>
      <text:p text:style-name="P2">/** Constructor <text:s text:c="3"/>******************************************************************</text:p>
      <text:p text:style-name="P2"><text:s/>* <text:s/>出力：m_gc, m_am, m_G, m_T, m_Tkel, m_kT, m_etabVt, m_Ib0, m_lnIb0</text:p>
      <text:p text:style-name="P2"><text:s/>* <text:s/>関数呼び出し：AdaptiveModelのコンストラクター <text:s text:c="3"/>*******************************/</text:p>
      <text:p text:style-name="P2">Substring::Substring(GlobalConstants gcc, float GG, float TT,</text:p>
      <text:p text:style-name="P2"><text:tab/><text:tab/> <text:s text:c="4"/>float IscSTC, float VocSTC, float ImpSTC, float VmpSTC)</text:p>
      <text:p text:style-name="P2"><text:s text:c="4"/>: m_gc{gcc}, m_am{IscSTC, VocSTC, ImpSTC, VmpSTC,</text:p>
      <text:p text:style-name="P2"><text:tab/><text:tab/> <text:s text:c="5"/>gcc.alphaSc, gcc.betaOc, gcc.gammaMp, GG, TT, gcc.Ns_sub, gcc},</text:p>
      <text:p text:style-name="P2"><text:s text:c="6"/>m_G{GG}, m_T{TT}{</text:p>
      <text:p text:style-name="P2"><text:s text:c="4"/>m_Tkel = TT+273.15;</text:p>
      <text:p text:style-name="P2"><text:s text:c="4"/>m_kT = 1.380649E-23*m_Tkel;</text:p>
      <text:p text:style-name="P2"><text:s text:c="4"/>m_etabVt = 1.1*m_kT/1.602176634E-19;</text:p>
      <text:p text:style-name="P2"><text:s text:c="4"/>m_Ib0 = m_gc.IscSTC*(1.0+m_gc.alphaSc*(TT-25.0))/( exp(0.6/(m_etabVt))-1.0 );</text:p>
      <text:p text:style-name="P2"><text:s text:c="4"/>m_lnIb0 = log(m_Ib0);</text:p>
      <text:p text:style-name="P2"/>
      <text:p text:style-name="P2"><text:s text:c="4"/>float Emin = m_am.calc();</text:p>
      <text:p text:style-name="P2"><text:s text:c="4"/></text:p>
      <text:p text:style-name="P2"><text:s text:c="4"/>// printf("For datasheet values, Rs=%g, eta=%g, Rh=%g, I0=%g, Iph=%g, Emin=%g Substring::Substring\n",</text:p>
      <text:p text:style-name="P2"><text:s text:c="4"/>// <text:tab/> <text:s text:c="2"/>m_am.getRs(),m_am.getEta(), m_am.getRh(), m_am.getI0(), m_am.getIph(), Emin);//////////t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Ib0, m_etabVt</text:p>
      <text:p text:style-name="P2"><text:s/>* <text:s/>出力： m_bypassDiodeOn</text:p>
      <text:p text:style-name="P2"><text:s/>* <text:s/>関数呼び出し： AdaptiveModel::getI <text:s text:c="4"/>*****************************************/</text:p>
      <text:p text:style-name="P2">double Substring::getI(double V){</text:p>
      <text:p text:style-name="P2"><text:s text:c="4"/>double Ic = m_am.getI(V);</text:p>
      <text:p text:style-name="P2"><text:s text:c="4"/>double Ib = m_Ib0*( exp(-V/m_etabVt)-1.0 );</text:p>
      <text:p text:style-name="P2"><text:s text:c="4"/>if(Ib &gt; m_Ib0) m_bypassDiodeOn = true;</text:p>
      <text:p text:style-name="P2"><text:s text:c="4"/>else <text:s/>m_bypassDiodeOn = false;</text:p>
      <text:p text:style-name="P2"><text:s text:c="4"/>return Ic+Ib;</text:p>
      <text:p text:style-name="P2"><text:soft-page-break/>}</text:p>
      <text:p text:style-name="P2"/>
      <text:p text:style-name="P2">/** Calculate substring voltage V (V) for current I (A) <text:s text:c="3"/>**************************</text:p>
      <text:p text:style-name="P2"><text:s/>* <text:s/>入力： m_Ib0, m_etabVt, m_lnIb0</text:p>
      <text:p text:style-name="P2"><text:s/>* <text:s/>出力： m_bypassDiodeOn, m_Ifunc</text:p>
      <text:p text:style-name="P2"><text:s/>* <text:s/>関数呼び出し： AdaptiveModel::getI, AdaptiveModel::getV, Bisection::search, func */</text:p>
      <text:p text:style-name="P2">double Substring::getV(double I){</text:p>
      <text:p text:style-name="P2"><text:s text:c="4"/>m_bypassDiodeOn = false;</text:p>
      <text:p text:style-name="P2"><text:s text:c="4"/></text:p>
      <text:p text:style-name="P2"><text:s text:c="4"/>if(I &gt;= 0.0){</text:p>
      <text:p text:style-name="P2"><text:tab/>double V;</text:p>
      <text:p text:style-name="P2"><text:tab/>try{</text:p>
      <text:p text:style-name="P2"><text:tab/> <text:s text:c="3"/>V = m_am.getV(I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tab/></text:p>
      <text:p text:style-name="P2"><text:tab/>if(V &gt;= 0.0) return V;</text:p>
      <text:p text:style-name="P2"/>
      <text:p text:style-name="P2"><text:tab/>double Ib = m_Ib0*( exp(-V/m_etabVt)-1.0 );</text:p>
      <text:p text:style-name="P2"><text:tab/>if(Ib &lt;= m_Ib0) return V;</text:p>
      <text:p text:style-name="P2"/>
      <text:p text:style-name="P2"><text:tab/>// m_bypass diode ON</text:p>
      <text:p text:style-name="P2"><text:tab/>m_bypassDiodeOn = true;</text:p>
      <text:p text:style-name="P2"><text:tab/></text:p>
      <text:p text:style-name="P2"><text:tab/>Bisection&lt;Substring&gt; bis {this};</text:p>
      <text:p text:style-name="P2"><text:tab/>m_Ifunc = I;</text:p>
      <text:p text:style-name="P2"><text:tab/>double Ic = bis.search(0.0, I);</text:p>
      <text:p text:style-name="P2"><text:tab/>return -m_etabVt*( log(I+m_Ib0-Ic) -m_lnIb0 );</text:p>
      <text:p text:style-name="P2"><text:tab/>// return m_am.getV(Ic);</text:p>
      <text:p text:style-name="P2"><text:s text:c="4"/>}else{ <text:s/>// I &lt; 0 のとき</text:p>
      <text:p text:style-name="P2"><text:tab/>Bisection&lt;Substring&gt; bis {this};</text:p>
      <text:p text:style-name="P2"><text:tab/>m_Ifunc = I;</text:p>
      <text:p text:style-name="P2"><text:tab/>double Ic = bis.search(I, I+m_Ib0);</text:p>
      <text:p text:style-name="P2"><text:tab/>// return -m_etabVt*( log(I+m_Ib0-Ic) -m_lnIb0 ); <text:s/>// だめ。lnは減少が非常に遅いので正しい値にならない</text:p>
      <text:p text:style-name="P2"><text:tab/>double V;</text:p>
      <text:p text:style-name="P2"><text:tab/>try{</text:p>
      <text:p text:style-name="P2"><text:tab/> <text:s text:c="3"/>V = m_am.getV(Ic);</text:p>
      <text:p text:style-name="P2"><text:tab/>}catch(std::exception e){</text:p>
      <text:p text:style-name="P2"><text:tab/> <text:s text:c="3"/>std::string str {e.what()};</text:p>
      <text:p text:style-name="P2"><text:tab/> <text:s text:c="3"/>throw std::runtime_error(str+"--&gt;Substring::getV_I&gt;=0");</text:p>
      <text:p text:style-name="P2"><text:tab/>}</text:p>
      <text:p text:style-name="P2"><text:tab/>return V;</text:p>
      <text:p text:style-name="P2"><text:s text:c="4"/>}<text:tab/></text:p>
      <text:p text:style-name="P2">}</text:p>
      <text:p text:style-name="P2"/>
      <text:p text:style-name="P2">/** getVで使われる２分法用のメソッド <text:s/>**********************************************</text:p>
      <text:p text:style-name="P2"><text:s/>* <text:s/>入力： m_Ib0, m_etabVt, m_lnIb0, m_Ifunc</text:p>
      <text:p text:style-name="P2"><text:s/>* <text:s/>関数呼び出し： AdaptiveModel::getV <text:s text:c="3"/>*****************************************/</text:p>
      <text:p text:style-name="P2">double Substring::func(double Ic) const{</text:p>
      <text:p text:style-name="P2"><text:s text:c="4"/>return m_am.getV(Ic) + m_etabVt*( log(m_Ifunc+m_Ib0-Ic) - m_lnIb0 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(double GG[], double TT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s text:c="4"/>}</text:p>
      <text:p text:style-name="P2"><text:soft-page-break/><text:s text:c="4"/></text:p>
      <text:p text:style-name="P2"><text:s text:c="4"/>// 配列m_aEtabVt, m_aIb0, m_aLnIb0をセットする</text:p>
      <text:p text:style-name="P2"><text:s text:c="4"/>for(int k=0; k&lt;m_gc.K; k++){</text:p>
      <text:p text:style-name="P2"><text:tab/>double Tkel_k = TT[k]+273.15;</text:p>
      <text:p text:style-name="P2"><text:tab/>double kT_k = 1.380649E-23*Tkel_k;</text:p>
      <text:p text:style-name="P2"><text:tab/>m_aEtabVt[k] = 1.1*kT_k/1.602176634E-19;</text:p>
      <text:p text:style-name="P2"/>
      <text:p text:style-name="P2"><text:tab/>// m_aIb0[k] = getIb0(k);</text:p>
      <text:p text:style-name="P2"><text:tab/>m_aIb0[k] = m_gc.IscSTC*(1.0+m_gc.alphaSc*(m_aT[k]-25.0))/( exp(0.6/m_aEtabVt[k])-1.0 );</text:p>
      <text:p text:style-name="P2"><text:tab/>m_aLnIb0[k] = log(m_aIb0[k]);</text:p>
      <text:p text:style-name="P2"><text:s text:c="4"/>}</text:p>
      <text:p text:style-name="P2"/>
      <text:p text:style-name="P2"><text:s text:c="4"/>return m_am.calcPCS(GG, TT);</text:p>
      <text:p text:style-name="P2">}</text:p>
      <text:p text:style-name="P2"/>
      <text:p text:style-name="P2">/** m_aG[]、m_aT[] と m_aEtabVt[], m_aIb0[], m_aLnIb0[] をセットする <text:s/>****************</text:p>
      <text:p text:style-name="P2"><text:s/>* <text:s/>StringGroup::getE用、 <text:s text:c="2"/>速度重視</text:p>
      <text:p text:style-name="P2"><text:s/>* <text:s/>AdaptiveModel m_amのパラメータも対応してセットする</text:p>
      <text:p text:style-name="P2"><text:s/>* <text:s/>出力： m_aG[], m_aT[], m_aEtabVt[], m_aIb0[], m_aLnIb0[]</text:p>
      <text:p text:style-name="P2"><text:s/>* <text:s/>関数呼び出し： AdaptiveModel::calcPCS</text:p>
      <text:p text:style-name="P2"><text:s/>* <text:s/>戻り値： AdaptiveModel::calcのE値 <text:s text:c="4"/>*******************************************/</text:p>
      <text:p text:style-name="P2">float Substring::setVarsGetE(){</text:p>
      <text:p text:style-name="P2"><text:s text:c="4"/>// for(int k=0; k&lt;m_gc.K; k++){</text:p>
      <text:p text:style-name="P2"><text:s text:c="4"/>// <text:tab/>m_aG[k] = GG[k];</text:p>
      <text:p text:style-name="P2"><text:s text:c="4"/>// <text:tab/>m_aT[k] = TT[k];</text:p>
      <text:p text:style-name="P2"><text:s text:c="4"/>// }</text:p>
      <text:p text:style-name="P2"><text:s text:c="4"/></text:p>
      <text:p text:style-name="P2"><text:s text:c="4"/>// // 配列m_aEtabVt, m_aIb0, m_aLnIb0をセットする</text:p>
      <text:p text:style-name="P2"><text:s text:c="4"/>// for(int k=0; k&lt;m_gc.K; k++){</text:p>
      <text:p text:style-name="P2"><text:s text:c="4"/>// <text:tab/>double Tkel_k = TT[k]+273.15;</text:p>
      <text:p text:style-name="P2"><text:s text:c="4"/>// <text:tab/>double kT_k = 1.380649E-23*Tkel_k;</text:p>
      <text:p text:style-name="P2"><text:s text:c="4"/>// <text:tab/>m_aEtabVt[k] = 1.1*kT_k/1.602176634E-19;</text:p>
      <text:p text:style-name="P2"/>
      <text:p text:style-name="P2"><text:s text:c="4"/>// <text:tab/>// m_aIb0[k] = getIb0(k);</text:p>
      <text:p text:style-name="P2"><text:s text:c="4"/>// <text:tab/>m_aIb0[k] = m_gc.IscSTC*(1.0+m_gc.alphaSc*(m_aT[k]-25.0))/( exp(0.6/m_aEtabVt[k])-1.0 );</text:p>
      <text:p text:style-name="P2"><text:s text:c="4"/>// <text:tab/>m_aLnIb0[k] = log(m_aIb0[k]);</text:p>
      <text:p text:style-name="P2"><text:s text:c="4"/>// }</text:p>
      <text:p text:style-name="P2"/>
      <text:p text:style-name="P2"><text:s text:c="4"/>// return m_am.calcPCS(GG, TT);</text:p>
      <text:p text:style-name="P2"><text:s text:c="4"/>return m_am.calcPCSGetE();</text:p>
      <text:p text:style-name="P2">}</text:p>
      <text:p text:style-name="P2"/>
      <text:p text:style-name="P2">/** setVarsのあと、Preparation of getV(Ik), getI(Vk) for k <text:s text:c="2"/>************************</text:p>
      <text:p text:style-name="P2"><text:s/>* <text:s/>入力： m_am, m_aIb0[k], m_aEtabVt[k], m_aLnIb0[k]</text:p>
      <text:p text:style-name="P2"><text:s/>* <text:s/>出力： m_BypassDiodeOn[k] <text:s text:c="5"/>*************************************************/</text:p>
      <text:p text:style-name="P2">void Substring::getVIjunbi(int k){</text:p>
      <text:p text:style-name="P2"><text:s text:c="4"/>m_aBypassDiodeOn[k] = false;</text:p>
      <text:p text:style-name="P2"><text:s text:c="4"/>m_am.getVIjunbi(k);</text:p>
      <text:p text:style-name="P2"/>
      <text:p text:style-name="P2"><text:s text:c="4"/>m_Ib0 = m_aIb0[k];</text:p>
      <text:p text:style-name="P2"><text:s text:c="4"/>m_etabVt = m_aEtabVt[k];</text:p>
      <text:p text:style-name="P2"><text:s text:c="4"/>m_lnIb0 = m_aLnIb0[k];</text:p>
      <text:p text:style-name="P2">}</text:p>
      <text:p text:style-name="P2"/>
      <text:p text:style-name="P2">/** After setting for getV(Ik) of k <text:s text:c="2"/>***********************************************</text:p>
      <text:p text:style-name="P2"><text:s/>* <text:s/>入力： m_bypassDiodeOn</text:p>
      <text:p text:style-name="P2"><text:s/>* <text:s/>出力： m_BypassDiodeOn[k] <text:s text:c="3"/>****************************************************/</text:p>
      <text:p text:style-name="P2">void Substring::getVIafter(int k){</text:p>
      <text:p text:style-name="P2"><text:s text:c="4"/>m_aBypassDiodeOn[k] = m_bypassDiodeOn;</text:p>
      <text:p text:style-name="P2">}</text:p>
      <text:p text:style-name="P2"/>
      <text:p text:style-name="P2">/** AdaptiveModel m_amのSTCパラメータをセットする <text:s text:c="2"/>********************************</text:p>
      <text:p text:style-name="P2"><text:s/>* <text:s/>関数呼び出し： AdaptiveModel::setSTCparams <text:s text:c="3"/>*********************************/</text:p>
      <text:p text:style-name="P2">void Substring::setAM_STCparams(double X[4]){</text:p>
      <text:p text:style-name="P2"><text:s text:c="4"/>m_am.setSTCparams(X);</text:p>
      <text:p text:style-name="P2"><text:soft-page-break/>}</text:p>
      <text:p text:style-name="P2">/**********************************************************************</text:p>
      <text:p text:style-name="P2"><text:s/>* <text:s text:c="6"/>stringModel.hh</text:p>
      <text:p text:style-name="P2"><text:s/>*********************************************************************/</text:p>
      <text:p text:style-name="P2">#if !defined(__STRINGMODEL_HH)</text:p>
      <text:p text:style-name="P2">#define __STRINGMODEL_HH</text:p>
      <text:p text:style-name="P2"/>
      <text:p text:style-name="P2">// #include &lt;iostream&gt;</text:p>
      <text:p text:style-name="P2">#include &lt;vector&gt;</text:p>
      <text:p text:style-name="P2">#include "globalConstants.hh"</text:p>
      <text:p text:style-name="P2">#include "substring.hh"</text:p>
      <text:p text:style-name="P2"/>
      <text:p text:style-name="P2">class StringModel{</text:p>
      <text:p text:style-name="P2">private:</text:p>
      <text:p text:style-name="P2"><text:s text:c="4"/>GlobalConstants m_gc;</text:p>
      <text:p text:style-name="P2"/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Substring m_ssInit;</text:p>
      <text:p text:style-name="P2"><text:s text:c="4"/>std::vector&lt;Substring&gt; m_vss; <text:s/>// publicにする 2024.6.8 やめる</text:p>
      <text:p text:style-name="P2"><text:s text:c="4"/></text:p>
      <text:p text:style-name="P2"><text:s text:c="4"/>float m_etabVt;</text:p>
      <text:p text:style-name="P2"><text:s text:c="4"/>double m_Ib0; <text:s/>// バイパスダイオードの反転飽和電流</text:p>
      <text:p text:style-name="P2"/>
      <text:p text:style-name="P2"><text:s text:c="4"/>double m_IscSub, m_Vmin, m_Vmax;</text:p>
      <text:p text:style-name="P2"><text:s text:c="4"/></text:p>
      <text:p text:style-name="P2"><text:s text:c="4"/>double m_Vfunc; <text:s text:c="2"/>// for bisection search</text:p>
      <text:p text:style-name="P2"/>
      <text:p text:style-name="P2"><text:s text:c="4"/>// 時系列としての測定G,T, PCS下の全サブストリングで一様</text:p>
      <text:p text:style-name="P2"><text:s text:c="4"/>// double aG[GlobalConstants::K], aT[GlobalConstants::K];</text:p>
      <text:p text:style-name="P2"><text:s text:c="4"/>double m_aVmin[GlobalConstants::K], m_aVmax[GlobalConstants::K],</text:p>
      <text:p text:style-name="P2"><text:tab/>m_aIb0[GlobalConstants::K], m_aIscSub[GlobalConstants::K],</text:p>
      <text:p text:style-name="P2"><text:tab/>m_aEtabVt[GlobalConstants::K]; </text:p>
      <text:p text:style-name="P2"><text:s text:c="4"/>double m_aIk[GlobalConstants::K]; <text:s/>// 時点kに対するI, i.e. I_k</text:p>
      <text:p text:style-name="P2">public:</text:p>
      <text:p text:style-name="P2"><text:s text:c="4"/>// Constructor</text:p>
      <text:p text:style-name="P2"><text:s text:c="4"/>StringModel(GlobalConstants gcc, float GG, float TT);</text:p>
      <text:p text:style-name="P2"><text:s text:c="4"/></text:p>
      <text:p text:style-name="P2"><text:s text:c="4"/>double getIb0() const{ return m_Ib0; };</text:p>
      <text:p text:style-name="P2"><text:s text:c="4"/>double getVmin() const{ return m_Vmin; };</text:p>
      <text:p text:style-name="P2"><text:s text:c="4"/>double getVmax() const{ return m_Vmax; };</text:p>
      <text:p text:style-name="P2"><text:s text:c="4"/></text:p>
      <text:p text:style-name="P2"><text:s text:c="4"/>double getV(double I);</text:p>
      <text:p text:style-name="P2"><text:s text:c="4"/>double getI(double V);</text:p>
      <text:p text:style-name="P2"/>
      <text:p text:style-name="P2"><text:s text:c="4"/>void getI(int l, double Vk[GlobalConstants::K], double Ik[GlobalConstants::K]);</text:p>
      <text:p text:style-name="P2"/>
      <text:p text:style-name="P2"><text:s text:c="4"/>void getVjunbi(int k);</text:p>
      <text:p text:style-name="P2"><text:s text:c="4"/>void getIjunbi(int k);</text:p>
      <text:p text:style-name="P2"><text:s text:c="4"/></text:p>
      <text:p text:style-name="P2"><text:s text:c="4"/>void getVjunbiVss(int k, int l);</text:p>
      <text:p text:style-name="P2"><text:s text:c="4"/>void getIjunbi(int k, int l);</text:p>
      <text:p text:style-name="P2"><text:s text:c="4"/></text:p>
      <text:p text:style-name="P2"><text:s text:c="4"/>double func(double x); <text:s/>// getIで使われる２分法用</text:p>
      <text:p text:style-name="P2"/>
      <text:p text:style-name="P2"><text:s text:c="4"/>void addSS();</text:p>
      <text:p text:style-name="P2"/>
      <text:p text:style-name="P2"><text:s text:c="4"/>float setVars(double GG[], double TT[]);</text:p>
      <text:p text:style-name="P2"><text:s text:c="4"/>float setVarsVss(double GG[], double TT[], int l);</text:p>
      <text:p text:style-name="P2"><text:s text:c="4"/>float setVarsVssGetE(int l);</text:p>
      <text:p text:style-name="P2"><text:s text:c="4"/></text:p>
      <text:p text:style-name="P2"><text:s text:c="4"/>void setSS_STCparams(double X[GlobalConstants::K], int l);</text:p>
      <text:p text:style-name="P2"/>
      <text:p text:style-name="P2"><text:s text:c="4"/>void set_aIk(double Ik[GlobalConstants::K]);</text:p>
      <text:p text:style-name="P2"><text:soft-page-break/><text:s text:c="4"/>double get_aIk(int k) const{ return m_aIk[k]; }</text:p>
      <text:p text:style-name="P2">};</text:p>
      <text:p text:style-name="P2"/>
      <text:p text:style-name="P2">#endif</text:p>
      <text:p text:style-name="P2">// -*- C++ -*-</text:p>
      <text:p text:style-name="P2">/******************************************************************************</text:p>
      <text:p text:style-name="P2"><text:s/>* <text:s text:c="11"/>stringModel.cu</text:p>
      <text:p text:style-name="P2"><text:s/>*****************************************************************************/</text:p>
      <text:p text:style-name="P2">#include "globalConstants.hh"</text:p>
      <text:p text:style-name="P2">#include "stringModel.hh"</text:p>
      <text:p text:style-name="P2">#include &lt;limits&gt;</text:p>
      <text:p text:style-name="P2">#include "bisection.hh"</text:p>
      <text:p text:style-name="P2"/>
      <text:p text:style-name="P2">/** Constructor <text:s text:c="3"/>*****************************************************************</text:p>
      <text:p text:style-name="P2"><text:s/>* <text:s/>GG (W/m^2), TT (degC)</text:p>
      <text:p text:style-name="P2"><text:s/>* <text:s/>出力： m_gc, m_G, m_T, m_ssInit, m_Ib0, m_etabVt, m_IscSub, m_Vmin, m_Vmax</text:p>
      <text:p text:style-name="P2"><text:s/>* <text:s/>関数呼び出し： Substring::getIb0, Substring::getEtabVt, Substring::getIsc</text:p>
      <text:p text:style-name="P2"><text:s/>* <text:s text:c="16"/>getV <text:s text:c="4"/>********************************************************/</text:p>
      <text:p text:style-name="P2">StringModel::StringModel(GlobalConstants gcc, float GG, float TT): m_gc{gcc}, m_G{GG}, m_T{TT},</text:p>
      <text:p text:style-name="P2"><text:tab/><text:tab/><text:tab/><text:tab/><text:tab/><text:tab/><text:tab/><text:tab/> <text:s text:c="2"/>m_ssInit{gcc, GG, TT}{</text:p>
      <text:p text:style-name="P2"><text:s text:c="4"/>m_Ib0 = m_ssInit.getIb0();</text:p>
      <text:p text:style-name="P2"><text:s text:c="4"/>m_etabVt = m_ssInit.getEtabVt();</text:p>
      <text:p text:style-name="P2"/>
      <text:p text:style-name="P2"><text:s text:c="4"/>// getI のために m_IscSub, m_Vmin, m_Vmaxをセットする</text:p>
      <text:p text:style-name="P2"><text:s text:c="4"/>m_IscSub = m_ssInit.getIsc();</text:p>
      <text:p text:style-name="P2"><text:s text:c="4"/>// for(int i=0; i&lt;m_vss.size(); i++){ <text:s/>// コンストラクタの段階ではまだない</text:p>
      <text:p text:style-name="P2"><text:s text:c="4"/>// <text:tab/>double IscSub_i = m_vss[i].getIsc();</text:p>
      <text:p text:style-name="P2"><text:s text:c="4"/>// <text:tab/>if(IscSub_i &gt; m_IscSub) m_IscSub = IscSub_i;</text:p>
      <text:p text:style-name="P2"><text:s text:c="4"/>// }</text:p>
      <text:p text:style-name="P2"/>
      <text:p text:style-name="P2"><text:s text:c="4"/>try{</text:p>
      <text:p text:style-name="P2"><text:tab/>m_Vmin = getV(2.0*m_IscSub);</text:p>
      <text:p text:style-name="P2"><text:tab/>m_Vmax = getV(-0.99*m_Ib0);</text:p>
      <text:p text:style-name="P2"><text:s text:c="4"/>}catch(std::exception e){</text:p>
      <text:p text:style-name="P2"><text:tab/>std::cout &lt;&lt; e.what() &lt;&lt; "--&gt;StringModel::StringModel\n";</text:p>
      <text:p text:style-name="P2"><text:tab/>exit(0);//////////////t</text:p>
      <text:p text:style-name="P2"><text:s text:c="4"/>}</text:p>
      <text:p text:style-name="P2"><text:tab/></text:p>
      <text:p text:style-name="P2"><text:s text:c="4"/>// std::cout &lt;&lt; "StringModel Vmin=" &lt;&lt; m_Vmin &lt;&lt; " Vmax=" &lt;&lt; m_Vmax &lt;&lt; std::endl;////////////</text:p>
      <text:p text:style-name="P2">}</text:p>
      <text:p text:style-name="P2"/>
      <text:p text:style-name="P2">/** m_aVmin[], m_aVmax[], m_aIb0[], m_aIscSub[], m_aEtabVt[]をセットする <text:s text:c="2"/>**********</text:p>
      <text:p text:style-name="P2"><text:s/>* <text:s/>入力： 引き数だけ</text:p>
      <text:p text:style-name="P2"><text:s/>* <text:s/>出力： m_ssInit, m_vss, m_aIb0, m_aEtabVt, m_aIscSub, m_aVmin, m_aVmax</text:p>
      <text:p text:style-name="P2"><text:s/>* <text:s/>関数呼び出し： Substring::setVars, Substring::getIb0(k), Substring::getEtabVt(k)</text:p>
      <text:p text:style-name="P2"><text:s/>* <text:s text:c="16"/>Substring::getIsc, getVIjunbi</text:p>
      <text:p text:style-name="P2"><text:s/>* <text:s/>戻り値： Substring::setVarsの戻り値 <text:s text:c="4"/>*****************************************/</text:p>
      <text:p text:style-name="P2">float StringModel::setVars(double GG[], double TT[]){</text:p>
      <text:p text:style-name="P2"><text:s text:c="4"/>float Eret = m_ssInit.setVars(GG, TT);</text:p>
      <text:p text:style-name="P2"><text:s text:c="4"/>if(Eret==INFINITY) return Eret;</text:p>
      <text:p text:style-name="P2"><text:s text:c="4"/></text:p>
      <text:p text:style-name="P2"><text:s text:c="4"/>for(int i=0; i&lt;m_vss.size(); i++){</text:p>
      <text:p text:style-name="P2"><text:tab/>float E = m_vss[i].setVars(GG, TT);</text:p>
      <text:p text:style-name="P2"><text:tab/>if(E==INFINITY) return E;</text:p>
      <text:p text:style-name="P2"><text:tab/>else if(Eret &lt; E) Eret= E;</text:p>
      <text:p text:style-name="P2"><text:s text:c="4"/>}</text:p>
      <text:p text:style-name="P2"><text:s text:c="4"/></text:p>
      <text:p text:style-name="P2"><text:s text:c="4"/>for(int k=0; k&lt;GlobalConstants::K; k++){</text:p>
      <text:p text:style-name="P2"><text:tab/>m_aIb0[k] = m_ssInit.getIb0(k); <text:s text:c="5"/>// 逆流防止ダイオードのもの</text:p>
      <text:p text:style-name="P2"><text:tab/>m_aEtabVt[k] = m_ssInit.getEtabVt(k);</text:p>
      <text:p text:style-name="P2"/>
      <text:p text:style-name="P2"><text:tab/>m_aIscSub[k] = m_ssInit.getIsc(k);</text:p>
      <text:p text:style-name="P2"><text:tab/>for(int i=0; i&lt;m_vss.size(); i++){</text:p>
      <text:p text:style-name="P2"><text:tab/> <text:s text:c="3"/>double IscSub_i = m_vss[i].getIsc(k);</text:p>
      <text:p text:style-name="P2"><text:tab/> <text:s text:c="3"/>if(IscSub_i &gt; m_IscSub) m_aIscSub[k] = IscSub_i;</text:p>
      <text:p text:style-name="P2"><text:soft-page-break/><text:tab/>}</text:p>
      <text:p text:style-name="P2"/>
      <text:p text:style-name="P2"><text:tab/>getVjunbi(k);</text:p>
      <text:p text:style-name="P2"><text:tab/></text:p>
      <text:p text:style-name="P2"><text:tab/>try{</text:p>
      <text:p text:style-name="P2"><text:tab/> <text:s text:c="3"/>m_aVmin[k] = getV(2.0*m_aIscSub[k]);</text:p>
      <text:p text:style-name="P2"><text:tab/> <text:s text:c="3"/>m_aVmax[k] = getV(-0.99*m_aIb0[k]);</text:p>
      <text:p text:style-name="P2"><text:tab/>}catch(std::exception e){</text:p>
      <text:p text:style-name="P2"><text:tab/> <text:s text:c="3"/>std::cout &lt;&lt; e.what() &lt;&lt; "--&gt;StringModel::setVars\n";</text:p>
      <text:p text:style-name="P2"><text:tab/> <text:s text:c="3"/>exit(0);//////////////t</text:p>
      <text:p text:style-name="P2"><text:tab/>}</text:p>
      <text:p text:style-name="P2"><text:s text:c="4"/>}</text:p>
      <text:p text:style-name="P2"/>
      <text:p text:style-name="P2"><text:tab/>// printf("StringModel::setVars_k$$ k=%d, Vmin=%g, Vmax=%g\n", k, m_aVmin[k], m_aVmax[k]);////////////t</text:p>
      <text:p text:style-name="P2"><text:s text:c="4"/>return Eret;</text:p>
      <text:p text:style-name="P2">}</text:p>
      <text:p text:style-name="P2"/>
      <text:p text:style-name="P2">/** m_vss[l]のsetVarsを実行する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(double GG[], double TT[], int l){</text:p>
      <text:p text:style-name="P2"><text:s text:c="4"/>float E = <text:s/>m_vss[l].setVars(GG, TT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m_vss[l]のsetVarsを実行する, StringGroup::getE用 <text:s text:c="2"/>**********</text:p>
      <text:p text:style-name="P2"><text:s/>* <text:s/>入力： 引き数だけ</text:p>
      <text:p text:style-name="P2"><text:s/>* <text:s/>出力： m_vss, m_aIscSub, m_aVmin, m_aVmax</text:p>
      <text:p text:style-name="P2"><text:s/>* <text:s/>関数呼び出し： Substring::setVars, Substring::getIsc, getVIjunbi, getV</text:p>
      <text:p text:style-name="P2"><text:s/>* <text:s/>戻り値： Substring::setVarsの戻り値 <text:s text:c="4"/>*****************************************/</text:p>
      <text:p text:style-name="P2">float StringModel::setVarsVssGetE(int l){</text:p>
      <text:p text:style-name="P2"><text:s text:c="4"/>float E = <text:s/>m_vss[l].setVarsGetE();</text:p>
      <text:p text:style-name="P2"><text:s text:c="4"/>// return m_vss[l].setVarsGetE();</text:p>
      <text:p text:style-name="P2"><text:s text:c="4"/>if(E==INFINITY) return E;</text:p>
      <text:p text:style-name="P2"/>
      <text:p text:style-name="P2"><text:s text:c="4"/>for(int k=0; k&lt;GlobalConstants::K; k++){</text:p>
      <text:p text:style-name="P2"><text:tab/>double IscSub_l = m_vss[l].getIsc(k);</text:p>
      <text:p text:style-name="P2"><text:tab/>// printf("IscSub_l=%g\n", IscSub_l);/////////////////t</text:p>
      <text:p text:style-name="P2"><text:tab/>if(IscSub_l &gt; m_aIscSub[k]){</text:p>
      <text:p text:style-name="P2"><text:tab/> <text:s text:c="3"/>m_aIscSub[k] = IscSub_l;</text:p>
      <text:p text:style-name="P2"><text:tab/> <text:s text:c="3"/>getVjunbi(k);</text:p>
      <text:p text:style-name="P2"><text:tab/> <text:s text:c="3"/></text:p>
      <text:p text:style-name="P2"><text:soft-page-break/><text:tab/> <text:s text:c="3"/>try{</text:p>
      <text:p text:style-name="P2"><text:tab/><text:tab/>m_aVmin[k] = getV(2.0*m_aIscSub[k]);</text:p>
      <text:p text:style-name="P2"><text:tab/><text:tab/>// m_aVmax[k] = getV(-0.99*m_aIb0[k]);</text:p>
      <text:p text:style-name="P2"><text:tab/> <text:s text:c="3"/>}catch(std::exception e){</text:p>
      <text:p text:style-name="P2"><text:tab/><text:tab/>std::cout &lt;&lt; e.what() &lt;&lt; "--&gt;StringModel::setVarsVss" &lt;&lt; " k="&lt;&lt; k</text:p>
      <text:p text:style-name="P2"><text:tab/><text:tab/><text:tab/> <text:s/>&lt;&lt; " l=" &lt;&lt; l &lt;&lt; "\n";</text:p>
      <text:p text:style-name="P2"><text:tab/><text:tab/>exit(0);//////////////t</text:p>
      <text:p text:style-name="P2"><text:tab/> <text:s text:c="3"/>}</text:p>
      <text:p text:style-name="P2"><text:tab/>}</text:p>
      <text:p text:style-name="P2"><text:s text:c="4"/>}</text:p>
      <text:p text:style-name="P2"/>
      <text:p text:style-name="P2"><text:s text:c="4"/>return E;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(int k){</text:p>
      <text:p text:style-name="P2"><text:s text:c="4"/>m_Ib0 = m_aIb0[k];</text:p>
      <text:p text:style-name="P2"><text:s text:c="4"/>m_etabVt = m_aEtabVt[k];</text:p>
      <text:p text:style-name="P2"/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>}</text:p>
      <text:p text:style-name="P2"/>
      <text:p text:style-name="P2">/** 時点kに対するgetVの準備をする <text:s text:c="3"/>************************************************</text:p>
      <text:p text:style-name="P2"><text:s/>* <text:s/>入力： m_aIb0[k], m_aEtabVt[k]</text:p>
      <text:p text:style-name="P2"><text:s/>* <text:s/>出力： m_Ib0, m_etabVt</text:p>
      <text:p text:style-name="P2"><text:s/>* <text:s/>関数呼び出し： m_ssInit.getVIjunbi, m_vss[i].getVIjunbi <text:s text:c="2"/>***********************/</text:p>
      <text:p text:style-name="P2">void StringModel::getVjunbiVss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}</text:p>
      <text:p text:style-name="P2"/>
      <text:p text:style-name="P2">/** Calculate substring voltage V (V) for current I (A) <text:s text:c="2"/>***************************</text:p>
      <text:p text:style-name="P2"><text:s/>* <text:s/>入力： <text:s/>m_Ib0, m_etabVt</text:p>
      <text:p text:style-name="P2"><text:s/>* <text:s/>関数呼び出し： m_vss.size, m_ssInit.getV, m_vss[i].getV <text:s text:c="4"/>*********************/</text:p>
      <text:p text:style-name="P2">double StringModel::getV(double I){</text:p>
      <text:p text:style-name="P2"><text:s text:c="4"/>if(I &lt; -m_Ib0) return std::numeric_limits&lt;double&gt;::quiet_NaN();</text:p>
      <text:p text:style-name="P2"><text:s text:c="4"/></text:p>
      <text:p text:style-name="P2"><text:s text:c="4"/>double V0 = -m_etabVt*log(I/m_Ib0 +1.0);</text:p>
      <text:p text:style-name="P2"><text:s text:c="4"/>double V;</text:p>
      <text:p text:style-name="P2"><text:s text:c="4"/>try{</text:p>
      <text:p text:style-name="P2"><text:tab/>V = V0 + (m_gc.L-m_vss.size())*m_ssInit.getV(I);</text:p>
      <text:p text:style-name="P2"><text:tab/>for(int i=0; i&lt;m_vss.size(); i++) V += m_vss[i].getV(I);</text:p>
      <text:p text:style-name="P2"><text:s text:c="4"/>}catch(std::exception e){</text:p>
      <text:p text:style-name="P2"><text:tab/>std::string str {e.what()};</text:p>
      <text:p text:style-name="P2"><text:tab/>throw std::runtime_error(str+"--&gt;StringModel::getV");</text:p>
      <text:p text:style-name="P2"><text:s text:c="4"/>}</text:p>
      <text:p text:style-name="P2"><text:s text:c="4"/></text:p>
      <text:p text:style-name="P2"><text:s text:c="4"/>return V;</text:p>
      <text:p text:style-name="P2">}</text:p>
      <text:p text:style-name="P2"/>
      <text:p text:style-name="P2">/** 時点kに対するgetIの準備をする <text:s text:c="4"/>***********************************************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ssInit.getVIjunbi, m_vss[i].getVIjunbi <text:s text:c="4"/>*********************/</text:p>
      <text:p text:style-name="P2">void StringModel::getIjunbi(int k){</text:p>
      <text:p text:style-name="P2"><text:s text:c="4"/>m_Ib0 = m_aIb0[k];</text:p>
      <text:p text:style-name="P2"><text:s text:c="4"/>m_etabVt = m_aEtabVt[k];</text:p>
      <text:p text:style-name="P2"><text:soft-page-break/></text:p>
      <text:p text:style-name="P2"><text:s text:c="4"/>m_ssInit.getVIjunbi(k);</text:p>
      <text:p text:style-name="P2"><text:s text:c="4"/>for(int i=0; i&lt;m_vss.size(); i++){</text:p>
      <text:p text:style-name="P2"><text:tab/>m_vss[i].getVIjunbi(k);</text:p>
      <text:p text:style-name="P2"><text:s text:c="4"/>}</text:p>
      <text:p text:style-name="P2"/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substring lのパラメータが変わったときの、時点kに対するgetIの準備をする <text:s text:c="3"/>********</text:p>
      <text:p text:style-name="P2"><text:s/>* <text:s/>ssInitとlより前のsubstringのgetIjunbiは終わっているとする</text:p>
      <text:p text:style-name="P2"><text:s/>* <text:s/>入力： m_aIb0[k], m_aEtabVt[k]</text:p>
      <text:p text:style-name="P2"><text:s/>* <text:s/>出力： m_Ib0, m_etabVt, m_Vmin, m_Vmax, m_IscSub</text:p>
      <text:p text:style-name="P2"><text:s/>* <text:s/>関数呼び出し： m_vss[l].getVIjunbi <text:s text:c="4"/>*********************/</text:p>
      <text:p text:style-name="P2">void StringModel::getIjunbi(int k, int l){</text:p>
      <text:p text:style-name="P2"><text:s text:c="4"/>m_Ib0 = m_aIb0[k];</text:p>
      <text:p text:style-name="P2"><text:s text:c="4"/>m_etabVt = m_aEtabVt[k];</text:p>
      <text:p text:style-name="P2"/>
      <text:p text:style-name="P2"><text:s text:c="4"/>m_vss[l].getVIjunbi(k);</text:p>
      <text:p text:style-name="P2"><text:s text:c="4"/></text:p>
      <text:p text:style-name="P2"><text:s text:c="4"/>m_Vmin = m_aVmin[k];</text:p>
      <text:p text:style-name="P2"><text:s text:c="4"/>m_Vmax = m_aVmax[k];</text:p>
      <text:p text:style-name="P2"><text:s text:c="4"/>m_IscSub = m_aIscSub[k];</text:p>
      <text:p text:style-name="P2">}</text:p>
      <text:p text:style-name="P2"/>
      <text:p text:style-name="P2">/** Calculate substring current I (A) for voltage V (V) <text:s text:c="3"/>**************************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double StringModel::getI(double V){</text:p>
      <text:p text:style-name="P2"><text:s text:c="4"/>if(V &lt; m_Vmin) return std::numeric_limits&lt;double&gt;::infinity();</text:p>
      <text:p text:style-name="P2"><text:s text:c="4"/>else if(m_Vmax &lt; V) return -m_Ib0;</text:p>
      <text:p text:style-name="P2"><text:s text:c="4"/>else{</text:p>
      <text:p text:style-name="P2"><text:tab/>Bisection&lt;StringModel&gt; bis {this};</text:p>
      <text:p text:style-name="P2"><text:tab/>m_Vfunc = V;</text:p>
      <text:p text:style-name="P2"><text:tab/>return bis.search(-0.99*m_Ib0, 2.0*m_IscSub);</text:p>
      <text:p text:style-name="P2"><text:s text:c="4"/>}</text:p>
      <text:p text:style-name="P2">}</text:p>
      <text:p text:style-name="P2"/>
      <text:p text:style-name="P2">/** Calculate substring current Ik (A) for voltage Vk (V), (k=0,1,..K-1) <text:s text:c="3"/>*********</text:p>
      <text:p text:style-name="P2"><text:s/>* <text:s/>l はXによってVocSTCなどのパラメータが変わっているサブストリング番号</text:p>
      <text:p text:style-name="P2"><text:s/>* <text:s/>getIjunbiの事前呼び出しは不要</text:p>
      <text:p text:style-name="P2"><text:s/>* <text:s/>上のgetIをK回繰り返すより高速になると思ったが、かえって遅くなった --&gt; 不採用</text:p>
      <text:p text:style-name="P2"><text:s/>* <text:s/>入力： m_Vmin, m_Vmax, m_Ib0, m_IscSub</text:p>
      <text:p text:style-name="P2"><text:s/>* <text:s/>出力： m_Vfunc</text:p>
      <text:p text:style-name="P2"><text:s/>* <text:s/>関数呼び出し： Bisection::search <text:s text:c="4"/>********************************************/</text:p>
      <text:p text:style-name="P2">void StringModel::getI(int l, double Vk[GlobalConstants::K], double Ik[GlobalConstants::K]){</text:p>
      <text:p text:style-name="P2"><text:s text:c="4"/>for(int k=0; k&lt;GlobalConstants::K; k++){</text:p>
      <text:p text:style-name="P2"><text:tab/>m_Ib0 = m_aIb0[k];</text:p>
      <text:p text:style-name="P2"><text:tab/>m_etabVt = m_aEtabVt[k];</text:p>
      <text:p text:style-name="P2"/>
      <text:p text:style-name="P2"><text:tab/>m_vss[l].getVIjunbi(k);</text:p>
      <text:p text:style-name="P2"/>
      <text:p text:style-name="P2"><text:tab/>if(Vk[k] &lt; m_aVmin[k]) Ik[k] = std::numeric_limits&lt;double&gt;::infinity();</text:p>
      <text:p text:style-name="P2"><text:tab/>else if(m_aVmax[k] &lt; Vk[k]) Ik[k] = -m_Ib0;</text:p>
      <text:p text:style-name="P2"><text:tab/>else{</text:p>
      <text:p text:style-name="P2"><text:tab/> <text:s text:c="3"/>Bisection&lt;StringModel&gt; bis {this};</text:p>
      <text:p text:style-name="P2"><text:tab/> <text:s text:c="3"/>m_Vfunc = Vk[k];</text:p>
      <text:p text:style-name="P2"><text:tab/> <text:s text:c="3"/>Ik[k] = bis.search(-0.99*m_Ib0, 2.0*m_aIscSub[k]);</text:p>
      <text:p text:style-name="P2"><text:tab/>}</text:p>
      <text:p text:style-name="P2"><text:s text:c="4"/>}</text:p>
      <text:p text:style-name="P2">}</text:p>
      <text:p text:style-name="P2"/>
      <text:p text:style-name="P2"><text:soft-page-break/>/** getIで使われる２分法用のメソッド <text:s text:c="2"/>**********************************************</text:p>
      <text:p text:style-name="P2"><text:s/>* <text:s/>入力： m_Vfunc</text:p>
      <text:p text:style-name="P2"><text:s/>* <text:s/>関数呼び出し： getV <text:s text:c="4"/>*********************************************************/</text:p>
      <text:p text:style-name="P2">double StringModel::func(double I){</text:p>
      <text:p text:style-name="P2"><text:s text:c="4"/>return getV(I)-m_Vfunc;</text:p>
      <text:p text:style-name="P2">}</text:p>
      <text:p text:style-name="P2"/>
      <text:p text:style-name="P2">/**************** <text:s text:c="2"/>Add a substring <text:s text:c="4"/>***********************************************/</text:p>
      <text:p text:style-name="P2">void StringModel::addSS(){</text:p>
      <text:p text:style-name="P2"><text:s text:c="4"/>// Substring ss {m_ssInit}; <text:s text:c="2"/>// default copy constructor</text:p>
      <text:p text:style-name="P2"><text:s text:c="4"/>Substring ss {m_gc, 1000.0, 25.0};</text:p>
      <text:p text:style-name="P2"><text:s text:c="4"/>m_vss.push_back(ss);</text:p>
      <text:p text:style-name="P2">}</text:p>
      <text:p text:style-name="P2"/>
      <text:p text:style-name="P2">/** サブストリングlのSTCパラメータをXでセットする <text:s text:c="3"/>*********************************</text:p>
      <text:p text:style-name="P2"><text:s/>* <text:s/>関数呼び出し： Substring::setAM_STCparams <text:s text:c="4"/>***********************************/</text:p>
      <text:p text:style-name="P2">void StringModel::setSS_STCparams(double X[4], int l){</text:p>
      <text:p text:style-name="P2"><text:s text:c="4"/>m_vss[l].setAM_STCparams(X);</text:p>
      <text:p text:style-name="P2">}</text:p>
      <text:p text:style-name="P2"/>
      <text:p text:style-name="P2">/** 時点kに対するストリングの電流m_aIkをセットする <text:s text:c="3"/>*******************************</text:p>
      <text:p text:style-name="P2"><text:s/>* <text:s/>出力： m_aIk[] <text:s text:c="4"/>*************************************************************/</text:p>
      <text:p text:style-name="P2">void StringModel::set_aIk(double Ik[GlobalConstants::K]){</text:p>
      <text:p text:style-name="P2"><text:s text:c="4"/>for(int k=0; k&lt;GlobalConstants::K;k++){</text:p>
      <text:p text:style-name="P2"><text:tab/>m_aIk[k] = Ik[k];</text:p>
      <text:p text:style-name="P2"><text:s text:c="4"/>}</text:p>
      <text:p text:style-name="P2">}</text:p>
      <text:p text:style-name="P2">/***************************************************************************</text:p>
      <text:p text:style-name="P2"><text:s/>* <text:s text:c="8"/>StringGroup.hh <text:s/>2024.1.21--</text:p>
      <text:p text:style-name="P2"><text:s/>***************************************************************************/</text:p>
      <text:p text:style-name="P2">#if !defined(__STRING_GROUP_HH)</text:p>
      <text:p text:style-name="P2">#define __STRING_GROUP_HH</text:p>
      <text:p text:style-name="P2"/>
      <text:p text:style-name="P2">#include "stringModel.hh"</text:p>
      <text:p text:style-name="P2">// #include &lt;string&gt;</text:p>
      <text:p text:style-name="P2"/>
      <text:p text:style-name="P2">class StringGroup{</text:p>
      <text:p text:style-name="P2">private:</text:p>
      <text:p text:style-name="P2"><text:s text:c="4"/>GlobalConstants m_gc;</text:p>
      <text:p text:style-name="P2"><text:s text:c="4"/></text:p>
      <text:p text:style-name="P2"><text:s text:c="4"/>StringModel m_smInit;</text:p>
      <text:p text:style-name="P2"><text:s text:c="4"/>std::vector&lt;StringModel&gt; m_vsm; // パラメータが変更されたストリング 0,1,2,...</text:p>
      <text:p text:style-name="P2"/>
      <text:p text:style-name="P2"><text:s text:c="4"/>// smInitのもの</text:p>
      <text:p text:style-name="P2"><text:s text:c="4"/>float m_G; <text:s text:c="2"/>// W/m^2</text:p>
      <text:p text:style-name="P2"><text:s text:c="4"/>float m_T; <text:s text:c="2"/>// degC</text:p>
      <text:p text:style-name="P2"/>
      <text:p text:style-name="P2"><text:s text:c="4"/>double m_Ib0;</text:p>
      <text:p text:style-name="P2"><text:s text:c="4"/>double m_Ib0sg;</text:p>
      <text:p text:style-name="P2"/>
      <text:p text:style-name="P2"><text:s text:c="4"/>double m_Vmin;</text:p>
      <text:p text:style-name="P2"><text:s text:c="4"/>double m_Vmax;</text:p>
      <text:p text:style-name="P2"><text:s text:c="4"/></text:p>
      <text:p text:style-name="P2"><text:s text:c="4"/>double m_Imin;</text:p>
      <text:p text:style-name="P2"><text:s text:c="4"/>double m_Imax;</text:p>
      <text:p text:style-name="P2"><text:s text:c="4"/></text:p>
      <text:p text:style-name="P2"><text:s text:c="4"/>// for bisection search</text:p>
      <text:p text:style-name="P2"><text:s text:c="4"/>double m_Ifunc;</text:p>
      <text:p text:style-name="P2"/>
      <text:p text:style-name="P2"><text:s text:c="4"/>void ELPSOsearch(double X[GlobalConstants::K], int s, int l);</text:p>
      <text:p text:style-name="P2"><text:s text:c="4"/>double getE(double X[GlobalConstants::K], int s, int l);</text:p>
      <text:p text:style-name="P2"><text:s text:c="4"/></text:p>
      <text:p text:style-name="P2"><text:s text:c="4"/>double m_aG[GlobalConstants::K], m_aT[GlobalConstants::K];</text:p>
      <text:p text:style-name="P2"><text:s text:c="4"/>double m_aIsg[GlobalConstants::K], m_aVsg[GlobalConstants::K];</text:p>
      <text:p text:style-name="P2"/>
      <text:p text:style-name="P2"><text:soft-page-break/><text:s text:c="4"/>double m_bunbo;</text:p>
      <text:p text:style-name="P2">public:</text:p>
      <text:p text:style-name="P2"><text:s text:c="4"/>// Constructor</text:p>
      <text:p text:style-name="P2"><text:s text:c="4"/>StringGroup(GlobalConstants gcc, float GG, float TT);</text:p>
      <text:p text:style-name="P2"/>
      <text:p text:style-name="P2"><text:s text:c="4"/>double getI(double V);</text:p>
      <text:p text:style-name="P2"><text:s text:c="4"/>double getV(double I);</text:p>
      <text:p text:style-name="P2"/>
      <text:p text:style-name="P2"><text:s text:c="4"/>// for bisection search</text:p>
      <text:p text:style-name="P2"><text:s text:c="4"/>double func(double V);</text:p>
      <text:p text:style-name="P2"/>
      <text:p text:style-name="P2"><text:s text:c="4"/>void paramEstim(double G[], double T[], double I[], double V[], std::string Time[]);</text:p>
      <text:p text:style-name="P2">};</text:p>
      <text:p text:style-name="P2"/>
      <text:p text:style-name="P2">// class XX {</text:p>
      <text:p text:style-name="P2">// <text:s text:c="4"/>int a = 3;</text:p>
      <text:p text:style-name="P2">// public:</text:p>
      <text:p text:style-name="P2">// <text:s text:c="4"/>XX(){ return a; }</text:p>
      <text:p text:style-name="P2"/>
      <text:p text:style-name="P2">// };</text:p>
      <text:p text:style-name="P2"/>
      <text:p text:style-name="P2"/>
      <text:p text:style-name="P2">#endif</text:p>
      <text:p text:style-name="P2">// -*- C++ -*-</text:p>
      <text:p text:style-name="P2">/************************************************************************************</text:p>
      <text:p text:style-name="P2"><text:s/>* <text:s text:c="33"/>stringGroup.cu</text:p>
      <text:p text:style-name="P2"><text:s/>***********************************************************************************/</text:p>
      <text:p text:style-name="P2">#include "globalConstants.hh"</text:p>
      <text:p text:style-name="P2">#include "stringGroup.hh"</text:p>
      <text:p text:style-name="P2">#include "bisection.hh"</text:p>
      <text:p text:style-name="P2">#include &lt;iostream&gt; <text:s/>/////////////t</text:p>
      <text:p text:style-name="P2">#include &lt;iomanip&gt; <text:s/>/////////////t</text:p>
      <text:p text:style-name="P2">#include &lt;random&gt;</text:p>
      <text:p text:style-name="P2">#include &lt;string&gt;</text:p>
      <text:p text:style-name="P2"/>
      <text:p text:style-name="P2">/** Constructor <text:s text:c="4"/>*****************************************************************</text:p>
      <text:p text:style-name="P2"><text:s/>* GG (W/m^2), TT (degC) <text:s text:c="4"/>*******************************************************/</text:p>
      <text:p text:style-name="P2">StringGroup::StringGroup(GlobalConstants gcc, float GG, float TT)</text:p>
      <text:p text:style-name="P2"><text:s text:c="4"/>: m_gc{gcc}, m_G{GG}, m_T{TT}, m_smInit{gcc, GG, TT}{</text:p>
      <text:p text:style-name="P2"><text:s text:c="4"/>m_Ib0 = m_smInit.getIb0();</text:p>
      <text:p text:style-name="P2"><text:s text:c="4"/>m_Ib0sg = gcc.S*m_Ib0;</text:p>
      <text:p text:style-name="P2"/>
      <text:p text:style-name="P2"><text:s text:c="4"/>// getI のために IscSub, m_Vmin, m_Vmaxをセットする</text:p>
      <text:p text:style-name="P2"><text:s text:c="4"/>m_Vmin = m_smInit.getVmin();</text:p>
      <text:p text:style-name="P2"><text:s text:c="4"/>m_Vmax = m_smInit.getVmax();</text:p>
      <text:p text:style-name="P2"><text:s text:c="4"/></text:p>
      <text:p text:style-name="P2"><text:s text:c="4"/>for(int i=0; i&lt;m_vsm.size(); i++){</text:p>
      <text:p text:style-name="P2"><text:tab/>double Vmin_i = m_vsm[i].getVmin();</text:p>
      <text:p text:style-name="P2"><text:tab/>double Vmax_i = m_vsm[i].getVmax();</text:p>
      <text:p text:style-name="P2"><text:tab/>if(Vmin_i &gt; m_Vmin) m_Vmin = Vmin_i; <text:s text:c="2"/>// m_Vminはmax Vmin_i</text:p>
      <text:p text:style-name="P2"><text:tab/>if(Vmax_i &gt; m_Vmax) m_Vmax = Vmax_i;</text:p>
      <text:p text:style-name="P2"><text:s text:c="4"/>}</text:p>
      <text:p text:style-name="P2"/>
      <text:p text:style-name="P2"><text:s text:c="4"/>m_Imin = getI(m_Vmax);</text:p>
      <text:p text:style-name="P2"><text:s text:c="4"/>m_Imax = getI(m_Vmin);</text:p>
      <text:p text:style-name="P2"/>
      <text:p text:style-name="P2"><text:s text:c="4"/>// std::cout &lt;&lt; std::setprecision(20) &lt;&lt; "m_Vmin=" &lt;&lt; m_Vmin</text:p>
      <text:p text:style-name="P2"><text:s text:c="4"/>// <text:tab/> <text:s text:c="5"/>&lt;&lt; " m_Vmax=" &lt;&lt; m_Vmax &lt;&lt; " m_Imin=" &lt;&lt; m_Imin &lt;&lt; " m_Imax=" &lt;&lt; m_Imax &lt;&lt; std::endl; /////////////////////////////t</text:p>
      <text:p text:style-name="P2">}</text:p>
      <text:p text:style-name="P2"/>
      <text:p text:style-name="P2">/** Calculate stringGroup current I (A) for voltage V (V) <text:s text:c="3"/>************************</text:p>
      <text:p text:style-name="P2"><text:s/>* <text:s/>入力： m_Vmin, m_Vmax, m_Ib0sg, m_vsm</text:p>
      <text:p text:style-name="P2"><text:s/>* <text:s/>関数呼び出し： m_smInit,getI, m_vsm[i].getI <text:s text:c="5"/>*******************************/</text:p>
      <text:p text:style-name="P2">double StringGroup::getI(double V){</text:p>
      <text:p text:style-name="P2"><text:soft-page-break/><text:s text:c="4"/>if(V &lt; m_Vmin) return std::numeric_limits&lt;double&gt;::infinity();</text:p>
      <text:p text:style-name="P2"><text:s text:c="4"/>else if(m_Vmax &lt; V) return -m_Ib0sg;</text:p>
      <text:p text:style-name="P2"><text:s text:c="4"/>else{</text:p>
      <text:p text:style-name="P2"><text:tab/>double I = (m_gc.S-m_vsm.size()) * m_smInit.getI(V);</text:p>
      <text:p text:style-name="P2"><text:tab/>for(int i=0; i&lt;m_vsm.size(); i++){</text:p>
      <text:p text:style-name="P2"><text:tab/> <text:s text:c="3"/>I += m_vsm[i].getI(V);</text:p>
      <text:p text:style-name="P2"><text:tab/>}</text:p>
      <text:p text:style-name="P2"><text:tab/>return I;</text:p>
      <text:p text:style-name="P2"><text:s text:c="4"/>}</text:p>
      <text:p text:style-name="P2">}</text:p>
      <text:p text:style-name="P2"/>
      <text:p text:style-name="P2">/** Calculate stringGroup voltage V (V) for current I (A) <text:s text:c="3"/>************************</text:p>
      <text:p text:style-name="P2"><text:s/>* <text:s/>入力： m_Imax, m_Vmin <text:s text:c="7"/>***************************************************/</text:p>
      <text:p text:style-name="P2">double StringGroup::getV(double I){</text:p>
      <text:p text:style-name="P2"><text:s text:c="4"/>if(m_Imax &lt; I) return m_Vmin;</text:p>
      <text:p text:style-name="P2"><text:s text:c="4"/>else if(-m_Ib0sg &lt;= I &amp;&amp; I &lt; m_Imin) return std::numeric_limits&lt;double&gt;::infinity();</text:p>
      <text:p text:style-name="P2"><text:s text:c="4"/>else if(I &lt; -m_Ib0sg) return <text:s/>std::numeric_limits&lt;double&gt;::quiet_NaN();</text:p>
      <text:p text:style-name="P2"><text:s text:c="4"/>else{</text:p>
      <text:p text:style-name="P2"><text:tab/>Bisection&lt;StringGroup&gt; bis {this};</text:p>
      <text:p text:style-name="P2"><text:tab/>m_Ifunc = I;</text:p>
      <text:p text:style-name="P2"><text:tab/>return bis.search(m_Vmin, m_Vmax);</text:p>
      <text:p text:style-name="P2"><text:s text:c="4"/>}</text:p>
      <text:p text:style-name="P2"><text:s text:c="4"/>return 0.0;</text:p>
      <text:p text:style-name="P2">}</text:p>
      <text:p text:style-name="P2"/>
      <text:p text:style-name="P2">/*************** <text:s text:c="4"/>getIで使われる２分法用のメソッド <text:s text:c="5"/>**************************/</text:p>
      <text:p text:style-name="P2">double StringGroup::func(double V){</text:p>
      <text:p text:style-name="P2"><text:s text:c="4"/>return getI(V)-m_Ifunc;</text:p>
      <text:p text:style-name="P2">}</text:p>
      <text:p text:style-name="P2"/>
      <text:p text:style-name="P2">/** 測定データG, T, I, V に最もフィットするパラメータを探索して、それに設定する <text:s text:c="2"/>***</text:p>
      <text:p text:style-name="P2"><text:s/>* <text:s/>出力： m_aG[], m_aT[], m_aIsg[], m_aVsg[] <text:s text:c="4"/>**********************************/</text:p>
      <text:p text:style-name="P2">void StringGroup::paramEstim(double GG[], double TT[], double II[], double VV[], std::string Time[]){</text:p>
      <text:p text:style-name="P2"><text:s text:c="4"/>for(int k=0; k&lt;m_gc.K; k++){</text:p>
      <text:p text:style-name="P2"><text:tab/>m_aG[k] = GG[k];</text:p>
      <text:p text:style-name="P2"><text:tab/>m_aT[k] = TT[k];</text:p>
      <text:p text:style-name="P2"><text:tab/>m_aIsg[k] = II[k];</text:p>
      <text:p text:style-name="P2"><text:tab/>m_aVsg[k] = VV[k];</text:p>
      <text:p text:style-name="P2"><text:s text:c="4"/>}</text:p>
      <text:p text:style-name="P2"><text:s text:c="4"/></text:p>
      <text:p text:style-name="P2"><text:s text:c="4"/>float Eret = m_smInit.setVars(GG, TT);</text:p>
      <text:p text:style-name="P2"><text:s text:c="4"/>if(Eret==INFINITY){</text:p>
      <text:p text:style-name="P2"><text:tab/>std::cout &lt;&lt; "StringGroup::paramEstim, smInit.setVars()=INFINITY, error\n";</text:p>
      <text:p text:style-name="P2"><text:tab/>exit(-1);</text:p>
      <text:p text:style-name="P2"><text:s text:c="4"/>}</text:p>
      <text:p text:style-name="P2"/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smInit.getIjunbi(k);</text:p>
      <text:p text:style-name="P2"><text:tab/>IkStr[k] = m_smInit.getI(VV[k]);</text:p>
      <text:p text:style-name="P2"><text:tab/>// printf("Imeas[%d]=%g, I=%g\n", k, II[k], IkStr[k]*m_gc.S);//////////////////t </text:p>
      <text:p text:style-name="P2"><text:s text:c="4"/>}</text:p>
      <text:p text:style-name="P2"/>
      <text:p text:style-name="P2"><text:s text:c="4"/>m_smInit.set_aIk(IkStr);</text:p>
      <text:p text:style-name="P2"><text:s text:c="4"/></text:p>
      <text:p text:style-name="P2"><text:s text:c="4"/>double bunsi {0.0};</text:p>
      <text:p text:style-name="P2"><text:s text:c="4"/>double bunbo {0.0};</text:p>
      <text:p text:style-name="P2"><text:s text:c="4"/>for(int k=0; k&lt;m_gc.K; k++){</text:p>
      <text:p text:style-name="P2"><text:tab/>double x = II[k]-IkStr[k]*m_gc.S;</text:p>
      <text:p text:style-name="P2"><text:tab/>bunsi += x*x;</text:p>
      <text:p text:style-name="P2"><text:tab/>bunbo += II[k]*II[k];</text:p>
      <text:p text:style-name="P2"><text:s text:c="4"/>}</text:p>
      <text:p text:style-name="P2"><text:s text:c="4"/>m_bunbo = bunbo;</text:p>
      <text:p text:style-name="P2"><text:s text:c="4"/>double E = sqrt(bunsi/bunbo);</text:p>
      <text:p text:style-name="P2"><text:soft-page-break/><text:s text:c="4"/>printf("E=%g\n", E);//////////////////t</text:p>
      <text:p text:style-name="P2"/>
      <text:p text:style-name="P2"><text:s text:c="4"/>// double EminPre = E;</text:p>
      <text:p text:style-name="P2"><text:s text:c="4"/>// double EminPreString = E;</text:p>
      <text:p text:style-name="P2"/>
      <text:p text:style-name="P2"><text:s text:c="4"/>for(int s=0; s &lt; m_gc.S; s++){ // 各ストリングsに対して</text:p>
      <text:p text:style-name="P2"><text:tab/>StringModel sm_s {m_gc, 1000.0, 25.0};</text:p>
      <text:p text:style-name="P2"><text:tab/>Eret = sm_s.setVars(GG, TT);</text:p>
      <text:p text:style-name="P2"><text:tab/>if(Eret==INFINITY){</text:p>
      <text:p text:style-name="P2"><text:tab/> <text:s text:c="3"/>std::cout &lt;&lt; "StringGroup::paramEstim, sm_s.setVars()=INFINITY, error\n";</text:p>
      <text:p text:style-name="P2"><text:tab/> <text:s text:c="3"/>exit(-1);</text:p>
      <text:p text:style-name="P2"><text:tab/>}</text:p>
      <text:p text:style-name="P2"><text:tab/></text:p>
      <text:p text:style-name="P2"><text:tab/>m_vsm.push_back(sm_s);</text:p>
      <text:p text:style-name="P2"/>
      <text:p text:style-name="P2"><text:tab/>for(int l=0; l&lt;m_gc.L; l++){ // 各サブストリングlに対して</text:p>
      <text:p text:style-name="P2"><text:tab/> <text:s text:c="3"/>m_vsm[s].addSS();</text:p>
      <text:p text:style-name="P2"><text:tab/> <text:s text:c="3"/>// m_vsm[s].m_vss[l].setVars(GG, TT);////////// 2024/6/8</text:p>
      <text:p text:style-name="P2"><text:tab/> <text:s text:c="3"/>m_vsm[s].setVarsVss(GG, TT, l); <text:s/>// 2024/6/9</text:p>
      <text:p text:style-name="P2"/>
      <text:p text:style-name="P2"><text:tab/> <text:s text:c="3"/>double X[4];</text:p>
      <text:p text:style-name="P2"><text:tab/> <text:s text:c="3"/>ELPSOsearch(X, s, l);</text:p>
      <text:p text:style-name="P2"/>
      <text:p text:style-name="P2"/>
      <text:p text:style-name="P2"><text:tab/> <text:s text:c="3"/>for(int i=0; i&lt;4; i++){</text:p>
      <text:p text:style-name="P2"><text:tab/><text:tab/>printf("X[%d]=%g\n", i, X[i]);</text:p>
      <text:p text:style-name="P2"><text:tab/> <text:s text:c="3"/>}</text:p>
      <text:p text:style-name="P2"/>
      <text:p text:style-name="P2"><text:tab/> <text:s text:c="3"/>double Emin = getE(X, s, l);</text:p>
      <text:p text:style-name="P2"><text:tab/> <text:s text:c="3"/>printf("Emin=%g\n", Emin);</text:p>
      <text:p text:style-name="P2"/>
      <text:p text:style-name="P2"><text:tab/> <text:s text:c="3"/>break;//////////////////t</text:p>
      <text:p text:style-name="P2"><text:tab/>}</text:p>
      <text:p text:style-name="P2"/>
      <text:p text:style-name="P2"><text:tab/>for(int k=0; k&lt;m_gc.K; k++){</text:p>
      <text:p text:style-name="P2"><text:tab/> <text:s text:c="3"/>m_vsm[s].getIjunbi(k);</text:p>
      <text:p text:style-name="P2"><text:tab/> <text:s text:c="3"/>IkStr[k] = m_vsm[s].getI(VV[k]);</text:p>
      <text:p text:style-name="P2"><text:tab/> <text:s text:c="3"/>// std::cout &lt;&lt; "s=" &lt;&lt; s &lt;&lt; " k=" &lt;&lt; k &lt;&lt; " IkStr=" &lt;&lt; IkStr[k] &lt;&lt; std::endl;///////t </text:p>
      <text:p text:style-name="P2"><text:tab/>}</text:p>
      <text:p text:style-name="P2"/>
      <text:p text:style-name="P2"><text:tab/>m_vsm[s].set_aIk(IkStr);</text:p>
      <text:p text:style-name="P2"><text:tab/></text:p>
      <text:p text:style-name="P2"><text:tab/>break;//////////////t</text:p>
      <text:p text:style-name="P2"><text:s text:c="4"/>}</text:p>
      <text:p text:style-name="P2">}</text:p>
      <text:p text:style-name="P2"/>
      <text:p text:style-name="P2">/** ストリングsのサブストリングlのSTCパラメータIscSTC, VocSTC, ImpSTC, VmpSTCを <text:s text:c="2"/>***</text:p>
      <text:p text:style-name="P2"><text:s/>* <text:s/>Xで決めて、誤差関数Eの値を計算して返す</text:p>
      <text:p text:style-name="P2"><text:s/>* <text:s/>入力： m_aG[], m_aT[], m_aVsg[], m_gc, m_vsm, m_aIsg, m_smInit</text:p>
      <text:p text:style-name="P2"><text:s/>* <text:s/>関数呼び出し： StringModel::setSS_STCparams, StringModel::setVars,</text:p>
      <text:p text:style-name="P2"><text:s/>* <text:s text:c="16"/>StringModel::getIjunbi, StringModel::getI,</text:p>
      <text:p text:style-name="P2"><text:s/>* <text:s text:c="16"/>StringModel.set_aIk, StringModel::get_aIk <text:s text:c="2"/>**********************/</text:p>
      <text:p text:style-name="P2">double StringGroup::getE(double X[4], int s, int l){</text:p>
      <text:p text:style-name="P2"><text:s text:c="4"/>m_vsm[s].setSS_STCparams(X, l);</text:p>
      <text:p text:style-name="P2"><text:s text:c="4"/>// m_vsm[s].m_vss[l].m_am.setSTCparams(X); <text:s/>// 一行上よりかえって遅くなった 2024/6/8</text:p>
      <text:p text:style-name="P2"><text:s text:c="4"/>// if(m_vsm[s].setVars(m_aG, m_aT)==INFINITY) return INFINITY;</text:p>
      <text:p text:style-name="P2"><text:s text:c="4"/>// if(m_vsm[s].setVarsVss(m_aG, m_aT, l)==INFINITY) return INFINITY;</text:p>
      <text:p text:style-name="P2"><text:s text:c="4"/>// m_vsm[s].m_vss[l].m_am.calcPCS(m_aG, m_aT);</text:p>
      <text:p text:style-name="P2"><text:s text:c="4"/>if(m_vsm[s].setVarsVssGetE(l)==INFINITY) return INFINITY;</text:p>
      <text:p text:style-name="P2"><text:s text:c="4"/></text:p>
      <text:p text:style-name="P2"><text:s text:c="4"/>double IkStr[GlobalConstants::K];</text:p>
      <text:p text:style-name="P2"><text:s text:c="4"/></text:p>
      <text:p text:style-name="P2"><text:s text:c="4"/>for(int k=0; k&lt;m_gc.K; k++){</text:p>
      <text:p text:style-name="P2"><text:tab/>m_vsm[s].getIjunbi(k, l);</text:p>
      <text:p text:style-name="P2"><text:tab/>IkStr[k] = m_vsm[s].getI(m_aVsg[k]);</text:p>
      <text:p text:style-name="P2"><text:soft-page-break/><text:tab/>// printf("Isg[%d]/S=%g, Istr=%g\n", k, m_aIsg[k]/m_gc.S, IkStr[k]);//////////////////t </text:p>
      <text:p text:style-name="P2"><text:s text:c="4"/>}</text:p>
      <text:p text:style-name="P2"><text:s text:c="4"/>// m_vsm[s].getI(l, m_aVsg, IkStr); <text:s/>// かえって遅くなった、不採用</text:p>
      <text:p text:style-name="P2"/>
      <text:p text:style-name="P2"><text:s text:c="4"/>m_vsm[s].set_aIk(IkStr);</text:p>
      <text:p text:style-name="P2"><text:s text:c="4"/></text:p>
      <text:p text:style-name="P2"><text:s text:c="4"/>double bunsi {0.0};</text:p>
      <text:p text:style-name="P2"><text:s text:c="4"/>// double bunbo {0.0};</text:p>
      <text:p text:style-name="P2"><text:s text:c="4"/>for(int k=0; k&lt;m_gc.K; k++){</text:p>
      <text:p text:style-name="P2"><text:tab/>double x = m_aIsg[k];</text:p>
      <text:p text:style-name="P2"><text:tab/>// bunbo += x*x;</text:p>
      <text:p text:style-name="P2"><text:tab/>for(int s1=0; s1&lt;=s; s1++) x -= m_vsm[s1].get_aIk(k);</text:p>
      <text:p text:style-name="P2"><text:tab/>x -= m_smInit.get_aIk(k)*(m_gc.S-m_vsm.size());</text:p>
      <text:p text:style-name="P2"><text:tab/>bunsi += x*x;</text:p>
      <text:p text:style-name="P2"><text:s text:c="4"/>}</text:p>
      <text:p text:style-name="P2"><text:s text:c="4"/>double E = sqrt(bunsi/m_bunbo);</text:p>
      <text:p text:style-name="P2"><text:s text:c="4"/>// std::cout &lt;&lt; "E=" &lt;&lt; E &lt;&lt; " bunsi=" &lt;&lt; bunsi &lt;&lt; " bunbo=" &lt;&lt; bunbo &lt;&lt; std::endl;//////t</text:p>
      <text:p text:style-name="P2"><text:s text:c="4"/>// <text:s text:c="3"/>printf("E=%g\n", E);//////////////////t</text:p>
      <text:p text:style-name="P2"/>
      <text:p text:style-name="P2"><text:s text:c="4"/>return E;</text:p>
      <text:p text:style-name="P2">}</text:p>
      <text:p text:style-name="P2"/>
      <text:p text:style-name="P2">/************************* <text:s text:c="4"/>******************************************************/</text:p>
      <text:p text:style-name="P2">void StringGroup::ELPSOsearch(double XX[4], int ss, int ll){</text:p>
      <text:p text:style-name="P2"><text:s text:c="4"/>const int varNum {4}; </text:p>
      <text:p text:style-name="P2"><text:s text:c="4"/>// const int Np {100};</text:p>
      <text:p text:style-name="P2"><text:s text:c="4"/>const int Np {70};</text:p>
      <text:p text:style-name="P2"/>
      <text:p text:style-name="P2"><text:s text:c="4"/>double VocSTCss = m_gc.getVocSTCss();</text:p>
      <text:p text:style-name="P2"><text:s text:c="4"/>const double Xmin[] = {0.5*m_gc.IscSTC, 0.5*VocSTCss, 0.4, 0.5};</text:p>
      <text:p text:style-name="P2"><text:s text:c="4"/>const double Xmax[] = {1.2*m_gc.IscSTC, 1.2*VocSTCss, 0.98, 1.0};</text:p>
      <text:p text:style-name="P2"><text:s text:c="4"/>const double Xinit[] = {m_gc.IscSTC, VocSTCss, m_gc.ImpSTC/m_gc.IscSTC, m_gc.VmpSTC/m_gc.VocSTC};</text:p>
      <text:p text:style-name="P2"/>
      <text:p text:style-name="P2"><text:s text:c="4"/>// printf("Xmin: %g %g %g %g\n", Xmin[0], <text:s/>Xmin[1], <text:s/>Xmin[2], <text:s/>Xmin[3]); </text:p>
      <text:p text:style-name="P2"><text:s text:c="4"/>// printf("Xmax: %g %g %g %g\n", Xmax[0], <text:s/>Xmax[1], <text:s/>Xmax[2], <text:s/>Xmax[3]);</text:p>
      <text:p text:style-name="P2"><text:s text:c="4"/>// return;</text:p>
      <text:p text:style-name="P2"><text:s text:c="4"/></text:p>
      <text:p text:style-name="P2"><text:s text:c="4"/>double X[Np][varNum];</text:p>
      <text:p text:style-name="P2"><text:s text:c="4"/>double P[Np][varNum]; <text:s/>// Personal best</text:p>
      <text:p text:style-name="P2"><text:s text:c="4"/>double Pg[varNum]; <text:s/>// Global best</text:p>
      <text:p text:style-name="P2"/>
      <text:p text:style-name="P2"><text:s text:c="4"/>double Eval_P[Np];</text:p>
      <text:p text:style-name="P2"><text:s text:c="4"/>for(int i=0; i&lt;Np; i++) Eval_P[i] = INFINITY;</text:p>
      <text:p text:style-name="P2"><text:s text:c="4"/>double Eval_Pg {INFINITY};</text:p>
      <text:p text:style-name="P2"><text:s text:c="4"/></text:p>
      <text:p text:style-name="P2"><text:s text:c="4"/>double V[Np][varNum];</text:p>
      <text:p text:style-name="P2"><text:s text:c="4"/>for(int i=0; i&lt;Np; i++)</text:p>
      <text:p text:style-name="P2"><text:tab/>for(int j=0; j&lt;varNum; j++) V[i][j] = 0.0;</text:p>
      <text:p text:style-name="P2"/>
      <text:p text:style-name="P2"><text:s text:c="4"/>// int tMax = 1000;</text:p>
      <text:p text:style-name="P2"><text:s text:c="4"/>int tMax = 6; <text:s text:c="2"/>////////////////////////////t</text:p>
      <text:p text:style-name="P2"/>
      <text:p text:style-name="P2"><text:s text:c="4"/>double w {0.9};</text:p>
      <text:p text:style-name="P2"><text:s text:c="4"/>double del_w {(0.9-0.4)/tMax};</text:p>
      <text:p text:style-name="P2"><text:s text:c="4"/>double C1 {2.0};</text:p>
      <text:p text:style-name="P2"><text:s text:c="4"/>double C2 {2.0};</text:p>
      <text:p text:style-name="P2"/>
      <text:p text:style-name="P2"><text:s text:c="4"/>double a {0.5};</text:p>
      <text:p text:style-name="P2"><text:s text:c="4"/>double del_a = {(0.5-0.1)/tMax};</text:p>
      <text:p text:style-name="P2"><text:s text:c="4"/>double s {0.9};</text:p>
      <text:p text:style-name="P2"><text:s text:c="4"/>double del_s {(0.9-0.4)/tMax};</text:p>
      <text:p text:style-name="P2"/>
      <text:p text:style-name="P2"><text:s text:c="4"/>std::random_device rd;</text:p>
      <text:p text:style-name="P2"><text:s text:c="4"/>std::default_random_engine engine {rd()};</text:p>
      <text:p text:style-name="P2"><text:soft-page-break/><text:s text:c="4"/>std::uniform_real_distribution&lt;double&gt; uniform {0.0, 1.0}; </text:p>
      <text:p text:style-name="P2"/>
      <text:p text:style-name="P2"><text:s text:c="4"/>// for(int i=0; i&lt;10; i++){</text:p>
      <text:p text:style-name="P2"><text:s text:c="4"/>// <text:tab/>std::cout &lt;&lt; distribution(engine) &lt;&lt; " ";</text:p>
      <text:p text:style-name="P2"><text:s text:c="4"/>// }</text:p>
      <text:p text:style-name="P2"><text:s text:c="4"/>// printf("\n");</text:p>
      <text:p text:style-name="P2"/>
      <text:p text:style-name="P2"><text:s text:c="4"/>for(int k=0; k&lt;varNum; k++) X[0][k] = Xinit[k];</text:p>
      <text:p text:style-name="P2"><text:s text:c="4"/></text:p>
      <text:p text:style-name="P2"><text:s text:c="4"/>for(int i=1; i&lt;Np; i++){</text:p>
      <text:p text:style-name="P2"><text:tab/>for(int k=0; k&lt;varNum; k++){</text:p>
      <text:p text:style-name="P2"><text:tab/> <text:s text:c="3"/>X[i][k] = Xmin[k] +(Xmax[k]-Xmin[k])*uniform(engine);</text:p>
      <text:p text:style-name="P2"><text:tab/>}</text:p>
      <text:p text:style-name="P2"><text:s text:c="4"/>}</text:p>
      <text:p text:style-name="P2"/>
      <text:p text:style-name="P2"><text:s text:c="4"/>// for(int i=0; i&lt;Np; i++){</text:p>
      <text:p text:style-name="P2"><text:s text:c="4"/>// <text:tab/>printf("##### X[%d][]\n", i);</text:p>
      <text:p text:style-name="P2"><text:s text:c="4"/>// <text:tab/>for(int k=0; k&lt;varNum; k++){</text:p>
      <text:p text:style-name="P2"><text:s text:c="4"/>// <text:tab/> <text:s text:c="3"/>printf("%g ", X[i][k]);</text:p>
      <text:p text:style-name="P2"><text:s text:c="4"/>// <text:tab/>}</text:p>
      <text:p text:style-name="P2"><text:s text:c="4"/>// <text:tab/>printf("\n");</text:p>
      <text:p text:style-name="P2"><text:s text:c="4"/>// }</text:p>
      <text:p text:style-name="P2"/>
      <text:p text:style-name="P2"><text:s text:c="4"/>for(int i=1; i&lt;Np; i++)</text:p>
      <text:p text:style-name="P2"><text:tab/>for(int k=0; k&lt;varNum; k++) P[i][k] = X[i][k];</text:p>
      <text:p text:style-name="P2"/>
      <text:p text:style-name="P2"><text:s text:c="4"/>for(int k=0; k&lt;varNum; k++) Pg[k] = X[0][k];</text:p>
      <text:p text:style-name="P2"/>
      <text:p text:style-name="P2"><text:s text:c="4"/>std::normal_distribution&lt;double&gt; normal {0.0, 1.0};</text:p>
      <text:p text:style-name="P2"><text:s text:c="4"/>std::cauchy_distribution&lt;double&gt; cauchy {0.0, 1.0};</text:p>
      <text:p text:style-name="P2"/>
      <text:p text:style-name="P2"><text:s text:c="4"/>for(int t=1; t&lt;=tMax; t++){</text:p>
      <text:p text:style-name="P2"><text:tab/>for(int i=0; i&lt;Np; i++){</text:p>
      <text:p text:style-name="P2"><text:tab/> <text:s text:c="3"/>double Eval_Xi = getE(X[i], ss, ll);</text:p>
      <text:p text:style-name="P2"/>
      <text:p text:style-name="P2"><text:tab/> <text:s text:c="3"/>if(Eval_Xi &lt; Eval_P[i]){</text:p>
      <text:p text:style-name="P2"><text:tab/><text:tab/>Eval_P[i] = Eval_Xi;</text:p>
      <text:p text:style-name="P2"><text:tab/><text:tab/>for(int k=0; k&lt;varNum; k++) P[i][k] = X[i][k];</text:p>
      <text:p text:style-name="P2"><text:tab/> <text:s text:c="3"/>}</text:p>
      <text:p text:style-name="P2"><text:tab/> <text:s text:c="3"/>if(Eval_Xi &lt; Eval_Pg){</text:p>
      <text:p text:style-name="P2"><text:tab/><text:tab/>Eval_Pg = Eval_Xi;</text:p>
      <text:p text:style-name="P2"><text:tab/><text:tab/>for(int k=0; k&lt;varNum; k++) Pg[k] = X[i][k];</text:p>
      <text:p text:style-name="P2"><text:tab/> <text:s text:c="3"/>}</text:p>
      <text:p text:style-name="P2"><text:tab/>}</text:p>
      <text:p text:style-name="P2"/>
      <text:p text:style-name="P2"><text:tab/>if(Eval_Pg &lt; 1.0E-8) break; // 収束条件</text:p>
      <text:p text:style-name="P2"/>
      <text:p text:style-name="P2"><text:tab/>for(int i=0; i&lt;Np; i++){</text:p>
      <text:p text:style-name="P2"><text:tab/> <text:s text:c="3"/>for(int k=0; k&lt;varNum; k++){</text:p>
      <text:p text:style-name="P2"><text:tab/><text:tab/>V[i][k] = w*V[i][k] +C1*uniform(engine)*(P[i][k]-X[i][k])</text:p>
      <text:p text:style-name="P2"><text:tab/><text:tab/> <text:s text:c="3"/>+C2*uniform(engine)*(Pg[k]-X[i][k]);</text:p>
      <text:p text:style-name="P2"><text:tab/> <text:s text:c="3"/>}</text:p>
      <text:p text:style-name="P2"><text:tab/>}</text:p>
      <text:p text:style-name="P2"/>
      <text:p text:style-name="P2"><text:tab/>for(int i=0; i&lt;Np; i++){</text:p>
      <text:p text:style-name="P2"><text:tab/> <text:s text:c="3"/>for(int k=0; k&lt;varNum; k++){</text:p>
      <text:p text:style-name="P2"><text:tab/><text:tab/>X[i][k] += V[i][k];</text:p>
      <text:p text:style-name="P2"><text:tab/><text:tab/>if(X[i][k] &lt; Xmin[k]) X[i][k] = Xmin[k];</text:p>
      <text:p text:style-name="P2"><text:tab/><text:tab/>if(X[i][k] &gt; Xmax[k]) X[i][k] = Xmax[k];</text:p>
      <text:p text:style-name="P2"><text:tab/> <text:s text:c="3"/>}</text:p>
      <text:p text:style-name="P2"><text:tab/>}</text:p>
      <text:p text:style-name="P2"/>
      <text:p text:style-name="P2"><text:tab/>// mutation of Pg</text:p>
      <text:p text:style-name="P2"><text:tab/>double Pg1[varNum];</text:p>
      <text:p text:style-name="P2"><text:tab/>for(int k=0; k&lt;varNum; k++){</text:p>
      <text:p text:style-name="P2"><text:soft-page-break/><text:tab/> <text:s text:c="3"/>Pg1[k] = Pg[k] +(Xmax[k]-Xmin[k])*normal(engine)*a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><text:tab/></text:p>
      <text:p text:style-name="P2"><text:tab/>double 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Pg1[k] = Pg[k] +(Xmax[k]-Xmin[k])*cauchy(engine)*s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for(int k=0; k&lt;varNum; k++){</text:p>
      <text:p text:style-name="P2"><text:tab/> <text:s text:c="3"/>for(int kk=0; kk&lt;varNum; kk++){</text:p>
      <text:p text:style-name="P2"><text:tab/><text:tab/>if(kk==k){</text:p>
      <text:p text:style-name="P2"><text:tab/><text:tab/> <text:s text:c="3"/>Pg1[kk] = Xmin[kk]+Xmax[kk]-Pg[kk];</text:p>
      <text:p text:style-name="P2"><text:tab/><text:tab/> <text:s text:c="3"/>if(Pg1[kk] &lt; Xmin[kk]) Pg1[kk] = Xmin[kk];</text:p>
      <text:p text:style-name="P2"><text:tab/><text:tab/> <text:s text:c="3"/>if(Pg1[kk] &gt; Xmax[kk]) Pg1[kk] = Xmax[kk];</text:p>
      <text:p text:style-name="P2"><text:tab/><text:tab/>}</text:p>
      <text:p text:style-name="P2"><text:tab/><text:tab/>else Pg1[kk] = Pg[kk];</text:p>
      <text:p text:style-name="P2"><text:tab/> <text:s text:c="3"/>}</text:p>
      <text:p text:style-name="P2"/>
      <text:p text:style-name="P2"><text:tab/> <text:s text:c="3"/>Eval_Pg1 = getE(Pg1, ss, ll);</text:p>
      <text:p text:style-name="P2"><text:tab/> <text:s text:c="3"/>if(Eval_Pg1 &lt; Eval_Pg){</text:p>
      <text:p text:style-name="P2"><text:tab/><text:tab/>Eval_Pg = Eval_Pg1;</text:p>
      <text:p text:style-name="P2"><text:tab/><text:tab/>for(int j=0; j&lt;varNum; j++) Pg[j] = Pg1[j];</text:p>
      <text:p text:style-name="P2"><text:tab/> <text:s text:c="3"/>}</text:p>
      <text:p text:style-name="P2"><text:tab/>}</text:p>
      <text:p text:style-name="P2"/>
      <text:p text:style-name="P2"><text:tab/>int e = uniform(engine)*Np;</text:p>
      <text:p text:style-name="P2"><text:tab/>int q = uniform(engine)*Np;</text:p>
      <text:p text:style-name="P2"><text:tab/>for(int k=0; k&lt;varNum; k++){</text:p>
      <text:p text:style-name="P2"><text:tab/> <text:s text:c="3"/>Pg1[k] = Pg[k]+0.5*(X[e][k]-X[q][k]);</text:p>
      <text:p text:style-name="P2"><text:tab/> <text:s text:c="3"/>if(Pg1[k] &lt; Xmin[k]) Pg1[k] = Xmin[k];</text:p>
      <text:p text:style-name="P2"><text:tab/> <text:s text:c="3"/>if(Pg1[k] &gt; Xmax[k]) Pg1[k] = Xmax[k];</text:p>
      <text:p text:style-name="P2"><text:tab/>}</text:p>
      <text:p text:style-name="P2"/>
      <text:p text:style-name="P2"><text:tab/>Eval_Pg1 = getE(Pg1, ss, ll);</text:p>
      <text:p text:style-name="P2"><text:tab/>if(Eval_Pg1 &lt; Eval_Pg){</text:p>
      <text:p text:style-name="P2"><text:tab/> <text:s text:c="3"/>Eval_Pg = Eval_Pg1;</text:p>
      <text:p text:style-name="P2"><text:tab/> <text:s text:c="3"/>for(int k=0; k&lt;varNum; k++) Pg[k] = Pg1[k];</text:p>
      <text:p text:style-name="P2"><text:tab/>}</text:p>
      <text:p text:style-name="P2"/>
      <text:p text:style-name="P2"><text:tab/>w -= del_w;</text:p>
      <text:p text:style-name="P2"><text:tab/>a -= del_a;</text:p>
      <text:p text:style-name="P2"><text:tab/>s -= del_s;</text:p>
      <text:p text:style-name="P2"/>
      <text:p text:style-name="P2"><text:tab/>// Show Eval_Pg</text:p>
      <text:p text:style-name="P2"><text:tab/>if(t%1==0){ ///////////////////////////t</text:p>
      <text:p text:style-name="P2"><text:tab/> <text:s text:c="3"/>printf("# t=%d: Eval_Pg= %.6f,", t, Eval_Pg);</text:p>
      <text:p text:style-name="P2"><text:tab/> <text:s text:c="3"/>for(int k=0; k&lt;varNum; k++)</text:p>
      <text:p text:style-name="P2"><text:tab/><text:tab/>printf(" Pg[%d]= %.4f", k, Pg[k]);</text:p>
      <text:p text:style-name="P2"><text:tab/> <text:s text:c="3"/>printf("\n");</text:p>
      <text:p text:style-name="P2"><text:tab/>}</text:p>
      <text:p text:style-name="P2"><text:soft-page-break/><text:s text:c="4"/>}</text:p>
      <text:p text:style-name="P2"/>
      <text:p text:style-name="P2"><text:s text:c="4"/>for(int i=0; i&lt;4; i++)</text:p>
      <text:p text:style-name="P2"><text:tab/>XX[i] = Pg[i]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43" text:date-value="2024-06-11T23:02:32.543000131">2024年6月11日（火）</text:date><text:time style:data-style-name="N61" text:time-value="2024-06-11T23:02:32.543000131">23:02:05</text:time><text:s text:c="11"/><text:page-number text:select-page="current">4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1:15:59.777000000</meta:creation-date>
    <dc:date>2024-06-11T23:02:32.481000000</dc:date>
    <meta:editing-duration>PT5H23M38S</meta:editing-duration>
    <meta:editing-cycles>44</meta:editing-cycles>
    <meta:generator>LibreOffice/7.6.4.1$Windows_X86_64 LibreOffice_project/e19e193f88cd6c0525a17fb7a176ed8e6a3e2aa1</meta:generator>
    <meta:print-date>2024-06-02T13:56:15.753000000</meta:print-date>
    <meta:document-statistic meta:table-count="0" meta:image-count="0" meta:object-count="0" meta:page-count="45" meta:paragraph-count="2485" meta:word-count="12140" meta:character-count="84116" meta:non-whitespace-character-count="69342"/>
  </office:meta>
</office:document-meta>
</file>