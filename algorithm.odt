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ＭＳ Ｐゴシック" svg:font-family="'ＭＳ Ｐゴシック'" style:font-family-generic="modern" style:font-pitch="variable"/>
  </office:font-face-decls>
  <office:automatic-styles>
    <style:style style:name="P1" style:family="paragraph" style:parent-style-name="Standard">
      <style:text-properties style:font-name="ＭＳ Ｐゴシック" style:text-underline-style="solid" style:text-underline-width="auto" style:text-underline-color="font-color" officeooo:rsid="0011b8a6" officeooo:paragraph-rsid="0028ff92" style:font-name-asian="ＭＳ Ｐゴシック"/>
    </style:style>
    <style:style style:name="P2" style:family="paragraph" style:parent-style-name="Standard">
      <style:text-properties style:font-name="ＭＳ Ｐゴシック" officeooo:rsid="0011b8a6" officeooo:paragraph-rsid="0028ff92" style:font-name-asian="ＭＳ Ｐゴシック"/>
    </style:style>
    <style:style style:name="P3" style:family="paragraph" style:parent-style-name="Standard" style:list-style-name="L1">
      <style:text-properties style:font-name="ＭＳ Ｐゴシック" officeooo:rsid="0011b8a6" officeooo:paragraph-rsid="0032613c" style:font-name-asian="ＭＳ Ｐゴシック"/>
    </style:style>
    <style:style style:name="P4" style:family="paragraph" style:parent-style-name="Standard" style:list-style-name="L1">
      <style:text-properties style:font-name="ＭＳ Ｐゴシック" officeooo:paragraph-rsid="0028ff92" style:font-name-asian="ＭＳ Ｐゴシック"/>
    </style:style>
    <style:style style:name="P5" style:family="paragraph" style:parent-style-name="Standard" style:list-style-name="L1">
      <style:text-properties style:font-name="ＭＳ Ｐゴシック" officeooo:rsid="0012fabc" officeooo:paragraph-rsid="0028ff92" style:font-name-asian="ＭＳ Ｐゴシック"/>
    </style:style>
    <style:style style:name="P6" style:family="paragraph" style:parent-style-name="Standard" style:list-style-name="L1">
      <style:text-properties style:font-name="ＭＳ Ｐゴシック" officeooo:rsid="001621c9" officeooo:paragraph-rsid="0028ff92" style:font-name-asian="ＭＳ Ｐゴシック"/>
    </style:style>
    <style:style style:name="P7" style:family="paragraph" style:parent-style-name="Standard" style:list-style-name="L1">
      <style:text-properties style:font-name="ＭＳ Ｐゴシック" officeooo:rsid="0028ff92" officeooo:paragraph-rsid="0028ff92" style:font-name-asian="ＭＳ Ｐゴシック"/>
    </style:style>
    <style:style style:name="P8" style:family="paragraph" style:parent-style-name="Standard" style:list-style-name="L1">
      <style:text-properties style:font-name="ＭＳ Ｐゴシック" officeooo:rsid="002b8e32" officeooo:paragraph-rsid="002b8e32" style:font-name-asian="ＭＳ Ｐゴシック"/>
    </style:style>
    <style:style style:name="P9" style:family="paragraph" style:parent-style-name="Standard">
      <style:text-properties style:font-name="ＭＳ Ｐゴシック" officeooo:rsid="001621c9" officeooo:paragraph-rsid="0028ff92" style:font-name-asian="ＭＳ Ｐゴシック"/>
    </style:style>
    <style:style style:name="P10" style:family="paragraph" style:parent-style-name="Standard">
      <style:text-properties style:font-name="ＭＳ Ｐゴシック" style:text-underline-style="solid" style:text-underline-width="auto" style:text-underline-color="font-color" officeooo:rsid="001621c9" officeooo:paragraph-rsid="001621c9" style:font-name-asian="ＭＳ Ｐゴシック"/>
    </style:style>
    <style:style style:name="P11" style:family="paragraph" style:parent-style-name="Standard">
      <style:paragraph-properties fo:margin-left="1.251cm" fo:margin-right="0cm" fo:text-indent="0cm" style:auto-text-indent="false"/>
      <style:text-properties style:font-name="ＭＳ Ｐゴシック" officeooo:rsid="0019d381" officeooo:paragraph-rsid="001621c9" style:font-name-asian="ＭＳ Ｐゴシック"/>
    </style:style>
    <style:style style:name="P12" style:family="paragraph" style:parent-style-name="Standard">
      <style:paragraph-properties fo:margin-left="1.251cm" fo:margin-right="0cm" fo:text-indent="0cm" style:auto-text-indent="false"/>
      <style:text-properties style:font-name="ＭＳ Ｐゴシック" officeooo:rsid="0019d381" officeooo:paragraph-rsid="0019d381" style:font-name-asian="ＭＳ Ｐゴシック"/>
    </style:style>
    <style:style style:name="P13" style:family="paragraph" style:parent-style-name="Standard">
      <style:paragraph-properties fo:margin-left="0cm" fo:margin-right="0cm" fo:text-indent="0cm" style:auto-text-indent="false"/>
      <style:text-properties style:font-name="ＭＳ Ｐゴシック" officeooo:rsid="0019d381" officeooo:paragraph-rsid="0019d381" style:font-name-asian="ＭＳ Ｐゴシック"/>
    </style:style>
    <style:style style:name="P14" style:family="paragraph" style:parent-style-name="Standard">
      <style:paragraph-properties fo:margin-left="0cm" fo:margin-right="0cm" fo:text-indent="0cm" style:auto-text-indent="false"/>
      <style:text-properties style:font-name="ＭＳ Ｐゴシック" style:text-underline-style="solid" style:text-underline-width="auto" style:text-underline-color="font-color" officeooo:rsid="0019d381" officeooo:paragraph-rsid="0019d381" style:font-name-asian="ＭＳ Ｐゴシック"/>
    </style:style>
    <style:style style:name="P15" style:family="paragraph" style:parent-style-name="Standard">
      <style:paragraph-properties fo:margin-left="2.501cm" fo:margin-right="0cm" fo:text-indent="0cm" style:auto-text-indent="false"/>
      <style:text-properties style:font-name="ＭＳ Ｐゴシック" officeooo:rsid="0019d381" officeooo:paragraph-rsid="0019d381" style:font-name-asian="ＭＳ Ｐゴシック"/>
    </style:style>
    <style:style style:name="P16" style:family="paragraph" style:parent-style-name="Standard">
      <style:paragraph-properties fo:margin-left="3.752cm" fo:margin-right="0cm" fo:text-indent="0cm" style:auto-text-indent="false"/>
      <style:text-properties style:font-name="ＭＳ Ｐゴシック" officeooo:rsid="0019d381" officeooo:paragraph-rsid="0019d381" style:font-name-asian="ＭＳ Ｐゴシック"/>
    </style:style>
    <style:style style:name="P17" style:family="paragraph" style:parent-style-name="Standard" style:list-style-name="L2">
      <style:text-properties style:font-name="ＭＳ Ｐゴシック" officeooo:rsid="0019d381" officeooo:paragraph-rsid="001e3936" style:font-name-asian="ＭＳ Ｐゴシック"/>
    </style:style>
    <style:style style:name="P18" style:family="paragraph" style:parent-style-name="Standard" style:list-style-name="L2">
      <style:text-properties style:font-name="ＭＳ Ｐゴシック" officeooo:rsid="0019d381" officeooo:paragraph-rsid="0035e3c4" style:font-name-asian="ＭＳ Ｐゴシック"/>
    </style:style>
    <style:style style:name="P19" style:family="paragraph" style:parent-style-name="Standard" style:list-style-name="L2">
      <style:text-properties style:font-name="ＭＳ Ｐゴシック" officeooo:rsid="0019d381" officeooo:paragraph-rsid="001ec9ea" style:font-name-asian="ＭＳ Ｐゴシック"/>
    </style:style>
    <style:style style:name="P20" style:family="paragraph" style:parent-style-name="Standard" style:list-style-name="L2">
      <style:text-properties style:font-name="ＭＳ Ｐゴシック" officeooo:rsid="001ec9ea" officeooo:paragraph-rsid="001ec9ea" style:font-name-asian="ＭＳ Ｐゴシック"/>
    </style:style>
    <style:style style:name="P21" style:family="paragraph" style:parent-style-name="Standard" style:list-style-name="L2">
      <style:text-properties style:font-name="ＭＳ Ｐゴシック" officeooo:rsid="0012fabc" officeooo:paragraph-rsid="0020be80" style:font-name-asian="ＭＳ Ｐゴシック"/>
    </style:style>
    <style:style style:name="T1" style:family="text">
      <style:text-properties officeooo:rsid="0032613c"/>
    </style:style>
    <style:style style:name="T2" style:family="text">
      <style:text-properties officeooo:rsid="00343c5e"/>
    </style:style>
    <style:style style:name="T3" style:family="text">
      <style:text-properties officeooo:rsid="0012d8c8"/>
    </style:style>
    <style:style style:name="T4" style:family="text">
      <style:text-properties officeooo:rsid="00146011"/>
    </style:style>
    <style:style style:name="T5" style:family="text">
      <style:text-properties officeooo:rsid="0027455b" style:font-family-complex="'Liberation Serif'" style:font-family-generic-complex="roman"/>
    </style:style>
    <style:style style:name="T6" style:family="text">
      <style:text-properties officeooo:rsid="0028ff92" style:font-family-complex="'Liberation Serif'" style:font-family-generic-complex="roman"/>
    </style:style>
    <style:style style:name="T7" style:family="text">
      <style:text-properties style:font-name-complex="Lohit Devanagari1"/>
    </style:style>
    <style:style style:name="T8" style:family="text">
      <style:text-properties officeooo:rsid="002cd1b9"/>
    </style:style>
    <style:style style:name="T9" style:family="text">
      <style:text-properties officeooo:rsid="0017e8de"/>
    </style:style>
    <style:style style:name="T10" style:family="text">
      <style:text-properties officeooo:rsid="0035e3c4"/>
    </style:style>
    <style:style style:name="T11" style:family="text">
      <style:text-properties officeooo:rsid="0011b8a6"/>
    </style:style>
    <style:style style:name="T12" style:family="text">
      <style:text-properties officeooo:rsid="00159e46"/>
    </style:style>
    <style:style style:name="T13" style:family="text">
      <style:text-properties officeooo:rsid="002a2f0a"/>
    </style:style>
    <style:style style:name="T14" style:family="text">
      <style:text-properties officeooo:rsid="00318241"/>
    </style:style>
    <style:style style:name="T15" style:family="text">
      <style:text-properties officeooo:rsid="0028ff92"/>
    </style:style>
    <style:style style:name="T16" style:family="text">
      <style:text-properties officeooo:rsid="0019d381"/>
    </style:style>
    <style:style style:name="T17" style:family="text">
      <style:text-properties officeooo:rsid="0036135f"/>
    </style:style>
    <style:style style:name="T18" style:family="text">
      <style:text-properties officeooo:rsid="001b1e1a"/>
    </style:style>
    <style:style style:name="T19" style:family="text">
      <style:text-properties officeooo:rsid="001dd154"/>
    </style:style>
    <style:style style:name="T20" style:family="text">
      <style:text-properties officeooo:rsid="0011b951"/>
    </style:style>
    <style:style style:name="T21" style:family="text">
      <style:text-properties officeooo:rsid="001bd9d2"/>
    </style:style>
    <style:style style:name="T22" style:family="text">
      <style:text-properties officeooo:rsid="001ec9ea"/>
    </style:style>
    <style:style style:name="fr1" style:family="graphic" style:parent-style-name="Formula">
      <style:graphic-properties style:vertical-pos="from-top" style:horizontal-pos="from-left" style:horizontal-rel="paragraph-content" fo:padding="0.049cm" fo:border="none"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text:span>tringGroup::paramEstimのアルゴリズム</text:p>
      <text:p text:style-name="P2"/>
      <text:p text:style-name="P2">入力 <text:s/>Gk, Tk, Imeas,k, Vmeas,k (k=0,1,…,K-1), <text:span text:style-name="T2">K=4</text:span></text:p>
      <text:p text:style-name="P2"/>
      <text:p text:style-name="P2">出力 stringGroupのストリング<text:span text:style-name="T1">vsm</text:span>(0,1,…)のサブストリング<text:span text:style-name="T1">vss</text:span>(0,1,…) の<text:span text:style-name="T1">4</text:span>パラメータ </text:p>
      <text:p text:style-name="P2"><text:s text:c="11"/>VocSTC, IscSTC, VmpSTC, ImpSTC</text:p>
      <text:p text:style-name="P2"/>
      <text:list text:style-name="L1">
        <text:list-item>
          <text:p text:style-name="P3">s<text:span text:style-name="T1">m</text:span>Init にGk, Tk (k=0,1,…,K-1) を与えて、s<text:span text:style-name="T1">s</text:span>Init のVoc,k, Isc,k, Vmp,k, Imp,k 、それからadaptive one diode modelのパラメータ探索（<text:span text:style-name="T1">GPU</text:span>実行）で、Rs,k, eta,k Rh,k, <text:span text:style-name="T1">I0,k, </text:span>Iph,k, を決定する。</text:p>
        </text:list-item>
        <text:list-item>
          <text:p text:style-name="P4">さらに<text:span text:style-name="T3">s</text:span><text:span text:style-name="T1">s</text:span><text:span text:style-name="T3">Init にVmeas,k (k=0,1,…,K-1) を与えて、電流 Iinit,kを計算する</text:span></text:p>
        </text:list-item>
        <text:list-item>
          <text:p text:style-name="P5">誤差 <draw:frame draw:style-name="fr1" draw:name="オブジェクト4" text:anchor-type="as-char" svg:y="-1.556cm" svg:width="5.263cm" svg:height="2.665cm" draw:z-index="2"><draw:object xlink:href="./Object 4" xlink:type="simple" xlink:show="embed" xlink:actuate="onLoad"/><draw:image xlink:href="./ObjectReplacements/Object 4" xlink:type="simple" xlink:show="embed" xlink:actuate="onLoad"/><svg:desc>数式</svg:desc></draw:frame>を計算する</text:p>
        </text:list-item>
        <text:list-item>
          <text:p text:style-name="P6"><text:span text:style-name="T4">E</text:span>min,pre = <text:span text:style-name="T5">E, </text:span><text:span text:style-name="T6">Emin,preStirng = E</text:span><text:span text:style-name="T7"> にする</text:span></text:p>
        </text:list-item>
        <text:list-item>
          <text:p text:style-name="P5"><text:span text:style-name="T4">各ストリング s=0,1,…,S-1 に対して、</text:span><text:span text:style-name="T8">6</text:span><text:span text:style-name="T4">.-- </text:span><text:span text:style-name="T9">1</text:span><text:span text:style-name="T10">0</text:span><text:span text:style-name="T9">.</text:span><text:span text:style-name="T4"> を実行する</text:span></text:p>
        </text:list-item>
        <text:list-item>
          <text:p text:style-name="P5"><text:span text:style-name="T4">ストリング s の各サブストリング l=0,1,…,L-1に対して、</text:span><text:span text:style-name="T8">7</text:span><text:span text:style-name="T4">.-- </text:span><text:span text:style-name="T10">9</text:span><text:span text:style-name="T9">.</text:span><text:span text:style-name="T4"> を実行する</text:span></text:p>
        </text:list-item>
        <text:list-item>
          <text:p text:style-name="P5"><text:span text:style-name="T4">サブストリング (s, <text:s/>l) の</text:span><text:span text:style-name="T1">4</text:span><text:span text:style-name="T4">パラメータ </text:span><text:span text:style-name="T11">VocSTC, IscSTC, VmpSTC, ImpSTC を動かして、誤差</text:span><text:span text:style-name="T4">Eが最小になるものを見つける。 <text:s text:c="2"/></text:span><text:span text:style-name="T12">Emin とする。</text:span></text:p>
        </text:list-item>
        <text:list-item>
          <text:p text:style-name="P6"><text:span text:style-name="T4">E</text:span>min &gt;= (1-δ)Emin_pre かつ Emin &gt;= Emin,pre – Δ のとき（現在のサブストリングでの探索が、前回のサブストリングでの探索からあまり誤差を減少させなかった）</text:p>
          <text:list>
            <text:list-item>
              <text:p text:style-name="P7">Emin &gt;= (1-δ_string)Emin,preString かつEmin&gt;=Emin,preString-<text:span text:style-name="T13">Δ_stringかつ </text:span><text:span text:style-name="T14">Emin&lt;ε</text:span>なら終了する（現在のストリングでの探索を終わるにあたって、このストリングでの探索が前回のストリングでの探索からあまり誤差を減少させなかった）</text:p>
            </text:list-item>
            <text:list-item>
              <text:p text:style-name="P6">Emin,pre=Emin, <text:span text:style-name="T15">Emin,preString=Emin</text:span>としてから、<text:span text:style-name="T8">6</text:span>. のサブストリングのループをbreakして、<text:span text:style-name="T8">5</text:span>. の次のストリングへ行く</text:p>
            </text:list-item>
          </text:list>
        </text:list-item>
        <text:list-item>
          <text:p text:style-name="P6">Emin,pre = Emin として、次のサブストリングへ行く。</text:p>
        </text:list-item>
        <text:list-item>
          <text:p text:style-name="P8">Emin,preString = Emin として、次のストリングへ行く。</text:p>
        </text:list-item>
      </text:list>
      <text:p text:style-name="P9"/>
      <text:p text:style-name="P9"/>
      <text:p text:style-name="P10">ステップ<text:span text:style-name="T1">7</text:span><text:span text:style-name="T16"> のアルゴリズム</text:span></text:p>
      <text:p text:style-name="P11">ELPSOを用いる</text:p>
      <text:p text:style-name="P12">Xmin[0,…,<text:span text:style-name="T1">3</text:span>], Xmax[0,…,<text:span text:style-name="T1">3</text:span>] の間で探索する</text:p>
      <text:p text:style-name="P12">stringGroup::getE( X, <text:span text:style-name="T1">s, l</text:span> ) を最小化する</text:p>
      <text:p text:style-name="P13"/>
      <text:p text:style-name="P14">stringGroup::getE( X, <text:span text:style-name="T1">s, l</text:span> )のアルゴリズム</text:p>
      <text:p text:style-name="P12">事前設定</text:p>
      <text:p text:style-name="P15">s<text:span text:style-name="T10">m</text:span>Init の電流 I<text:span text:style-name="T17">init,</text:span>k （上のステップ2)</text:p>
      <text:p text:style-name="P15"><text:span text:style-name="T17">s1=</text:span>0,..,s-1 のストリングの電流 I<text:span text:style-name="T17">s1,</text:span>k <text:s/>（上のステップ <text:span text:style-name="T10">7</text:span><text:span text:style-name="T18">）</text:span></text:p>
      <text:p text:style-name="P16"/>
      <text:list text:style-name="L2">
        <text:list-item>
          <text:p text:style-name="P17">サブストリング<text:span text:style-name="T19">(s, l) の</text:span><text:span text:style-name="T10">4</text:span><text:span text:style-name="T19">パラメータ</text:span><text:span text:style-name="T11">VocSTC, IscSTC, VmpSTC, ImpSTC </text:span><text:span text:style-name="T19">を X に対応して決める</text:span></text:p>
        </text:list-item>
        <text:list-item>
          <text:p text:style-name="P18">サブストリング<text:span text:style-name="T19">(s, l) </text:span><text:span text:style-name="T11">に、すでに設定済のGk, Tk (k=0,1,…,K-1) に基づいて、Voc,k, Isc,k, Vmp,k, Imp,k を決める。それから</text:span><text:span text:style-name="T20">adaptive one diode modelのパラメータ探索（</text:span><text:span text:style-name="T10">GPU</text:span><text:span text:style-name="T21">実行）</text:span><text:span text:style-name="T20">で、Rs,k, Rh,k, Iph,k, eta,k を決定する </text:span></text:p>
        </text:list-item>
        <text:list-item>
          <text:p text:style-name="P19">ストリング<text:span text:style-name="T10">vsm[s]</text:span><text:span text:style-name="T3"> にVmeas,k (k=0,1,…,K-1) を与えて、電流 I</text:span><text:span text:style-name="T17">s,</text:span><text:span text:style-name="T22">k</text:span><text:span text:style-name="T3">を計算する</text:span></text:p>
        </text:list-item>
        <text:list-item>
          <text:p text:style-name="P20"><text:span text:style-name="T3">s</text:span>tringGroupの電流<draw:frame draw:style-name="fr2" draw:name="オブジェクト2" text:anchor-type="as-char" svg:y="-0.716cm" svg:width="6.248cm" svg:height="1.139cm" draw:z-index="0"><draw:object xlink:href="./Object 2" xlink:type="simple" xlink:show="embed" xlink:actuate="onLoad"/><draw:image xlink:href="./ObjectReplacements/Object 2" xlink:type="simple" xlink:show="embed" xlink:actuate="onLoad"/></draw:frame>を計算する</text:p>
        </text:list-item>
        <text:list-item>
          <text:p text:style-name="P21">誤差 <draw:frame draw:style-name="fr1" draw:name="オブジェクト3" text:anchor-type="as-char" svg:y="-1.506cm" svg:width="3.948cm" svg:height="2.644cm" draw:z-index="1"><draw:object xlink:href="./Object 3" xlink:type="simple" xlink:show="embed" xlink:actuate="onLoad"/><draw:image xlink:href="./ObjectReplacements/Object 3" xlink:type="simple" xlink:show="embed" xlink:actuate="onLoad"/><svg:desc>数式</svg:desc></draw:frame>を計算して返す</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ＭＳ Ｐゴシック" svg:font-family="'ＭＳ Ｐゴシック'"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02-22T17:04:51.381923854</meta:creation-date>
    <meta:generator>LibreOffice/25.8.6.2$Windows_X86_64 LibreOffice_project/b4b39682cd9868fa725bc664aff94278d315bd04</meta:generator>
    <dc:date>2026-05-13T21:43:21.985978300</dc:date>
    <meta:editing-duration>PT8H58M56S</meta:editing-duration>
    <meta:editing-cycles>32</meta:editing-cycles>
    <meta:print-date>2026-05-13T21:35:14.825509500</meta:print-date>
    <meta:document-statistic meta:table-count="0" meta:image-count="0" meta:object-count="3" meta:page-count="1" meta:paragraph-count="30" meta:word-count="685" meta:character-count="1523" meta:non-whitespace-character-count="1377"/>
  </office:meta>
</office:document-meta>
</file>

<file path=Object 2/content.xml><?xml version="1.0" encoding="utf-8"?>
<math xmlns="http://www.w3.org/1998/Math/MathML" display="block">
  <semantics>
    <mrow>
      <msub>
        <mi>I</mi>
        <mi>k</mi>
      </msub>
      <mo stretchy="false">=</mo>
      <mrow>
        <msub>
          <mi>I</mi>
          <mrow>
            <mi>s</mi>
            <mi>,</mi>
            <mi>k</mi>
          </mrow>
        </msub>
        <mo stretchy="false">+</mo>
        <mrow>
          <munderover>
            <mo stretchy="false">∑</mo>
            <mrow>
              <mi>s</mi>
              <mrow>
                <mn>1</mn>
                <mo stretchy="false">=</mo>
                <mn>0</mn>
              </mrow>
            </mrow>
            <mrow>
              <mi>s</mi>
              <mo stretchy="false">−</mo>
              <mn>1</mn>
            </mrow>
          </munderover>
          <msub>
            <mi>I</mi>
            <mrow>
              <mi>s</mi>
              <mn>1</mn>
              <mi>,</mi>
              <mi>k</mi>
            </mrow>
          </msub>
        </mrow>
        <mo stretchy="false">+</mo>
        <mrow>
          <mrow>
            <mo fence="true" form="prefix" stretchy="false">(</mo>
            <mrow>
              <mrow>
                <mi>S</mi>
                <mo stretchy="false">−</mo>
                <mi>s</mi>
                <mo stretchy="false">−</mo>
                <mn>1</mn>
              </mrow>
            </mrow>
            <mo fence="true" form="postfix" stretchy="false">)</mo>
          </mrow>
          <mo stretchy="false">×</mo>
          <msub>
            <mi>I</mi>
            <mrow>
              <mi mathvariant="italic">init</mi>
              <mi>,</mi>
              <mi>k</mi>
            </mrow>
          </msub>
        </mrow>
      </mrow>
    </mrow>
    <annotation encoding="StarMath 5.0">I_k = I_{ s,k }+ sum from{s1=0} to{s-1} I_{ s1,k } + ( S-s-1 ) times I_{ init, k }</annotation>
  </semantics>
</math>
</file>

<file path=Object 3/content.xml><?xml version="1.0" encoding="utf-8"?>
<math xmlns="http://www.w3.org/1998/Math/MathML" display="block">
  <semantics>
    <mrow>
      <mi>E</mi>
      <mo stretchy="false">=</mo>
      <msqrt>
        <mfrac>
          <mrow>
            <munderover>
              <mo stretchy="false">∑</mo>
              <mrow>
                <mi>k</mi>
                <mo stretchy="false">=</mo>
                <mn>0</mn>
              </mrow>
              <mrow>
                <mi>K</mi>
                <mo stretchy="false">−</mo>
                <mn>1</mn>
              </mrow>
            </munderover>
            <msup>
              <mrow>
                <mo fence="true" form="prefix" stretchy="true">(</mo>
                <mrow>
                  <mrow>
                    <msub>
                      <mi>I</mi>
                      <mrow>
                        <mi mathvariant="italic">meas</mi>
                        <mi>,</mi>
                        <mi>k</mi>
                      </mrow>
                    </msub>
                    <mo stretchy="false">−</mo>
                    <msub>
                      <mi>I</mi>
                      <mi>k</mi>
                    </msub>
                  </mrow>
                </mrow>
                <mo fence="true" form="postfix" stretchy="true">)</mo>
              </mrow>
              <mn>2</mn>
            </msup>
          </mrow>
          <mrow>
            <munderover>
              <mo stretchy="false">∑</mo>
              <mrow>
                <mi>k</mi>
                <mo stretchy="false">=</mo>
                <mn>0</mn>
              </mrow>
              <mrow>
                <mi>K</mi>
                <mo stretchy="false">−</mo>
                <mn>1</mn>
              </mrow>
            </munderover>
            <msubsup>
              <mi>I</mi>
              <mrow>
                <mi mathvariant="italic">meas</mi>
                <mi>,</mi>
                <mi>k</mi>
              </mrow>
              <mn>2</mn>
            </msubsup>
          </mrow>
        </mfrac>
      </msqrt>
    </mrow>
    <annotation encoding="StarMath 5.0">E = sqrt{ sum from{k=0} to{K-1} left ( I_{meas, k} - I_{k} right )^2 over sum from{k=0} to{K-1} I_{meas,k}^2  } </annotation>
  </semantics>
</math>
</file>

<file path=Object 4/content.xml><?xml version="1.0" encoding="utf-8"?>
<math xmlns="http://www.w3.org/1998/Math/MathML" display="block">
  <semantics>
    <mrow>
      <mi>E</mi>
      <mo stretchy="false">=</mo>
      <msqrt>
        <mfrac>
          <mrow>
            <munderover>
              <mo stretchy="false">∑</mo>
              <mrow>
                <mi>k</mi>
                <mo stretchy="false">=</mo>
                <mn>0</mn>
              </mrow>
              <mrow>
                <mi>K</mi>
                <mo stretchy="false">−</mo>
                <mn>1</mn>
              </mrow>
            </munderover>
            <msup>
              <mrow>
                <mo fence="true" form="prefix" stretchy="true">(</mo>
                <mrow>
                  <mrow>
                    <msub>
                      <mi>I</mi>
                      <mrow>
                        <mi mathvariant="italic">meas</mi>
                        <mi>,</mi>
                        <mi>k</mi>
                      </mrow>
                    </msub>
                    <mo stretchy="false">−</mo>
                    <mrow>
                      <mi>S</mi>
                      <mo stretchy="false">×</mo>
                      <msub>
                        <mi>I</mi>
                        <mrow>
                          <mi mathvariant="italic">init</mi>
                          <mi>,</mi>
                          <mi>k</mi>
                        </mrow>
                      </msub>
                    </mrow>
                  </mrow>
                </mrow>
                <mo fence="true" form="postfix" stretchy="true">)</mo>
              </mrow>
              <mn>2</mn>
            </msup>
          </mrow>
          <mrow>
            <munderover>
              <mo stretchy="false">∑</mo>
              <mrow>
                <mi>k</mi>
                <mo stretchy="false">=</mo>
                <mn>0</mn>
              </mrow>
              <mrow>
                <mi>K</mi>
                <mo stretchy="false">−</mo>
                <mn>1</mn>
              </mrow>
            </munderover>
            <msubsup>
              <mi>I</mi>
              <mrow>
                <mi mathvariant="italic">meas</mi>
                <mi>,</mi>
                <mi>k</mi>
              </mrow>
              <mn>2</mn>
            </msubsup>
          </mrow>
        </mfrac>
      </msqrt>
    </mrow>
    <annotation encoding="StarMath 5.0">E = sqrt{ sum from{k=0} to{K-1} left ( I_{meas, k} - S times I_{init, k} right )^2 over sum from{k=0} to{K-1} I_{meas,k}^2  } </annotation>
  </semantics>
</math>
</file>